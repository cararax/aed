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15%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ista de Exercícios – Tuplas, Listas e Dicionários em Python</text:span></text:p>
      <text:p text:style-name="Standard"><text:span text:style-name="T2">Parte 1 — Tuplas (dados imutáveis)</text:span></text:p>
      <text:p text:style-name="P2"><text:span text:style-name="T1">1. Crie uma tupla contendo as seguintes informações de um servidor web: endereço IP, porta, protocolo, status (ativo/inativo). Depois:<text:line-break/>a) imprima toda a tupla<text:line-break/>b) imprima apenas o endereço IP<text:line-break/>c) imprima o protocolo e a porta</text:span></text:p>
      <text:p text:style-name="P3"/>
      <text:p text:style-name="P2"><text:span text:style-name="T1">2. Considere a tupla: usuario = ("ana", "ana@email.com", 22). Faça um programa que:<text:line-break/>a) imprima o nome do usuário<text:line-break/>b) imprima o email<text:line-break/>c) imprima a idade</text:span></text:p>
      <text:p text:style-name="P3"/>
      <text:p text:style-name="P2"><text:span text:style-name="T1">3. Um sistema registrou o clique de um usuário na tela com as coordenadas: clique = (150, 300)<text:line-break/>a) imprima as coordenadas separadamente<text:line-break/>b) calcule a soma das coordenadas</text:span></text:p>
      <text:p text:style-name="P3"/>
      <text:p text:style-name="P2"><text:span text:style-name="T1">4. Dada a tupla: produto = ("Notebook", 3500.00, 10), use desempacotamento para armazenar os valores em três variáveis e imprima:<text:line-break/>Produto: Notebook<text:line-break/>Preço: 3500.0<text:line-break/>Quantidade em estoque: 10</text:span></text:p>
      <text:p text:style-name="P1"/>
      <text:p text:style-name="Standard"><text:span text:style-name="T2">Parte 2 — Listas (dados mutáveis)</text:span></text:p>
      <text:p text:style-name="P2"><text:span text:style-name="T1">5. Crie uma lista contendo cinco linguagens de programação. Depois:<text:line-break/>a) imprima a lista<text:line-break/>b) imprima apenas a primeira linguagem<text:line-break/>c) imprima apenas a última linguagem</text:span></text:p>
      <text:p text:style-name="P3"/>
      <text:p text:style-name="P2"><text:span text:style-name="T1">6. Comece com a lista: frameworks = ["Django", "Flask", "React"]<text:line-break/>a) adicione "Vue" ao final da lista<text:line-break/>b) adicione "Angular" na segunda posição<text:line-break/>c) imprima a lista final</text:span></text:p>
      <text:p text:style-name="P3"/>
      <text:p text:style-name="P3"/>
      <text:p text:style-name="P2"><text:span text:style-name="T1">7. Dada a lista: usuarios = ["Ana", "Carlos", "Marcos", "Julia", "Fernanda"]<text:line-break/>a) remova "Marcos"<text:line-break/>b) remova o último elemento<text:line-break/>c) imprima a lista resultante</text:span></text:p>
      <text:p text:style-name="P3"/>
      <text:p text:style-name="P2"><text:span text:style-name="T1">8. Dada a lista: notas = [7.5, 8.0, 6.5, 9.0], faça um programa que:<text:line-break/>a) percorra a lista usando for<text:line-break/>b) imprima cada nota<text:line-break/>c) calcule a média das notas</text:span></text:p>
      <text:p text:style-name="P3"/>
      <text:p text:style-name="P2"><text:span text:style-name="T1">9. Dada a lista: acessos = [120, 98, 340, 215, 400, 150], faça um programa que mostre:<text:line-break/>- o maior número de acessos<text:line-break/>- o menor número de acessos</text:span></text:p>
      <text:p text:style-name="P3"/>
      <text:p text:style-name="P2"><text:span text:style-name="T1">10. Dada a lista: idades = [12, 17, 18, 25, 14, 30, 16], crie uma nova lista contendo apenas as idades maiores ou iguais a 18.</text:span></text:p>
      <text:p text:style-name="P3"/>
      <text:p text:style-name="Standard"><text:span text:style-name="T2">Parte 3 — Dicionários (estrutura chave → valor)</text:span></text:p>
      <text:p text:style-name="P2"><text:soft-page-break/><text:span text:style-name="T1">11. Crie um dicionário com as seguintes informações de um usuário: nome, email, idade, cidade. Depois imprima:<text:line-break/>Nome:<text:line-break/>Email:<text:line-break/>Idade:<text:line-break/>Cidade:</text:span></text:p>
      <text:p text:style-name="P3"/>
      <text:p text:style-name="P2"><text:span text:style-name="T1">12. Considere o dicionário:<text:line-break/>produto = {<text:line-break/> <text:s text:c="3"/>"nome": "Mouse",<text:line-break/> <text:s text:c="3"/>"preco": 80.0,<text:line-break/> <text:s text:c="3"/>"estoque": 25<text:line-break/>}<text:line-break/><text:line-break/>Faça um programa que:<text:line-break/>a) altere o preço para 75.0<text:line-break/>b) aumente o estoque em 10 unidades<text:line-break/>c) imprima o dicionário atualizado</text:span></text:p>
      <text:p text:style-name="P3"/>
      <text:p text:style-name="P2"><text:span text:style-name="T1">13. Dado o dicionário:<text:line-break/>aluno = {<text:line-break/> <text:s text:c="3"/>"nome": "Lucas",<text:line-break/> <text:s text:c="3"/>"nota1": 7.5,<text:line-break/> <text:s text:c="3"/>"nota2": 8.0,<text:line-break/> <text:s text:c="3"/>"nota3": 6.5<text:line-break/>}<text:line-break/>Faça um programa que:<text:line-break/>a) calcule a média das notas<text:line-break/>b) imprima o resultado</text:span></text:p>
      <text:p text:style-name="P3"/>
      <text:p text:style-name="P2"><text:span text:style-name="T1">14. Crie um dicionário onde a chave é o nome de uma página e <text:s/>o valor é o número de acessos. Exemplo:<text:line-break/>acessos = {<text:line-break/> <text:s text:c="3"/>"home": 1500,<text:line-break/> <text:s text:c="3"/>"produtos": 980,<text:line-break/> <text:s text:c="3"/>"contato": 300<text:line-break/>}<text:line-break/>Depois:<text:line-break/>a) imprima todas as páginas<text:line-break/>b) imprima o número total de acessos (somando todos)</text:span></text:p>
      <text:p text:style-name="P3"/>
      <text:p text:style-name="Standard"><text:span text:style-name="T2">Parte 4 — Integração (listas + dicionários)</text:span></text:p>
      <text:p text:style-name="P2"><text:span text:style-name="T1">15. Crie uma lista de dicionários, onde cada dicionário representa um usuário com <text:s/>nome, email, idade. Depois faça um programa que:<text:line-break/>a) percorra a lista<text:line-break/>b) imprima o nome e email de cada usuário</text:span></text:p>
      <text:p text:style-name="P3"/>
      <text:p text:style-name="P2"><text:span text:style-name="T1">16. Crie <text:s/>uma lista contendo dicionários de produtos com nome, preço, estoque. Depois imprima todos os produtos e calcule o valor total em estoque (preço × quantidade)</text:span></text:p>
      <text:p text:style-name="P3"/>
      <text:p text:style-name="P2"><text:span text:style-name="T1">17. Dada a lista: tecnologias = ["Python", "JavaScript", "Python", "HTML", "Python", "CSS", "JavaScript"], crie um dicionário de contagem que mostre quantas vezes cada tecnologia aparece. Exemplo esperado:<text:line-break/>Python: 3<text:line-break/>JavaScript: 2<text:line-break/>HTML: 1<text:line-break/>CSS: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normal" style:default-outline-level="" style:class="list">
      <style:paragraph-properties fo:margin-left="0.25in" fo:margin-right="0in" fo:margin-top="0in" fo:margin-bottom="0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ody_20_Text_20_2" style:display-name="Body Text 2" style:family="paragraph" style:parent-style-name="normal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normal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normal" style:default-outline-level="" style:class="list">
      <style:paragraph-properties fo:margin-left="0.5in" fo:margin-right="0in" fo:margin-top="0in" fo:margin-bottom="0in" loext:contextual-spacing="true" fo:text-indent="-0.25in" style:auto-text-indent="false"/>
    </style:style>
    <style:style style:name="List_20_3" style:display-name="List 3" style:family="paragraph" style:parent-style-name="normal" style:default-outline-level="" style:class="list">
      <style:paragraph-properties fo:margin-left="0.75in" fo:margin-right="0in" fo:margin-top="0in" fo:margin-bottom="0in" loext:contextual-spacing="true" fo:text-indent="-0.25in" style:auto-text-indent="false"/>
    </style:style>
    <style:style style:name="List_20_Bullet" style:display-name="List Bullet" style:family="paragraph" style:parent-style-name="normal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normal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normal" style:default-outline-level="">
      <style:paragraph-properties fo:margin-top="0in" fo:margin-bottom="0in" loext:contextual-spacing="true"/>
    </style:style>
    <style:style style:name="List_20_Number" style:display-name="List Number" style:family="paragraph" style:parent-style-name="normal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normal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normal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normal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normal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normal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normal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normal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15%"/>
    </style:style>
    <style:style style:name="MP2" style:family="paragraph" style:parent-style-name="Standard">
      <style:paragraph-properties fo:margin-top="0in" fo:margin-bottom="0in" loext:contextual-spacing="false" fo:line-height="115%"/>
      <style:text-properties style:font-name="Calibri" style:font-name-asian="Calibri1" style:font-name-complex="Calibri1"/>
    </style:style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légio Politécnico da UFSM</text:span><draw:frame draw:style-name="Mfr1" draw:name="image1.png" text:anchor-type="char" svg:x="4.6583in" svg:y="-0.2291in" svg:width="1.5311in" svg:height="1.1252in" draw:z-index="1"><draw:image xlink:href="Pictures/10000201000000930000006C14CCAA46E89F8D59.png" xlink:type="simple" xlink:show="embed" xlink:actuate="onLoad" loext:mime-type="image/png"/></draw:frame></text:p>
        <text:p text:style-name="MP1"><text:span text:style-name="MT1">Sistemas para Internet</text:span></text:p>
        <text:p text:style-name="MP1"><text:span text:style-name="MT1">Disciplina: Análise de dados e extração de conhecimento</text:span></text:p>
        <text:p text:style-name="MP1"><text:span text:style-name="MT1">Professor: Leandro Freitas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3:15:00</meta:creation-date>
    <meta:initial-creator>python-docx</meta:initial-creator>
    <meta:document-statistic meta:table-count="0" meta:image-count="1" meta:object-count="0" meta:page-count="2" meta:paragraph-count="26" meta:word-count="564" meta:character-count="3380" meta:non-whitespace-character-count="2793"/>
    <meta:generator>LibreOfficeDev/6.0.5.2$Linux_X86_64 LibreOffice_project/</meta:generator>
  </office:meta>
</office:document-meta>
</file>