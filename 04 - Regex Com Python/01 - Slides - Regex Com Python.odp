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A0000010E3F260D0DD02BB51F.png" manifest:media-type="image/png"/>
  <manifest:file-entry manifest:full-path="Pictures/10000000000001E7000000F1B35B87043771A65F.png" manifest:media-type="image/png"/>
  <manifest:file-entry manifest:full-path="Pictures/10000201000001E000000103A47FF68AA9202945.png" manifest:media-type="image/png"/>
  <manifest:file-entry manifest:full-path="Pictures/10000201000001780000017C5C3C1CFA87DE6593.png" manifest:media-type="image/png"/>
  <manifest:file-entry manifest:full-path="Pictures/1000020100000112000001523A3AE7BBC7753420.png" manifest:media-type="image/png"/>
  <manifest:file-entry manifest:full-path="Pictures/TablePreview1.svm" manifest:media-type=""/>
  <manifest:file-entry manifest:full-path="Pictures/10000000000000DD0000007366DDEEE233520D3E.png" manifest:media-type="image/png"/>
  <manifest:file-entry manifest:full-path="Pictures/10000201000001DA0000015B5D9DBE45C88A5E6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18cm" style:use-optimal-column-width="false"/>
    </style:style>
    <style:style style:name="co2" style:family="table-column">
      <style:table-column-properties style:column-width="7.408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.953cm" fo:margin-right="0cm" fo:margin-top="0cm" fo:margin-bottom="0cm" fo:line-height="80%" fo:text-align="start" fo:text-indent="-0.952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127cm" fo:margin-bottom="0cm" fo:line-height="80%" fo:text-align="start" fo:text-indent="-0.95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2.54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169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3.81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5.3000001907349pt" fo:letter-spacing="normal" fo:font-style="normal" style:text-underline-style="none" fo:font-weight="normal" style:font-name-asian="Calibri" style:font-size-asian="15.3000001907349pt" style:font-style-asian="normal" style:font-weight-asian="normal" style:font-name-complex="Calibri" style:font-size-complex="15.30000019073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9pt" fo:letter-spacing="normal" fo:font-style="normal" style:text-underline-style="none" fo:font-weight="normal" style:font-name-asian="Calibri" style:font-size-asian="29pt" style:font-style-asian="normal" style:font-weight-asian="normal" style:font-name-complex="Calibri" style:font-size-complex="2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solid" style:text-underline-width="auto" style:text-underline-color="font-color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3" style:family="text">
      <style:text-properties fo:font-variant="normal" fo:text-transform="none" fo:color="#6aa84f" style:text-line-through-style="none" style:text-line-through-type="none" style:text-position="0% 100%" style:font-name="Consolas" fo:font-size="18pt" fo:letter-spacing="normal" fo:font-style="italic" style:text-underline-style="none" fo:font-weight="normal" style:font-name-asian="Consolas" style:font-size-asian="18pt" style:font-style-asian="italic" style:font-weight-asian="normal" style:font-name-complex="Consolas" style:font-size-complex="1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5pt" fo:letter-spacing="normal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" fo:font-size="25pt" fo:letter-spacing="normal" fo:font-style="normal" style:text-underline-style="solid" style:text-underline-width="auto" style:text-underline-color="font-color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Consola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Consola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Consola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213cm" text:min-label-width="1.057cm"/>
        <style:text-properties style:font-name="Arial" fo:color="#ff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gex com Python" draw:style-name="dp1" draw:master-page-name="OBJECT" presentation:presentation-page-layout-name="AL1T11">
        <draw:frame draw:name="Google Shape;86;p13" presentation:style-name="pr1" draw:text-style-name="P2" draw:layer="layout" svg:width="22.859cm" svg:height="3.175cm" svg:x="0.527cm" svg:y="8.623cm" presentation:class="title" presentation:user-transformed="true">
          <draw:text-box>
            <text:p text:style-name="P1"><text:span text:style-name="T1">Regex com Python</text:span></text:p>
          </draw:text-box>
        </draw:frame>
        <draw:frame draw:name="Google Shape;87;p13" presentation:style-name="pr2" draw:text-style-name="P5" draw:layer="layout" svg:width="9.533cm" svg:height="1.399cm" svg:x="2.183cm" svg:y="14.728cm" presentation:class="outline" presentation:user-transformed="true">
          <draw:text-box>
            <text:p text:style-name="P3"><text:span text:style-name="T2">Professor Leandro O. Freitas</text:span></text:p>
            <text:p text:style-name="P4"><text:span text:style-name="T2">leandro@politecnico.ufsm.br</text:span></text:p>
          </draw:text-box>
        </draw:frame>
        <draw:custom-shape draw:name="Google Shape;88;p13" draw:style-name="gr1" draw:text-style-name="P6" draw:layer="layout" svg:width="17.038cm" svg:height="3.399cm" svg:x="2.183cm" svg:y="0.679cm">
          <text:p text:style-name="P1"><text:span text:style-name="T3">Análise de dados e extração de 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3;g1dfd216856c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4;g1dfd216856c_0_0:notes" draw:style-name="gr2" draw:layer="layout" svg:width="12.7cm" svg:height="9.524cm" svg:x="3.176cm" svg:y="1.905cm" draw:page-number="1" presentation:class="page"/>
        </presentation:notes>
      </draw:page>
      <draw:page draw:name="Regex em python" draw:style-name="dp1" draw:master-page-name="OBJECT" presentation:presentation-page-layout-name="AL1T11">
        <draw:frame draw:name="Google Shape;93;p14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Regex em python</text:span></text:p>
          </draw:text-box>
        </draw:frame>
        <draw:frame draw:name="Google Shape;94;p14" presentation:style-name="pr4" draw:text-style-name="P5" draw:layer="layout" svg:width="24.775cm" svg:height="4.417cm" svg:x="0.624cm" svg:y="4.445cm" presentation:class="outline" presentation:user-transformed="true">
          <draw:text-box>
            <text:list text:style-name="L4">
              <text:list-item>
                <text:p text:style-name="P8"><text:span text:style-name="T5">Possui vasto suporte às expressões regulares, com objetos e métodos prontos (módulo re) para obter diferentes tipos de informação sobre </text:span><text:span text:style-name="T6">matches </text:span><text:span text:style-name="T5">(casamentos/ combinações).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import re</text:span></text:p>
                  </text:list-item>
                </text:list>
              </text:list-item>
            </text:list>
          </draw:text-box>
        </draw:frame>
        <draw:frame draw:name="Google Shape;95;p14" draw:style-name="standard" draw:layer="layout" svg:width="12.587cm" svg:height="5.864cm" svg:x="8.473cm" svg:y="7.93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>Característica</text:span></text:p>
              </table:table-cell>
              <table:table-cell>
                <text:p text:style-name="P1"><text:span text:style-name="T8">Funçõe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Buscar</text:span></text:p>
              </table:table-cell>
              <table:table-cell>
                <text:p text:style-name="P9"><text:span text:style-name="T9">re.search, re.findall, re.finditer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Substituir</text:span></text:p>
              </table:table-cell>
              <table:table-cell>
                <text:p text:style-name="P9"><text:span text:style-name="T9">re.sub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Dividir</text:span></text:p>
              </table:table-cell>
              <table:table-cell>
                <text:p text:style-name="P9"><text:span text:style-name="T9">re.split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Ignorar maiúsculas/ minúsculas</text:span></text:p>
              </table:table-cell>
              <table:table-cell>
                <text:p text:style-name="P9"><text:span text:style-name="T9">Modificadores (?i), re.IGNO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6;p14" presentation:style-name="pr4" draw:text-style-name="P5" draw:layer="layout" svg:width="23.488cm" svg:height="2.474cm" svg:x="1.27cm" svg:y="14.643cm" presentation:class="outline" presentation:user-transformed="true">
          <draw:text-box>
            <text:list text:style-name="L4">
              <text:list-item>
                <text:p text:style-name="P8"><text:span text:style-name="T5">Criar regexes entre aspas para evitar problemas de escapes (\)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">r(“.[0-9]+”)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90;g1dfd216856c_0_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1;g1dfd216856c_0_6:notes" draw:style-name="gr2" draw:layer="layout" svg:width="12.7cm" svg:height="9.524cm" svg:x="3.176cm" svg:y="1.905cm" draw:page-number="2" presentation:class="page"/>
        </presentation:notes>
      </draw:page>
      <draw:page draw:name="Funções de busca" draw:style-name="dp1" draw:master-page-name="OBJECT" presentation:presentation-page-layout-name="AL1T11">
        <draw:frame draw:name="Google Shape;101;p15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Funções de busca</text:span></text:p>
          </draw:text-box>
        </draw:frame>
        <draw:frame draw:name="Google Shape;102;p15" presentation:style-name="pr4" draw:text-style-name="P5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8"><text:span text:style-name="T11">re.search()</text:span><text:span text:style-name="T5">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Verifica se uma string é aceita por uma regex;</text:span></text:p>
                  </text:list-item>
                  <text:list-item>
                    <text:p text:style-name="P10"><text:span text:style-name="T10">Retorna um objeto com informações do casamento (índices casados e caracteres casados);</text:span></text:p>
                  </text:list-item>
                </text:list>
              </text:list-item>
            </text:list>
            <text:p text:style-name="P11"><text:span text:style-name="T5"/></text:p>
            <text:list text:continue-numbering="true" text:style-name="L9">
              <text:list-item>
                <text:p text:style-name="P11"><text:span text:style-name="T5">Testar: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7">print(m.group())</text:span></text:p>
                  </text:list-item>
                  <text:list-item>
                    <text:p text:style-name="P9"><text:span text:style-name="T7">print(m.start())</text:span></text:p>
                  </text:list-item>
                  <text:list-item>
                    <text:p text:style-name="P9"><text:span text:style-name="T7">print(m.end())</text:span></text:p>
                  </text:list-item>
                  <text:list-item>
                    <text:p text:style-name="P9"><text:span text:style-name="T7">print(m.span())</text:span></text:p>
                  </text:list-item>
                </text:list>
              </text:list-item>
            </text:list>
          </draw:text-box>
        </draw:frame>
        <draw:frame draw:name="Google Shape;103;p15" draw:style-name="gr3" draw:text-style-name="P12" draw:layer="layout" svg:width="11.407cm" svg:height="11.528cm" svg:x="13.48cm" svg:y="7.645cm">
          <draw:image xlink:href="Pictures/10000201000001780000017C5C3C1CFA87DE6593.png" xlink:type="simple" xlink:show="embed" xlink:actuate="onLoad">
            <text:p/>
          </draw:image>
        </draw:frame>
        <presentation:notes draw:style-name="dp2">
          <draw:page-thumbnail draw:name="Google Shape;98;g1e100945810_1_2:notes" draw:style-name="gr2" draw:layer="layout" svg:width="12.699cm" svg:height="9.524cm" svg:x="3.176cm" svg:y="1.905cm" draw:page-number="3" presentation:class="page"/>
          <draw:frame draw:name="Google Shape;99;g1e100945810_1_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e busca" draw:style-name="dp1" draw:master-page-name="OBJECT" presentation:presentation-page-layout-name="AL1T11">
        <draw:frame draw:name="Google Shape;108;p16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Funções de busca</text:span></text:p>
          </draw:text-box>
        </draw:frame>
        <draw:frame draw:name="Google Shape;109;p16" presentation:style-name="pr4" draw:text-style-name="P5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8"><text:span text:style-name="T11">re.search()</text:span><text:span text:style-name="T5">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Se a regex possui grupos, a função </text:span><text:span text:style-name="T12">search</text:span><text:span text:style-name="T10"> também traz informações sobre cada um deles;</text:span></text:p>
                  </text:list-item>
                </text:list>
              </text:list-item>
            </text:list>
            <text:p text:style-name="P11"><text:span text:style-name="T5"/></text:p>
            <text:list text:continue-numbering="true" text:style-name="L9">
              <text:list-item>
                <text:p text:style-name="P11"><text:span text:style-name="T5">Testar: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7">print(m.span(0))</text:span></text:p>
                  </text:list-item>
                  <text:list-item>
                    <text:p text:style-name="P9"><text:span text:style-name="T7">print(m.span(1))</text:span></text:p>
                  </text:list-item>
                  <text:list-item>
                    <text:p text:style-name="P9"><text:span text:style-name="T7">print(m.span(2))</text:span></text:p>
                  </text:list-item>
                  <text:list-item>
                    <text:p text:style-name="P9"><text:span text:style-name="T7">...</text:span></text:p>
                  </text:list-item>
                </text:list>
              </text:list-item>
            </text:list>
          </draw:text-box>
        </draw:frame>
        <draw:frame draw:name="Google Shape;110;p16" draw:style-name="gr3" draw:text-style-name="P12" draw:layer="layout" svg:width="8.771cm" svg:height="10.82cm" svg:x="16.242cm" svg:y="6.585cm">
          <draw:image xlink:href="Pictures/1000020100000112000001523A3AE7BBC7753420.png" xlink:type="simple" xlink:show="embed" xlink:actuate="onLoad">
            <text:p/>
          </draw:image>
        </draw:frame>
        <presentation:notes draw:style-name="dp2">
          <draw:page-thumbnail draw:name="Google Shape;105;g1e100945810_1_9:notes" draw:style-name="gr2" draw:layer="layout" svg:width="12.699cm" svg:height="9.524cm" svg:x="3.176cm" svg:y="1.905cm" draw:page-number="4" presentation:class="page"/>
          <draw:frame draw:name="Google Shape;106;g1e100945810_1_9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e busca" draw:style-name="dp1" draw:master-page-name="OBJECT" presentation:presentation-page-layout-name="AL1T11">
        <draw:frame draw:name="Google Shape;115;p17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Funções de busca</text:span></text:p>
          </draw:text-box>
        </draw:frame>
        <draw:frame draw:name="Google Shape;116;p17" presentation:style-name="pr4" draw:text-style-name="P5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8"><text:span text:style-name="T11">re.findall()</text:span><text:span text:style-name="T5">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Retorna uma lista com TODOS os trechos casados pela regex, ou lista vazia, se não houver casamento;</text:span></text:p>
                  </text:list-item>
                  <text:list-item>
                    <text:p text:style-name="P10"><text:span text:style-name="T10">Se houver grupos, retorna uma lista de tuplas, onde cada uma representa um casamento.</text:span></text:p>
                  </text:list-item>
                </text:list>
              </text:list-item>
            </text:list>
          </draw:text-box>
        </draw:frame>
        <draw:frame draw:name="Google Shape;117;p17" draw:style-name="gr3" draw:text-style-name="P12" draw:layer="layout" svg:width="16.516cm" svg:height="8.911cm" svg:x="8.662cm" svg:y="9.219cm">
          <draw:image xlink:href="Pictures/10000201000001E000000103A47FF68AA9202945.png" xlink:type="simple" xlink:show="embed" xlink:actuate="onLoad">
            <text:p/>
          </draw:image>
        </draw:frame>
        <presentation:notes draw:style-name="dp2">
          <draw:page-thumbnail draw:name="Google Shape;112;g1e100945810_1_16:notes" draw:style-name="gr2" draw:layer="layout" svg:width="12.699cm" svg:height="9.524cm" svg:x="3.176cm" svg:y="1.905cm" draw:page-number="5" presentation:class="page"/>
          <draw:frame draw:name="Google Shape;113;g1e100945810_1_16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e busca" draw:style-name="dp1" draw:master-page-name="OBJECT" presentation:presentation-page-layout-name="AL1T11">
        <draw:frame draw:name="Google Shape;122;p18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Funções de busca</text:span></text:p>
          </draw:text-box>
        </draw:frame>
        <draw:frame draw:name="Google Shape;123;p18" presentation:style-name="pr4" draw:text-style-name="P5" draw:layer="layout" svg:width="22.859cm" svg:height="12.572cm" svg:x="0cm" svg:y="4.233cm" presentation:class="outline" presentation:user-transformed="true">
          <draw:text-box>
            <text:list text:style-name="L8">
              <text:list-item>
                <text:p text:style-name="P8"><text:span text:style-name="T11">re.finditer()</text:span><text:span text:style-name="T5">: Semelhante ao findall(), porém pode ser usada em loops.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funções group() e expand() permitem iterar de maneiras semelhantes nos resultados de casamentos.</text:span></text:p>
                  </text:list-item>
                </text:list>
              </text:list-item>
            </text:list>
          </draw:text-box>
        </draw:frame>
        <draw:frame draw:name="Google Shape;124;p18" draw:style-name="gr3" draw:text-style-name="P12" draw:layer="layout" svg:width="15.457cm" svg:height="7.649cm" svg:x="1.27cm" svg:y="8.253cm">
          <draw:image xlink:href="Pictures/10000000000001E7000000F1B35B87043771A65F.png" xlink:type="simple" xlink:show="embed" xlink:actuate="onLoad">
            <text:p/>
          </draw:image>
        </draw:frame>
        <draw:frame draw:name="Google Shape;125;p18" draw:style-name="gr3" draw:text-style-name="P12" draw:layer="layout" svg:width="8.537cm" svg:height="4.442cm" svg:x="15.592cm" svg:y="12.451cm">
          <draw:image xlink:href="Pictures/10000000000000DD0000007366DDEEE233520D3E.png" xlink:type="simple" xlink:show="embed" xlink:actuate="onLoad">
            <text:p/>
          </draw:image>
        </draw:frame>
        <presentation:notes draw:style-name="dp2">
          <draw:page-thumbnail draw:name="Google Shape;119;g1e100945810_1_22:notes" draw:style-name="gr2" draw:layer="layout" svg:width="12.699cm" svg:height="9.524cm" svg:x="3.176cm" svg:y="1.905cm" draw:page-number="6" presentation:class="page"/>
          <draw:frame draw:name="Google Shape;120;g1e100945810_1_2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as funções" draw:style-name="dp1" draw:master-page-name="OBJECT" presentation:presentation-page-layout-name="AL1T11">
        <draw:frame draw:name="Google Shape;130;p19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Outras funções</text:span></text:p>
          </draw:text-box>
        </draw:frame>
        <draw:frame draw:name="Google Shape;131;p19" presentation:style-name="pr4" draw:text-style-name="P5" draw:layer="layout" svg:width="23.732cm" svg:height="14.604cm" svg:x="1.27cm" svg:y="4.445cm" presentation:class="outline" presentation:user-transformed="true">
          <draw:text-box>
            <text:list text:style-name="L12">
              <text:list-item>
                <text:p text:style-name="P8"><text:span text:style-name="T13">re.sub()</text:span><text:span text:style-name="T14">: permite substituir caracteres de strings que casam com a regex:</text:span></text:p>
              </text:list-item>
            </text:list>
            <text:p text:style-name="P13"><text:span text:style-name="T15">print (re.sub (r“\w”, “.”, “Python”)) </text:span><text:span text:style-name="T16"># Saída: .....</text:span></text:p>
            <text:p text:style-name="P13"><text:span text:style-name="T15">print (re.sub (r“\w”, “.”, “Python”,</text:span><text:span text:style-name="T16"> 2</text:span><text:span text:style-name="T15">)) </text:span><text:span text:style-name="T16"># Saída: ..thon</text:span></text:p>
            <text:p text:style-name="P13"><text:span text:style-name="T15">print (re.sub(r“(Py).*”, r“\1\1”, “Python”)) </text:span><text:span text:style-name="T16"># Saída: PyPy</text:span></text:p>
            <text:p text:style-name="P14"><text:span text:style-name="T17"/></text:p>
            <text:list text:continue-numbering="true" text:style-name="L12">
              <text:list-item>
                <text:p text:style-name="P11"><text:span text:style-name="T14">Retrovisores: alternativa de sintaxe para usar dígitos logo após retrovisor:</text:span></text:p>
              </text:list-item>
            </text:list>
            <text:p text:style-name="P15"><text:span text:style-name="T15">print (re.sub(r'(Py).*', r'</text:span><text:span text:style-name="T16">\g&lt;1&gt;</text:span><text:span text:style-name="T15">3', 'Python'))</text:span></text:p>
            <text:p text:style-name="P15"><text:span text:style-name="T16"># Saída Py3</text:span></text:p>
            <text:p text:style-name="P16"><text:span text:style-name="T17"/></text:p>
            <text:list text:continue-numbering="true" text:style-name="L12">
              <text:list-item>
                <text:p text:style-name="P11"><text:span text:style-name="T14">Divisão </text:span><text:span text:style-name="T13">re.split()</text:span><text:span text:style-name="T14">: retorna uma lista de strings que casam com a regex:</text:span></text:p>
              </text:list-item>
            </text:list>
            <text:p text:style-name="P13"><text:span text:style-name="T18">print (re.split(r“[/.]”, “20/03/2023”)) </text:span><text:span text:style-name="T19"># ['20', '03', '2023']</text:span></text:p>
            <text:p text:style-name="P13"><text:span text:style-name="T18">print (re.split(r“[/.]”, “31/03/2023”, </text:span><text:span text:style-name="T19">1</text:span><text:span text:style-name="T18">)) </text:span><text:span text:style-name="T19"># ['31', '03/2023']</text:span></text:p>
          </draw:text-box>
        </draw:frame>
        <presentation:notes draw:style-name="dp2">
          <draw:page-thumbnail draw:name="Google Shape;127;g1e100945810_1_30:notes" draw:style-name="gr2" draw:layer="layout" svg:width="12.699cm" svg:height="9.524cm" svg:x="3.176cm" svg:y="1.905cm" draw:page-number="7" presentation:class="page"/>
          <draw:frame draw:name="Google Shape;128;g1e100945810_1_3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r regexes" draw:style-name="dp1" draw:master-page-name="OBJECT" presentation:presentation-page-layout-name="AL1T11">
        <draw:frame draw:name="Google Shape;136;p20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Compilar regexes</text:span></text:p>
          </draw:text-box>
        </draw:frame>
        <draw:frame draw:name="Google Shape;137;p20" presentation:style-name="pr4" draw:text-style-name="P5" draw:layer="layout" svg:width="22.859cm" svg:height="6.459cm" svg:x="1.27cm" svg:y="4.445cm" presentation:class="outline" presentation:user-transformed="true">
          <draw:text-box>
            <text:list text:style-name="L8">
              <text:list-item>
                <text:p text:style-name="P8"><text:span text:style-name="T5">É possível compilar expressões regulares em casos que serão utilizadas mais de uma vez. Isso garante uma execução mais rápida.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Objeto retornado da compilação possui mesmos métodos do módulo </text:span><text:span text:style-name="T20">re</text:span><text:span text:style-name="T10">. Podemos fazer buscas, divisões, etc. de texto usando regexes compiladas.</text:span></text:p>
                  </text:list-item>
                </text:list>
              </text:list-item>
            </text:list>
          </draw:text-box>
        </draw:frame>
        <draw:frame draw:name="Google Shape;138;p20" draw:style-name="gr3" draw:text-style-name="P12" draw:layer="layout" svg:width="10.344cm" svg:height="8.463cm" svg:x="14.342cm" svg:y="9.407cm">
          <draw:image xlink:href="Pictures/100002010000014A0000010E3F260D0DD02BB51F.png" xlink:type="simple" xlink:show="embed" xlink:actuate="onLoad">
            <text:p/>
          </draw:image>
        </draw:frame>
        <presentation:notes draw:style-name="dp2">
          <draw:page-thumbnail draw:name="Google Shape;133;g1e130215ed4_0_25:notes" draw:style-name="gr2" draw:layer="layout" svg:width="12.699cm" svg:height="9.524cm" svg:x="3.176cm" svg:y="1.905cm" draw:page-number="8" presentation:class="page"/>
          <draw:frame draw:name="Google Shape;134;g1e130215ed4_0_2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gs (sinalizadores)" draw:style-name="dp1" draw:master-page-name="OBJECT" presentation:presentation-page-layout-name="AL1T11">
        <draw:frame draw:name="Google Shape;143;p21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Flags (sinalizadores)</text:span></text:p>
          </draw:text-box>
        </draw:frame>
        <draw:frame draw:name="Google Shape;144;p21" presentation:style-name="pr4" draw:text-style-name="P5" draw:layer="layout" svg:width="22.859cm" svg:height="14.347cm" svg:x="1.27cm" svg:y="4.445cm" presentation:class="outline" presentation:user-transformed="true">
          <draw:text-box>
            <text:list text:style-name="L8">
              <text:list-item>
                <text:p text:style-name="P8"><text:span text:style-name="T5">Permitem ignorar diferenças entre caracteres maiúsculos e minúsculos. Exemplos:</text:span></text:p>
              </text:list-item>
            </text:list>
            <text:p text:style-name="P13"><text:span text:style-name="T5">if re.search(r”(?i)^py”, “Python”):</text:span></text:p>
            <text:p text:style-name="P16"><text:span text:style-name="T5">print (“Casou”)</text:span></text:p>
            <text:p text:style-name="P14"><text:span text:style-name="T5"/></text:p>
            <text:p text:style-name="P13"><text:span text:style-name="T5">if re.search(r”^py”, “Python”, re.IGNORECASE):</text:span></text:p>
            <text:p text:style-name="P16"><text:span text:style-name="T5">print (“Casou”)</text:span></text:p>
            <text:p text:style-name="P11"><text:span text:style-name="T5"/></text:p>
            <text:list text:continue-numbering="true" text:style-name="L8">
              <text:list-item>
                <text:p text:style-name="P11"><text:span text:style-name="T5">Também permite resolver problemas de acentuação, que não são suportados por classes POSIX no Python: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0">\w permite caracteres acentuados, mas depende de configurações do SO (?L), versão do python e codificação do texto original (?u para UNICODE).</text:span></text:p>
                  </text:list-item>
                </text:list>
              </text:list-item>
            </text:list>
          </draw:text-box>
        </draw:frame>
        <draw:custom-shape draw:name="Google Shape;145;p21" draw:style-name="gr4" draw:text-style-name="P6" xml:id="id1" draw:id="id1" draw:layer="layout" svg:width="3.229cm" svg:height="2.795cm" svg:x="20.9cm" svg:y="10.167cm">
          <text:p text:style-name="P1"><text:span text:style-name="T21">Método exclusivo do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1" draw:style-name="gr5" draw:text-style-name="P17" xml:id="id2" draw:id="id2" draw:layer="layout" svg:width="4.147cm" svg:height="1.541cm" svg:x="18.204cm" svg:y="8.626cm">
          <text:p text:style-name="P9"><text:span text:style-name="T9"/></text:p>
          <draw:enhanced-geometry draw:mirror-horizontal="tru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0;g1e114eb23d3_0_0:notes" draw:style-name="gr2" draw:layer="layout" svg:width="12.699cm" svg:height="9.524cm" svg:x="3.176cm" svg:y="1.905cm" draw:page-number="9" presentation:class="page"/>
          <draw:frame draw:name="Google Shape;141;g1e114eb23d3_0_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gs (sinalizadores)" draw:style-name="dp1" draw:master-page-name="OBJECT" presentation:presentation-page-layout-name="AL1T11">
        <draw:frame draw:name="Google Shape;151;p22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Flags (sinalizadores)</text:span></text:p>
          </draw:text-box>
        </draw:frame>
        <draw:frame draw:name="Google Shape;152;p22" presentation:style-name="pr4" draw:text-style-name="P5" draw:layer="layout" svg:width="23.542cm" svg:height="15.192cm" svg:x="1.27cm" svg:y="4.445cm" presentation:class="outline" presentation:user-transformed="true">
          <draw:text-box>
            <text:list text:style-name="L8">
              <text:list-item>
                <text:p text:style-name="P8"><text:span text:style-name="T5">Possibilita lidar com strings de múltiplas linhas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(?s) permite combinar um caractere . com um \n. Assim, o caractere curinga “.*” vai combinar com toda a string mesmo se ela estiver em mais de uma linha;</text:span></text:p>
                  </text:list-item>
                  <text:list-item>
                    <text:p text:style-name="P10"><text:span text:style-name="T10">(?m) permite fazer as âncoras ^ e $ casar linhas específicas da string.</text:span></text:p>
                  </text:list-item>
                  <text:list-item>
                    <text:p text:style-name="P10"><text:span text:style-name="T10">Exemplo: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0"><text:span text:style-name="T7">print(re.sub(r”(?m)^2” , “.”, “1\n2\n3”))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10"><text:span text:style-name="T10">Saída: 1 . 3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16">
              <text:list-item>
                <text:p text:style-name="P11"><text:span text:style-name="T5">(?xm) no início de uma regex permite organizá-la em várias linhas:</text:span></text:p>
              </text:list-item>
            </text:list>
            <text:p text:style-name="P13"><text:span text:style-name="T7">regex = r"""(?xm)</text:span></text:p>
            <text:p text:style-name="P13"><text:span text:style-name="T7"><text:tab/></text:span><text:span text:style-name="T7"><text:tab/></text:span><text:span text:style-name="T7"><text:tab/></text:span><text:span text:style-name="T7">(?i)^py</text:span></text:p>
            <text:p text:style-name="P13"><text:span text:style-name="T7"><text:tab/></text:span><text:span text:style-name="T7"><text:tab/></text:span><text:span text:style-name="T7"><text:tab/></text:span><text:span text:style-name="T7">thon</text:span></text:p>
            <text:p text:style-name="P13"><text:span text:style-name="T7"><text:tab/></text:span><text:span text:style-name="T7"><text:tab/></text:span><text:span text:style-name="T7">"""</text:span></text:p>
          </draw:text-box>
        </draw:frame>
        <presentation:notes draw:style-name="dp2">
          <draw:page-thumbnail draw:name="Google Shape;148;g1e114eb23d3_0_6:notes" draw:style-name="gr2" draw:layer="layout" svg:width="12.699cm" svg:height="9.524cm" svg:x="3.176cm" svg:y="1.905cm" draw:page-number="10" presentation:class="page"/>
          <draw:frame draw:name="Google Shape;149;g1e114eb23d3_0_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pos nomeados" draw:style-name="dp1" draw:master-page-name="OBJECT" presentation:presentation-page-layout-name="AL1T11">
        <draw:frame draw:name="Google Shape;157;p23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Grupos nomeados</text:span></text:p>
          </draw:text-box>
        </draw:frame>
        <draw:frame draw:name="Google Shape;158;p23" presentation:style-name="pr4" draw:text-style-name="P5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8"><text:span text:style-name="T5">Identificar grupos pode ser útil quando trabalhamos com regexes grandes e/ou complexas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Usamos números ou nomes para diferenciar grupos de uma regex. Sintaxe: (?P&lt;nome&gt;...)</text:span></text:p>
                  </text:list-item>
                  <text:list-item>
                    <text:p text:style-name="P10"><text:span text:style-name="T10">Exemplo: regex simples para data no formato brasileiro r”(..)/(..)/(....)”:</text:span></text:p>
                  </text:list-item>
                  <text:list-item>
                    <text:p text:style-name="P10"><text:span text:style-name="T10">Com grupos nomeados fica: r”(?P&lt;dia&gt;..)/(?P&lt;mes&gt;..)/(?P&lt;ano&gt;....)”.</text:span></text:p>
                  </text:list-item>
                </text:list>
              </text:list-item>
            </text:list>
            <text:p text:style-name="P11"><text:span text:style-name="T5"/></text:p>
            <text:list text:style-name="L18">
              <text:list-item>
                <text:p text:style-name="P11"><text:span text:style-name="T22">Atenção: identificadores são usados apenas para nomear GRUPOS ()!</text:span></text:p>
              </text:list-item>
            </text:list>
          </draw:text-box>
        </draw:frame>
        <presentation:notes draw:style-name="dp2">
          <draw:page-thumbnail draw:name="Google Shape;154;g1e130215ed4_0_0:notes" draw:style-name="gr2" draw:layer="layout" svg:width="12.699cm" svg:height="9.524cm" svg:x="3.176cm" svg:y="1.905cm" draw:page-number="11" presentation:class="page"/>
          <draw:frame draw:name="Google Shape;155;g1e130215ed4_0_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rovisores em grupos nomeados" draw:style-name="dp1" draw:master-page-name="OBJECT" presentation:presentation-page-layout-name="AL1T11">
        <draw:frame draw:name="Google Shape;163;p24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Retrovisores em grupos nomeados</text:span></text:p>
          </draw:text-box>
        </draw:frame>
        <draw:frame draw:name="Google Shape;164;p24" presentation:style-name="pr4" draw:text-style-name="P5" draw:layer="layout" svg:width="23.395cm" svg:height="7.924cm" svg:x="1.27cm" svg:y="4.445cm" presentation:class="outline" presentation:user-transformed="true">
          <draw:text-box>
            <text:list text:style-name="L8">
              <text:list-item>
                <text:p text:style-name="P8"><text:span text:style-name="T5">Retrovisores em grupos normais são identificados por \1;</text:span></text:p>
              </text:list-item>
              <text:list-item>
                <text:p text:style-name="P10"><text:span text:style-name="T5">Retrovisores em grupos nomeados possuem sintaxe diferente para a regex e para funções específicas, como re.sub(). 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Sintaxe na regex: (?P&lt;nome&gt;)</text:span></text:p>
                  </text:list-item>
                  <text:list-item>
                    <text:p text:style-name="P10"><text:span text:style-name="T10">Sintaxe no parâmetro a ser substituído da função re.sub(): \g&lt;nome&gt;</text:span></text:p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9">
              <text:list-item>
                <text:p text:style-name="P11"><text:span text:style-name="T5">Exemplo: converter data de DD/MM/AAAA para AAAA-MM-DD</text:span></text:p>
              </text:list-item>
            </text:list>
          </draw:text-box>
        </draw:frame>
        <draw:custom-shape draw:name="Google Shape;165;p24" draw:style-name="gr4" draw:text-style-name="P6" draw:layer="layout" svg:width="20.664cm" svg:height="6.605cm" svg:x="3.389cm" svg:y="11.611cm">
          <text:p text:style-name="P9"><text:span text:style-name="T15">data = '31/12/1999'</text:span></text:p>
          <text:p text:style-name="P9"><text:span text:style-name="T15"># Substituição usando grupos normais</text:span></text:p>
          <text:p text:style-name="P9"><text:span text:style-name="T15">print (re.sub( r'(..)/(..)/(....)', </text:span><text:span text:style-name="T16">r'\3-\2-\1',</text:span><text:span text:style-name="T15"> data))</text:span></text:p>
          <text:p text:style-name="P9"><text:span text:style-name="T15"/></text:p>
          <text:p text:style-name="P9"><text:span text:style-name="T15"># Substituição usando grupos nomeados</text:span></text:p>
          <text:p text:style-name="P9"><text:span text:style-name="T15">print (re.sub(r'(?P&lt;dia&gt;..)/(?P&lt;mes&gt;..)/(?P&lt;ano&gt;....)',</text:span></text:p>
          <text:p text:style-name="P18"><text:span text:style-name="T16">r'\g&lt;ano&gt;-\g&lt;mes&gt;-\g&lt;dia&gt;',</text:span></text:p>
          <text:p text:style-name="P18"><text:span text:style-name="T15">data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1e130215ed4_0_5:notes" draw:style-name="gr2" draw:layer="layout" svg:width="12.699cm" svg:height="9.524cm" svg:x="3.176cm" svg:y="1.905cm" draw:page-number="12" presentation:class="page"/>
          <draw:frame draw:name="Google Shape;161;g1e130215ed4_0_5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groups VS groupdict" draw:style-name="dp1" draw:master-page-name="OBJECT" presentation:presentation-page-layout-name="AL1T11">
        <draw:frame draw:name="Google Shape;170;p25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Método groups VS groupdict</text:span></text:p>
          </draw:text-box>
        </draw:frame>
        <draw:frame draw:name="Google Shape;171;p25" presentation:style-name="pr4" draw:text-style-name="P5" draw:layer="layout" svg:width="22.859cm" svg:height="6.602cm" svg:x="1.27cm" svg:y="4.445cm" presentation:class="outline" presentation:user-transformed="true">
          <draw:text-box>
            <text:list text:style-name="L8">
              <text:list-item>
                <text:p text:style-name="P8"><text:span text:style-name="T5">Método </text:span><text:span text:style-name="T6">groups()</text:span><text:span text:style-name="T5"> retorna uma tupla com todos os grupos, como visto anteriormente;</text:span></text:p>
              </text:list-item>
              <text:list-item>
                <text:p text:style-name="P10"><text:span text:style-name="T5">Método </text:span><text:span text:style-name="T6">groupdict()</text:span><text:span text:style-name="T5"> retorna um dicionário apenas com os grupos nomeados, onde a chave é o identificador do grupo e o valor é o conteúdo.</text:span></text:p>
              </text:list-item>
              <text:list-item>
                <text:p text:style-name="P10"><text:span text:style-name="T5">Exemplo:</text:span></text:p>
              </text:list-item>
            </text:list>
          </draw:text-box>
        </draw:frame>
        <draw:custom-shape draw:name="Google Shape;172;p25" draw:style-name="gr4" draw:text-style-name="P6" draw:layer="layout" svg:width="22.859cm" svg:height="3.557cm" svg:x="1.505cm" svg:y="10.791cm">
          <text:p text:style-name="P9"><text:span text:style-name="T15">m = re.search(r'(?P&lt;dia&gt;..)/(?P&lt;mes&gt;..)/(....)', '31/12/1999')</text:span></text:p>
          <text:p text:style-name="P9"><text:span text:style-name="T15">if m:</text:span></text:p>
          <text:p text:style-name="P18"><text:span text:style-name="T15">print (m.groups()) </text:span><text:span text:style-name="T23"># ('31', '12', '1999')</text:span></text:p>
          <text:p text:style-name="P18"><text:span text:style-name="T15">print (m.groupdict()) </text:span><text:span text:style-name="T23"># {'dia': '31', 'mes': '12'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5" draw:style-name="gr4" draw:text-style-name="P6" draw:layer="layout" svg:width="19.816cm" svg:height="1.567cm" svg:x="2.518cm" svg:y="16.587cm">
          <text:p text:style-name="P1"><text:span text:style-name="T24">(Muito) Mais sobre regex em python </text:span><text:span text:style-name="T25"><text:a xlink:href="https://aurelio.net/regex/python/" xlink:type="simple">aqui</text:a></text:span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1e130215ed4_0_12:notes" draw:style-name="gr2" draw:layer="layout" svg:width="12.699cm" svg:height="9.524cm" svg:x="3.176cm" svg:y="1.905cm" draw:page-number="13" presentation:class="page"/>
          <draw:frame draw:name="Google Shape;168;g1e130215ed4_0_1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ícios" draw:style-name="dp1" draw:master-page-name="OBJECT" presentation:presentation-page-layout-name="AL1T11">
        <draw:frame draw:name="Google Shape;178;p26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4">Exercícios</text:span></text:p>
          </draw:text-box>
        </draw:frame>
        <draw:frame draw:name="Google Shape;179;p26" presentation:style-name="pr4" draw:text-style-name="P5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8"><text:span text:style-name="T5">Adaptar exercícios da aula anterior, aplicando os conceitos vistos até aqui.</text:span></text:p>
              </text:list-item>
            </text:list>
          </draw:text-box>
        </draw:frame>
        <presentation:notes draw:style-name="dp2">
          <draw:page-thumbnail draw:name="Google Shape;175;g1e130215ed4_0_20:notes" draw:style-name="gr2" draw:layer="layout" svg:width="12.699cm" svg:height="9.524cm" svg:x="3.176cm" svg:y="1.905cm" draw:page-number="14" presentation:class="page"/>
          <draw:frame draw:name="Google Shape;176;g1e130215ed4_0_2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2;p2" presentation:style-name="OBJECT-title" draw:layer="backgroundobjects" svg:width="22.859cm" svg:height="3.175cm" svg:x="1.27cm" svg:y="0.763cm" presentation:class="title" presentation:placeholder="true" presentation:user-transformed="true">
        <draw:text-box/>
      </draw:frame>
      <draw:frame draw:name="Google Shape;13;p2" presentation:style-name="OBJECT-outline1" draw:layer="backgroundobjects" svg:width="22.859cm" svg:height="12.572cm" svg:x="1.27cm" svg:y="4.445cm" presentation:class="outline" presentation:placeholder="true" presentation:user-transformed="true">
        <draw:text-box/>
      </draw:frame>
      <draw:frame draw:name="Google Shape;14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7;p2" draw:style-name="Mgr3" draw:text-style-name="MP7" draw:layer="backgroundobjects" svg:width="22.1cm" svg:height="0.001cm" svg:x="0cm" svg:y="4.32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2" draw:style-name="Mgr4" draw:text-style-name="MP7" draw:layer="backgroundobjects" svg:width="4.827cm" svg:height="3.535cm" svg:x="20.051cm" svg:y="0.521cm">
        <draw:image xlink:href="Pictures/10000201000001DA0000015B5D9DBE45C88A5E6E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