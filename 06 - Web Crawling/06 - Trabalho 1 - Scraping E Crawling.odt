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margin-top="0in" fo:margin-bottom="0.1665in" loext:contextual-spacing="false" fo:line-height="100%" fo:text-align="justify" style:justify-single-word="false" fo:orphans="0" fo:widows="0" style:page-number="1"/>
    </style:style>
    <style:style style:name="P4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.1945in" fo:margin-bottom="0.139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.0665in" fo:margin-bottom="0in" loext:contextual-spacing="false" fo:line-height="100%" fo:text-align="justify" style:justify-single-word="false" fo:orphans="0" fo:widows="0" fo:text-indent="0in" style:auto-text-indent="false"/>
    </style:style>
    <style:style style:name="P7" style:family="paragraph" style:parent-style-name="Standard">
      <style:paragraph-properties fo:margin-top="0.1665in" fo:margin-bottom="0.1665in" loext:contextual-spacing="false" fo:line-height="100%" fo:text-align="justify" style:justify-single-word="false" fo:orphans="0" fo:widows="0"/>
    </style:style>
    <style:style style:name="P8" style:family="paragraph" style:parent-style-name="Standard">
      <style:paragraph-properties fo:margin-left="0.5in" fo:margin-right="0in" fo:margin-top="0.0665in" fo:margin-bottom="0in" loext:contextual-spacing="false" fo:line-height="100%" fo:text-align="justify" style:justify-single-word="false" fo:orphans="0" fo:widows="0" fo:text-indent="0in" style:auto-text-indent="false"/>
    </style:style>
    <style:style style:name="P9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 objetivo desta atividade é aplicar técnicas de </text:span><text:span text:style-name="T2">Web Scraping</text:span><text:span text:style-name="T1"> e </text:span><text:span text:style-name="T2">Crawling</text:span><text:span text:style-name="T1"> para coletar, estruturar e armazenar dados provenientes de um ambiente web controlado. O aluno deverá demonstrar competência em navegação nas estruturas das páginas, tratamento de strings e conformidade com as diretrizes de acesso ao servidor para navegação automatizada.</text:span></text:p>
      <text:p text:style-name="P4"><text:span text:style-name="T1">Você deve realizar o levantamento de dados de um portal fictício. O sistema é composto por uma página principal que serve de início para o crawling, um catálogo de produtos com múltiplas páginas, um portal de notícias, uma página de informações institucionais e um link para uma área de gestão de usuários.</text:span></text:p>
      <text:p text:style-name="P7"><text:span text:style-name="T2">URL Base:</text:span><text:span text:style-name="T1"> https://disciplinas.politecnico.ufsm.br/~dpadp0291/</text:span></text:p>
      <text:p text:style-name="P4"><text:span text:style-name="T1">O script deve iniciar pela página index.html, identificar os links disponíveis e planejar a navegação entre as demais seções do site de forma automatizada, observando as diretrizes e restrições de acesso definidas pelo servidor. Para cada página acessada dentro dessas condições deve-se extrair os dados textuais disponíveis.</text:span></text:p>
      <text:p text:style-name="P5"><text:span text:style-name="T1">Todos os dados coletados devem ser exportados para um arquivo .txt ou .csv. Veja, no moodle, uma sugestão de estrutura de código para isso.</text:span></text:p>
      <text:p text:style-name="P6"><text:span text:style-name="T2">Observação</text:span><text:span text:style-name="T1">: casos omissos devem ser tratados pelo desenvolvedor, explicados através de comentários no código e fazem parte da avaliaçã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Calibri" style:font-name-asian="Calibri1" style:font-name-complex="Calibri1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MT1" style:family="text">
      <style:text-properties style:font-name="Calibri" style:font-name-asian="Calibri1" style:font-name-complex="Calibri1"/>
    </style:style>
    <style:style style:name="M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29in" fo:margin-bottom="0.5in" fo:margin-left="1in" fo:margin-right="1in" style:writing-mode="lr-tb" style:layout-grid-color="#c0c0c0" style:layout-grid-lines="227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7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Nome: _________________________________________________________ Data: 23/04/2026</text:span></text:p>
        <text:p text:style-name="MP2"><text:span text:style-name="MT2">Prova 1</text:span></text:p>
      </style:header>
      <style:header-left>
        <text:p text:style-name="Standard"><text:span text:style-name="MT1">Nome: _________________________________________________________ Data: 23/04/2026</text:span></text:p>
        <text:p text:style-name="MP2"><text:span text:style-name="MT2">Prova 1</text:span></text:p>
      </style:header-left>
      <style:footer>
        <text:p text:style-name="Footer"/>
      </style:footer>
      <style:footer-left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MP1"/>
        <text:p text:style-name="MP3"><text:span text:style-name="MT2">Trabalho sobre scraping e crawling - peso 2,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5" meta:word-count="233" meta:character-count="1660" meta:non-whitespace-character-count="1442"/>
    <meta:generator>LibreOfficeDev/6.0.5.2$Linux_X86_64 LibreOffice_project/</meta:generator>
  </office:meta>
</office:document-meta>
</file>