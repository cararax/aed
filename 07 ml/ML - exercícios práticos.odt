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2.1542in" fo:margin-left="1.5333in" fo:margin-top="0in" fo:margin-bottom="0in" table:align="left"/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1.6563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8958in"/>
    </style:style>
    <style:style style:name="Table2.E" style:family="table-column">
      <style:table-column-properties style:column-width="0.8965in"/>
    </style:style>
    <style:style style:name="Table2.G" style:family="table-column">
      <style:table-column-properties style:column-width="0.89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paragraph-properties fo:margin-left="0in" fo:margin-right="0in" fo:margin-top="0in" fo:margin-bottom="0.0555in" loext:contextual-spacing="false" fo:line-height="100%" fo:text-align="justify" style:justify-single-word="false" fo:keep-together="auto" fo:text-indent="0in" style:auto-text-indent="fals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.0555in" loext:contextual-spacing="false" fo:line-height="100%" fo:text-align="justify" style:justify-single-word="false" fo:keep-together="auto" fo:text-indent="0in" style:auto-text-indent="false" style:page-number="1" fo:keep-with-next="auto"/>
    </style:style>
    <style:style style:name="P4" style:family="paragraph" style:parent-style-name="Standard">
      <style:paragraph-properties fo:margin-top="0in" fo:margin-bottom="0.0555in" loext:contextual-spacing="false" fo:line-height="100%" fo:text-align="justify" style:justify-single-word="false" fo:keep-together="auto" fo:keep-with-next="auto"/>
    </style:style>
    <style:style style:name="P5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Calibri" fo:font-weight="bold" style:font-name-asian="Calibri1" style:font-weight-asian="bold" style:font-name-complex="Calibri1" style:font-weight-complex="bold"/>
    </style:style>
    <style:style style:name="P7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8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8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9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keep-together="auto" fo:text-indent="-0.25in" style:auto-text-indent="false" fo:keep-with-next="auto"/>
    </style:style>
    <style:style style:name="P4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justify" style:justify-single-word="false" fo:keep-together="auto" fo:text-indent="-0.25in" style:auto-text-indent="false" fo:keep-with-next="auto"/>
    </style:style>
    <style:style style:name="P42" style:family="paragraph" style:parent-style-name="Standard" style:list-style-name="WWNum1">
      <style:paragraph-properties fo:margin-left="0.5in" fo:margin-right="0in" fo:margin-top="0in" fo:margin-bottom="0.0555in" loext:contextual-spacing="false" fo:line-height="100%" fo:text-align="justify" style:justify-single-word="false" fo:keep-together="auto" fo:text-indent="-0.25in" style:auto-text-indent="false" fo:keep-with-next="auto"/>
    </style:style>
    <style:style style:name="P43" style:family="paragraph" style:parent-style-name="Standard">
      <style:paragraph-properties fo:margin-left="0in" fo:margin-right="0in" fo:margin-top="0.139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Calibri" style:font-name-asian="Calibri1" style:font-name-complex="Calibri1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47" style:family="paragraph" style:parent-style-name="Standard" style:list-style-name="WWNum11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 fo:keep-together="auto" fo:keep-with-next="auto"/>
    </style:style>
    <style:style style:name="P49" style:family="paragraph" style:parent-style-name="Standard">
      <style:paragraph-properties fo:margin-left="-0.0102in" fo:margin-right="0in" fo:text-align="justify" style:justify-single-word="false" fo:text-indent="0in" style:auto-text-indent="false"/>
    </style:style>
    <style:style style:name="P50" style:family="paragraph" style:parent-style-name="Standard">
      <style:paragraph-properties fo:margin-left="-0.0102in" fo:margin-right="0in" fo:text-align="justify" style:justify-single-word="false" fo:text-indent="0in" style:auto-text-indent="false"/>
      <style:text-properties style:font-name="Calibri" style:font-name-asian="Calibri1" style:font-name-complex="Calibri1"/>
    </style:style>
    <style:style style:name="P51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P52" style:family="paragraph" style:parent-style-name="Standard">
      <style:paragraph-properties fo:margin-top="0.139in" fo:margin-bottom="0in" loext:contextual-spacing="false" fo:line-height="100%" fo:text-align="justify" style:justify-single-word="false"/>
    </style:style>
    <style:style style:name="T1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style:text-underline-style="none" style:font-name-asian="Calibri1" style:font-name-complex="Calibri1"/>
    </style:style>
    <style:style style:name="T4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ercício 1: aprendizado não supervisionado com clusterização.</text:span></text:p>
      <text:p text:style-name="P2"><text:span text:style-name="T1">Objetivo</text:span><text:span text:style-name="T2">: Neste exercício, você utilizará o algoritmo </text:span><text:span text:style-name="T1">K-Means</text:span><text:span text:style-name="T2"> para identificar grupos de usuários com comportamentos semelhantes em uma plataforma de streaming. O objetivo é aplicar os conceitos estudados em aula sobre </text:span><text:span text:style-name="T1">aprendizado não supervisionado</text:span><text:span text:style-name="T2"> e </text:span><text:span text:style-name="T1">clusterização</text:span><text:span text:style-name="T2">, além de interpretar os resultados obtidos.</text:span></text:p>
      <text:p text:style-name="P4"><text:span text:style-name="T1">Contextualização</text:span><text:span text:style-name="T2">: Uma plataforma de streaming deseja compreender melhor o comportamento de seus usuários para oferecer recomendações mais personalizadas. Foi disponibilizado um conjunto de dados contendo informações sobre o uso da plataforma por diferentes usuários.</text:span></text:p>
      <text:p text:style-name="P5"><text:span text:style-name="T2">Cada registro possui os seguintes atributos:</text:span></text:p>
      <text:list xml:id="list808282983" text:style-name="WWNum15">
        <text:list-item>
          <text:p text:style-name="P7"><text:span text:style-name="T1">horas_semana:</text:span><text:span text:style-name="T2"> quantidade média de horas assistidas por semana;</text:span></text:p>
        </text:list-item>
        <text:list-item>
          <text:p text:style-name="P8"><text:span text:style-name="T1">dias_acesso_mes:</text:span><text:span text:style-name="T2"> quantidade de dias em que o usuário acessou a plataforma durante o mês.</text:span></text:p>
        </text:list-item>
      </text:list>
      <text:p text:style-name="P5"><text:span text:style-name="T2">A empresa acredita que existem diferentes perfis de usuários, mas não sabe exatamente quantos. Seu trabalho será utilizar </text:span><text:span text:style-name="T1">clusterização com K-Means</text:span><text:span text:style-name="T2"> para identificar possíveis grupos de usuários.</text:span></text:p>
      <text:p text:style-name="P4"><text:span text:style-name="T2">Utilize o arquivo disponibilizado pelo professor: </text:span><text:a xlink:type="simple" xlink:href="https://docs.google.com/spreadsheets/d/1ILrT3RHagkpSgDB8eW3oZEUkcmGYJWsTuHn2dMv0toE/edit?usp=sharing" text:style-name="ListLabel_20_136" text:visited-style-name="ListLabel_20_136"><text:span text:style-name="T4">Exercicio-custering-usuarios-site.csv</text:span></text:a></text:p>
      <text:p text:style-name="P43"><text:span text:style-name="T2">Parte 1 – Explorando os Dados:</text:span></text:p>
      <text:list xml:id="list3864090933" text:style-name="WWNum4">
        <text:list-item>
          <text:p text:style-name="P21"><text:span text:style-name="T2">Carregue o arquivo CSV utilizando a biblioteca Pandas;</text:span></text:p>
        </text:list-item>
        <text:list-item>
          <text:p text:style-name="P21"><text:span text:style-name="T2">Exiba as cinco primeiras linhas do conjunto de dados;</text:span></text:p>
        </text:list-item>
        <text:list-item>
          <text:p text:style-name="P9"><text:span text:style-name="T2">Informe a quantidade total de registros existentes.</text:span></text:p>
        </text:list-item>
      </text:list>
      <text:p text:style-name="P43"><text:span text:style-name="T2">Parte 2 – Visualização dos Dados:</text:span></text:p>
      <text:list xml:id="list1717395295" text:style-name="WWNum5">
        <text:list-item>
          <text:p text:style-name="P23"><text:span text:style-name="T2">Crie um gráfico de dispersão utilizando:</text:span></text:p>
          <text:list>
            <text:list-item>
              <text:p text:style-name="P46"><text:span text:style-name="T2">Eixo X: horas_semana;</text:span></text:p>
            </text:list-item>
            <text:list-item>
              <text:p text:style-name="P46"><text:span text:style-name="T2">Eixo Y: dias_acesso_mes.</text:span></text:p>
            </text:list-item>
          </text:list>
        </text:list-item>
        <text:list-item>
          <text:p text:style-name="P10"><text:span text:style-name="T2">Observe o gráfico gerado e responda:</text:span></text:p>
        </text:list-item>
      </text:list>
      <text:p text:style-name="P5"><text:span text:style-name="T1">Quantos grupos parecem existir visualmente nos dados?</text:span></text:p>
      <text:p text:style-name="P43"><text:span text:style-name="T2">Parte 3 – Aplicando o Algoritmo K-Means:</text:span></text:p>
      <text:list xml:id="list1992150627" text:style-name="WWNum7">
        <text:list-item>
          <text:p text:style-name="P24"><text:span text:style-name="T2">Utilize o algoritmo K-Means com: n_clusters = 4;</text:span></text:p>
        </text:list-item>
        <text:list-item>
          <text:p text:style-name="P24"><text:span text:style-name="T2">Execute o treinamento do modelo;</text:span></text:p>
        </text:list-item>
        <text:list-item>
          <text:p text:style-name="P24"><text:span text:style-name="T2">Crie uma nova coluna chamada </text:span><text:span text:style-name="T1">grupo</text:span><text:span text:style-name="T2"> contendo o cluster atribuído a cada usuário;</text:span></text:p>
        </text:list-item>
        <text:list-item>
          <text:p text:style-name="P11"><text:span text:style-name="T2">Exiba as primeiras linhas do DataFrame atualizado.</text:span></text:p>
        </text:list-item>
      </text:list>
      <text:p text:style-name="P43"><text:span text:style-name="T2">Parte 4 – Avaliação da Clusterização:</text:span></text:p>
      <text:list xml:id="list4069084993" text:style-name="WWNum12">
        <text:list-item>
          <text:p text:style-name="P26"><text:span text:style-name="T2">Calcule o </text:span><text:span text:style-name="T1">Silhouette Score</text:span><text:span text:style-name="T2"> da clusterização obtida;</text:span></text:p>
        </text:list-item>
        <text:list-item>
          <text:p text:style-name="P12"><text:soft-page-break/><text:span text:style-name="T2">Apresente o valor encontrado.</text:span></text:p>
        </text:list-item>
      </text:list>
      <text:p text:style-name="P43"><text:span text:style-name="T2">Parte 5 – Visualização dos Clusters:</text:span></text:p>
      <text:list xml:id="list4748745" text:style-name="WWNum11">
        <text:list-item>
          <text:p text:style-name="P27"><text:span text:style-name="T2">Crie um gráfico de dispersão contendo:</text:span></text:p>
          <text:list>
            <text:list-item>
              <text:p text:style-name="P47"><text:span text:style-name="T2">os usuários coloridos conforme o grupo encontrado;</text:span></text:p>
            </text:list-item>
            <text:list-item>
              <text:p text:style-name="P47"><text:span text:style-name="T2">os centróides identificados pelo algoritmo.</text:span></text:p>
            </text:list-item>
          </text:list>
        </text:list-item>
        <text:list-item>
          <text:p text:style-name="P13"><text:span text:style-name="T2">Observe o resultado gerado.</text:span></text:p>
        </text:list-item>
      </text:list>
      <text:p text:style-name="P48"><text:span text:style-name="T1">Questões de Interpretação analítica.</text:span></text:p>
      <text:list xml:id="list218097378" text:style-name="WWNum1">
        <text:list-item>
          <text:p text:style-name="P40"><text:span text:style-name="T2">O valor do Silhouette Score indica uma clusterização ruim, razoável ou boa? Justifique sua resposta.</text:span></text:p>
        </text:list-item>
        <text:list-item>
          <text:p text:style-name="P40"><text:span text:style-name="T2">Descreva os perfis de usuários encontrados nos grupos. Exemplo: "Grupo X: usuários com poucos acessos e poucas horas de utilização."</text:span></text:p>
        </text:list-item>
        <text:list-item>
          <text:p text:style-name="P42"><text:span text:style-name="T2">De que forma a empresa poderia utilizar os grupos encontrados para melhorar seus serviços ou campanhas de marketing?</text:span></text:p>
        </text:list-item>
      </text:list>
      <text:p text:style-name="P48"><text:span text:style-name="T1">Desafio adicional: </text:span></text:p>
      <text:list xml:id="list1370382517" text:style-name="WWNum9">
        <text:list-item>
          <text:p text:style-name="P41"><text:span text:style-name="T2">Repita a clusterização utilizando K = 3, K = 5;</text:span></text:p>
        </text:list-item>
        <text:list-item>
          <text:p text:style-name="P41"><text:span text:style-name="T2">Calcule o Silhouette Score para cada caso e preencha a tabela.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<text:span text:style-name="T1">K</text:span></text:p>
          </table:table-cell>
          <table:table-cell table:style-name="Table1.A1" office:value-type="string">
            <text:p text:style-name="P49"><text:span text:style-name="T1">Silhouette Score</text:span></text:p>
          </table:table-cell>
        </table:table-row>
        <table:table-row table:style-name="Table1.1">
          <table:table-cell table:style-name="Table1.A1" office:value-type="string">
            <text:p text:style-name="P49"><text:span text:style-name="T2">3</text:span></text:p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49"><text:span text:style-name="T2">4</text:span></text:p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49"><text:span text:style-name="T2">5</text:span></text:p>
          </table:table-cell>
          <table:table-cell table:style-name="Table1.A1" office:value-type="string">
            <text:p text:style-name="P50"/>
          </table:table-cell>
        </table:table-row>
      </table:table>
      <text:p text:style-name="P5"><text:span text:style-name="T2">Qual valor de K parece representar melhor os dados? Justifique sua resposta.</text:span></text:p>
      <text:p text:style-name="P6"/>
      <text:p text:style-name="P5"><text:span text:style-name="T1">Exercício 2: Aprendizado Supervisionado com Árvores de Decisão.</text:span></text:p>
      <text:p text:style-name="P5"><text:span text:style-name="T1">Objetivo</text:span><text:span text:style-name="T2">: Neste exercício, você utilizará um algoritmo de Aprendizado Supervisionado para construir um modelo capaz de prever se um usuário realizará ou não uma compra em uma loja virtual.</text:span></text:p>
      <text:p text:style-name="P5"><text:span text:style-name="T1">Contextualização</text:span><text:span text:style-name="T2">: Uma empresa de comércio eletrônico deseja compreender melhor o comportamento dos visitantes de seu site. Para isso, foi disponibilizado um conjunto de dados contendo informações sobre usuários que acessaram a plataforma. Cada registro possui os seguintes atributos: idade, paginas_visitadas, tempo_site, produtos_visualizados, carrinho (0 = vazio, 1 = com itens), compra (0 = não concluiu, 1 = concluiu). Este último será usado como classe. Seu objetivo é criar um modelo capaz de prever essa variável com base nos demais atributos.</text:span></text:p>
      <text:p text:style-name="P5"><text:span text:style-name="T2">Utilize o arquivo fornecido pelo professor: </text:span><text:a xlink:type="simple" xlink:href="https://docs.google.com/spreadsheets/d/1C4wV5Ycn6cyOcXJIfO18dUFJ1OANdowD1v43zcgu2_4/edit?usp=sharing" text:style-name="ListLabel_20_136" text:visited-style-name="ListLabel_20_136"><text:span text:style-name="T4">Exercicio-DT-clientes-ecommerce.csv</text:span></text:a></text:p>
      <text:p text:style-name="P51"><text:span text:style-name="T2">Parte 1 – Exploração dos Dados:</text:span></text:p>
      <text:list xml:id="list231405307" text:style-name="WWNum14">
        <text:list-item>
          <text:p text:style-name="P28"><text:span text:style-name="T2">Carregue o arquivo CSV utilizando a biblioteca Pandas.</text:span></text:p>
        </text:list-item>
        <text:list-item>
          <text:p text:style-name="P28"><text:span text:style-name="T2">Exiba as cinco primeiras linhas do conjunto de dados.</text:span></text:p>
        </text:list-item>
        <text:list-item>
          <text:p text:style-name="P14"><text:soft-page-break/><text:span text:style-name="T2">Informe a quantidade de registros e quantidade de atributos.</text:span></text:p>
        </text:list-item>
      </text:list>
      <text:p text:style-name="P52"><text:span text:style-name="T2">Parte 2 – Preparação dos Dados:</text:span></text:p>
      <text:list xml:id="list3829899474" text:style-name="WWNum8">
        <text:list-item>
          <text:p text:style-name="P29"><text:span text:style-name="T2">Defina as variáveis de entrada (X) utilizando os atributos: idade, paginas_visitadas, tempo_site, produtos_visualizados, carrinho.</text:span></text:p>
        </text:list-item>
        <text:list-item>
          <text:p text:style-name="P29"><text:span text:style-name="T2">Defina a variável alvo (y): compra</text:span></text:p>
        </text:list-item>
        <text:list-item>
          <text:p text:style-name="P15"><text:span text:style-name="T2">Divida os dados em conjuntos de treinamento e teste utilizando: 70% para treinamento; 30% para teste.</text:span></text:p>
        </text:list-item>
      </text:list>
      <text:p text:style-name="P43"><text:span text:style-name="T2">Parte 3 – Treinamento do Modelo:</text:span></text:p>
      <text:list xml:id="list4021226331" text:style-name="WWNum2">
        <text:list-item>
          <text:p text:style-name="P31"><text:span text:style-name="T2">Importe o algoritmo de Árvore de Decisão.</text:span></text:p>
        </text:list-item>
        <text:list-item>
          <text:p text:style-name="P31"><text:span text:style-name="T2">Crie o modelo.</text:span></text:p>
        </text:list-item>
        <text:list-item>
          <text:p text:style-name="P16"><text:span text:style-name="T2">Treine o modelo utilizando os dados de treinamento.</text:span></text:p>
        </text:list-item>
      </text:list>
      <text:p text:style-name="P43"><text:span text:style-name="T2">Parte 4 – Realizando Previsões:</text:span></text:p>
      <text:list xml:id="list346339092" text:style-name="WWNum10">
        <text:list-item>
          <text:p text:style-name="P33"><text:span text:style-name="T2">Utilize o modelo treinado para prever os dados do conjunto de teste.</text:span></text:p>
        </text:list-item>
        <text:list-item>
          <text:p text:style-name="P17"><text:span text:style-name="T2">Exiba as previsões obtidas.</text:span></text:p>
        </text:list-item>
      </text:list>
      <text:p text:style-name="P43"><text:span text:style-name="T2">Parte 5 – Avaliação do Modelo:</text:span></text:p>
      <text:list xml:id="list2159541368" text:style-name="WWNum6">
        <text:list-item>
          <text:p text:style-name="P34"><text:span text:style-name="T2">Calcule a acurácia do modelo.</text:span></text:p>
        </text:list-item>
        <text:list-item>
          <text:p text:style-name="P34"><text:span text:style-name="T2">Apresente o valor obtido.</text:span></text:p>
        </text:list-item>
        <text:list-item>
          <text:p text:style-name="P18"><text:span text:style-name="T2">Qual o valor da acurácia encontrada?</text:span></text:p>
        </text:list-item>
      </text:list>
      <text:p text:style-name="P43"><text:span text:style-name="T2">Parte 6 – Interpretação dos Resultados:</text:span></text:p>
      <text:list xml:id="list1934544991" text:style-name="WWNum3">
        <text:list-item>
          <text:p text:style-name="P36"><text:span text:style-name="T2">A acurácia obtida foi satisfatória? Justifique sua resposta.</text:span></text:p>
        </text:list-item>
        <text:list-item>
          <text:p text:style-name="P36"><text:span text:style-name="T2">Qual é a função da divisão entre conjunto de treinamento e conjunto de teste?</text:span></text:p>
        </text:list-item>
        <text:list-item>
          <text:p text:style-name="P36"><text:span text:style-name="T2">Explique, com suas palavras, como uma árvore de decisão realiza classificações.</text:span></text:p>
        </text:list-item>
        <text:list-item>
          <text:p text:style-name="P19"><text:span text:style-name="T2">Observando os atributos disponíveis, qual deles você acredita que possui maior influência na decisão de compra? Justifique sua resposta.</text:span></text:p>
        </text:list-item>
      </text:list>
      <text:p text:style-name="P43"><text:span text:style-name="T2">Parte 7: Implantação: Utilize o modelo treinado para prever o comportamento de novos usuários.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A"/>
        <table:table-column table:style-name="Table2.G"/>
        <table:table-row table:style-name="Table2.1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><text:span text:style-name="T2">idade</text:span></text:p>
          </table:table-cell>
          <table:table-cell table:style-name="Table2.A1" office:value-type="string">
            <text:p text:style-name="P45"><text:span text:style-name="T2">paginas visitadas</text:span></text:p>
          </table:table-cell>
          <table:table-cell table:style-name="Table2.A1" office:value-type="string">
            <text:p text:style-name="P45"><text:span text:style-name="T2">tempo no site</text:span></text:p>
          </table:table-cell>
          <table:table-cell table:style-name="Table2.A1" office:value-type="string">
            <text:p text:style-name="P45"><text:span text:style-name="T2">produtos visualizados</text:span></text:p>
          </table:table-cell>
          <table:table-cell table:style-name="Table2.A1" office:value-type="string">
            <text:p text:style-name="P45"><text:span text:style-name="T2">carrinho</text:span></text:p>
          </table:table-cell>
          <table:table-cell table:style-name="Table2.A1" office:value-type="string">
            <text:p text:style-name="P45"><text:span text:style-name="T2">Previsão de compra</text:span></text:p>
          </table:table-cell>
        </table:table-row>
        <table:table-row table:style-name="Table2.1">
          <table:table-cell table:style-name="Table2.A1" office:value-type="string">
            <text:p text:style-name="P45"><text:span text:style-name="T2">usuário A</text:span></text:p>
          </table:table-cell>
          <table:table-cell table:style-name="Table2.A1" office:value-type="string">
            <text:p text:style-name="P45"><text:span text:style-name="T2">31</text:span></text:p>
          </table:table-cell>
          <table:table-cell table:style-name="Table2.A1" office:value-type="string">
            <text:p text:style-name="P45"><text:span text:style-name="T2">12</text:span></text:p>
          </table:table-cell>
          <table:table-cell table:style-name="Table2.A1" office:value-type="string">
            <text:p text:style-name="P45"><text:span text:style-name="T2">10</text:span></text:p>
          </table:table-cell>
          <table:table-cell table:style-name="Table2.A1" office:value-type="string">
            <text:p text:style-name="P45"><text:span text:style-name="T2">8</text:span></text:p>
          </table:table-cell>
          <table:table-cell table:style-name="Table2.A1" office:value-type="string">
            <text:p text:style-name="P45"><text:span text:style-name="T2">1</text:span></text:p>
          </table:table-cell>
          <table:table-cell table:style-name="Table2.A1" office:value-type="string">
            <text:p text:style-name="P44"/>
          </table:table-cell>
        </table:table-row>
        <table:table-row table:style-name="Table2.1">
          <table:table-cell table:style-name="Table2.A1" office:value-type="string">
            <text:p text:style-name="P45"><text:span text:style-name="T2">usuário B</text:span></text:p>
          </table:table-cell>
          <table:table-cell table:style-name="Table2.A1" office:value-type="string">
            <text:p text:style-name="P45"><text:span text:style-name="T2">24</text:span></text:p>
          </table:table-cell>
          <table:table-cell table:style-name="Table2.A1" office:value-type="string">
            <text:p text:style-name="P45"><text:span text:style-name="T2">5</text:span></text:p>
          </table:table-cell>
          <table:table-cell table:style-name="Table2.A1" office:value-type="string">
            <text:p text:style-name="P45"><text:span text:style-name="T2">4</text:span></text:p>
          </table:table-cell>
          <table:table-cell table:style-name="Table2.A1" office:value-type="string">
            <text:p text:style-name="P45"><text:span text:style-name="T2">3</text:span></text:p>
          </table:table-cell>
          <table:table-cell table:style-name="Table2.A1" office:value-type="string">
            <text:p text:style-name="P45"><text:span text:style-name="T2">0</text:span></text:p>
          </table:table-cell>
          <table:table-cell table:style-name="Table2.A1" office:value-type="string">
            <text:p text:style-name="P44"/>
          </table:table-cell>
        </table:table-row>
      </table:table>
      <text:p text:style-name="P5"><text:span text:style-name="T2">Quais os resultados das previsões de comportamento dos usuários A e B?</text:span></text:p>
      <text:p text:style-name="P51"><text:soft-page-break/><text:span text:style-name="T1">Desafio adicional: </text:span><text:span text:style-name="T2">Visualize a árvore de decisão utilizando a função plot_tree() e responda:</text:span></text:p>
      <text:list xml:id="list1429845989" text:style-name="WWNum13">
        <text:list-item>
          <text:p text:style-name="P38"><text:span text:style-name="T2">Qual atributo aparece na raiz da árvore?</text:span></text:p>
        </text:list-item>
        <text:list-item>
          <text:p text:style-name="P38"><text:span text:style-name="T2">Esse atributo faz sentido para o problema estudado?</text:span></text:p>
        </text:list-item>
        <text:list-item>
          <text:p text:style-name="P20"><text:span text:style-name="T2">O resultado está de acordo com a hipótese levantada na Questão 4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style:text-underline-style="none"/>
    </style:style>
    <style:style style:name="ListLabel_20_38" style:display-name="ListLabel 38" style:family="text">
      <style:text-properties style:font-name="Calibri" fo:font-family="Calibri" style:font-family-generic="roman" style:font-pitch="variable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libri" fo:font-family="Calibri" style:font-family-generic="roman" style:font-pitch="variable" style:text-underline-style="none"/>
    </style:style>
    <style:style style:name="ListLabel_20_92" style:display-name="ListLabel 92" style:family="text">
      <style:text-properties style:font-name="Calibri" fo:font-family="Calibri" style:font-family-generic="roman" style:font-pitch="variable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alibri" fo:font-family="Calibri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libri" fo:font-family="Calibri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libri" fo:font-family="Calibri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1155cc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Calibri" style:font-name-asian="Calibri1" style:font-name-complex="Calibri1"/>
    </style:style>
    <style:style style:name="MT1" style:family="text">
      <style:text-properties style:font-name="Calibri" style:font-name-asian="Calibri1" style:font-name-complex="Calibri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Colégio Politécnico da UFSM</text:span><draw:frame draw:style-name="Mfr1" draw:name="image1.png" text:anchor-type="char" svg:x="4.6583in" svg:y="-0.2291in" svg:width="1.5311in" svg:height="1.1252in" draw:z-index="3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4" meta:paragraph-count="100" meta:word-count="855" meta:character-count="5562" meta:non-whitespace-character-count="4840"/>
    <meta:generator>LibreOfficeDev/6.0.5.2$Linux_X86_64 LibreOffice_project/</meta:generator>
  </office:meta>
</office:document-meta>
</file>