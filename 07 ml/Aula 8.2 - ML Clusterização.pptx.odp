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94000003F4CD7D7CB1C5B573E0.png" manifest:media-type="image/png"/>
  <manifest:file-entry manifest:full-path="Pictures/10000201000004DA0000046ADE4A01FB135C2E5C.png" manifest:media-type="image/png"/>
  <manifest:file-entry manifest:full-path="Pictures/10000201000001DA0000015B5D9DBE45C88A5E6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56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254cm" fo:padding-bottom="0.254cm" fo:padding-left="0.254cm" fo:padding-right="0.254cm" fo:wrap-option="wrap"/>
    </style:style>
    <style:style style:name="co1" style:family="table-column">
      <style:table-column-properties style:column-width="1.402cm" style:use-optimal-column-width="false"/>
    </style:style>
    <style:style style:name="co2" style:family="table-column">
      <style:table-column-properties style:column-width="4.121cm" style:use-optimal-column-width="false"/>
    </style:style>
    <style:style style:name="co3" style:family="table-column">
      <style:table-column-properties style:column-width="5.72cm" style:use-optimal-column-width="false"/>
    </style:style>
    <style:style style:name="ro1" style:family="table-row">
      <style:table-row-properties style:row-height="1.241cm"/>
    </style:style>
    <style:style style:name="ro2" style:family="table-row">
      <style:table-row-properties style:row-height="1.14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1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4.11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6.11cm" fo:margin-top="0.353cm" fo:margin-bottom="0cm" fo:line-height="100%" fo:text-align="start" fo:text-indent="0cm" style:writing-mode="lr-tb"/>
    </style:style>
    <style:style style:name="P18" style:family="paragraph">
      <style:paragraph-properties fo:margin-left="3.81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86;p1" presentation:style-name="pr1" draw:text-style-name="P2" draw:layer="layout" svg:width="22.281cm" svg:height="4.162cm" svg:x="1.136cm" svg:y="7.925cm" presentation:class="title" presentation:user-transformed="true">
          <draw:text-box>
            <text:p text:style-name="P1"><text:span text:style-name="T1">Análise de dados e extração de conhecimento: </text:span><text:span text:style-name="T1"><text:line-break/></text:span><text:span text:style-name="T1">ML - clusterização</text:span></text:p>
          </draw:text-box>
        </draw:frame>
        <draw:frame draw:name="Google Shape;87;p1" presentation:style-name="pr2" draw:text-style-name="P5" draw:layer="layout" svg:width="9.203cm" svg:height="2.239cm" svg:x="1.499cm" svg:y="16.326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presentation:notes draw:style-name="dp2">
          <draw:frame draw:name="Google Shape;83;p1:notes" presentation:style-name="pr3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Google Shape;84;p1:notes" draw:style-name="gr1" draw:layer="layout" svg:width="13.147cm" svg:height="10.66cm" svg:x="3.287cm" svg:y="2.132cm" draw:page-number="1" presentation:class="page"/>
        </presentation:notes>
      </draw:page>
      <draw:page draw:name="Clusterização" draw:style-name="dp1" draw:master-page-name="OBJECT" presentation:presentation-page-layout-name="AL1T11">
        <draw:frame draw:name="Google Shape;92;g3f1862534a5_0_22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usterização</text:span></text:p>
          </draw:text-box>
        </draw:frame>
        <draw:frame draw:name="Google Shape;93;g3f1862534a5_0_22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Aplicada quando o dataset possui dados não rotulados;</text:span></text:p>
              </text:list-item>
              <text:list-item>
                <text:p text:style-name="P8"><text:span text:style-name="T3">Não tem por objetivo classificar os indivíduos;</text:span></text:p>
              </text:list-item>
              <text:list-item>
                <text:p text:style-name="P8"><text:span text:style-name="T3">Agrupar de acordo com semelhanças;</text:span></text:p>
              </text:list-item>
              <text:list-item>
                <text:p text:style-name="P8"><text:span text:style-name="T3">Criação de cluster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Avaliamos a qualidade dos grupos criados medindo as distâncias relativas entre os pontos, utilizando métricas matemáticas.</text:span></text:p>
                  </text:list-item>
                </text:list>
              </text:list-item>
              <text:list-item>
                <text:p text:style-name="P8"><text:span text:style-name="T3">K-Means:</text:span></text:p>
                <text:list>
                  <text:list-item>
                    <text:p text:style-name="P9"><text:span text:style-name="T4">Algoritmo de clusterização que agrupa dados semelhantes em um número definido de grupos (K);</text:span></text:p>
                  </text:list-item>
                  <text:list-item>
                    <text:p text:style-name="P10"><text:span text:style-name="T4">Atribui cada elemento ao grupo mais próximo e ajusta continuamente o centro de cada grupo até que os agrupamentos se estabiliz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3f1862534a5_0_224:notes" draw:style-name="gr1" draw:layer="layout" svg:width="13.147cm" svg:height="10.66cm" svg:x="3.287cm" svg:y="2.132cm" draw:page-number="2" presentation:class="page"/>
          <draw:frame draw:name="Google Shape;90;g3f1862534a5_0_224:notes" presentation:style-name="pr4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Pilares de um bom agrupamento" draw:style-name="dp1" draw:master-page-name="OBJECT" presentation:presentation-page-layout-name="AL1T11">
        <draw:frame draw:name="Google Shape;98;g3f1862534a5_0_22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ilares de um bom agrupamento</text:span></text:p>
          </draw:text-box>
        </draw:frame>
        <draw:frame draw:name="Google Shape;99;g3f1862534a5_0_229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Coesão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Refere-se a quão próximos os pontos estão dentro de um mesmo cluster. Em um cenário ideal, a variância interna do grupo deve ser a mínima possível.</text:span></text:p>
                  </text:list-item>
                </text:list>
              </text:list-item>
            </text:list>
            <text:p text:style-name="P11"><text:span text:style-name="T3"/></text:p>
            <text:list text:continue-numbering="true" text:style-name="L4">
              <text:list-item>
                <text:p text:style-name="P12"><text:span text:style-name="T3">Separação:</text:span></text:p>
                <text:list>
                  <text:list-item>
                    <text:p text:style-name="P13"><text:span text:style-name="T4">O quão distantes os clusters estão uns dos outros. Alta separação espacial ajuda a evitar sobreposição entre diferentes perfis de usuários.</text:span></text:p>
                  </text:list-item>
                </text:list>
              </text:list-item>
            </text:list>
            <text:p text:style-name="P11"><text:span text:style-name="T3"/></text:p>
            <text:list text:continue-numbering="true" text:style-name="L4">
              <text:list-item>
                <text:p text:style-name="P12"><text:span text:style-name="T3">Interoperabilidade:</text:span></text:p>
                <text:list>
                  <text:list-item>
                    <text:p text:style-name="P14"><text:span text:style-name="T4">Matemática à parte, os clusters gerados devem fazer sentido comercial. O grupo "Compradores Premium" difere visualmente do "Usuário Frequente"?</text:span></text:p>
                  </text:list-item>
                </text:list>
              </text:list-item>
            </text:list>
          </draw:text-box>
        </draw:frame>
        <draw:frame draw:name="Google Shape;100;g3f1862534a5_0_229" draw:style-name="gr2" draw:text-style-name="P15" draw:layer="layout" svg:width="4.016cm" svg:height="6.611cm" svg:x="20.476cm" svg:y="11.625cm">
          <draw:image xlink:href="Pictures/10000201000004DA0000046ADE4A01FB135C2E5C.png" xlink:type="simple" xlink:show="embed" xlink:actuate="onLoad">
            <text:p/>
          </draw:image>
        </draw:frame>
        <presentation:notes draw:style-name="dp2">
          <draw:page-thumbnail draw:name="Google Shape;95;g3f1862534a5_0_229:notes" draw:style-name="gr1" draw:layer="layout" svg:width="13.147cm" svg:height="10.66cm" svg:x="3.287cm" svg:y="2.132cm" draw:page-number="3" presentation:class="page"/>
          <draw:frame draw:name="Google Shape;96;g3f1862534a5_0_229:notes" presentation:style-name="pr5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esão" draw:style-name="dp1" draw:master-page-name="OBJECT" presentation:presentation-page-layout-name="AL1T11">
        <draw:frame draw:name="Google Shape;105;g3f1862534a5_0_23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esão</text:span></text:p>
          </draw:text-box>
        </draw:frame>
        <draw:frame draw:name="Google Shape;106;g3f1862534a5_0_234" presentation:style-name="pr2" draw:text-style-name="P5" draw:layer="layout" svg:width="24.129cm" svg:height="13.537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Medida pela inércia </text:span><text:span text:style-name="T5">WCSS (Within-Cluster Sum of Squares);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alculada pela soma das distâncias ao quadrado de cada ponto de dado para o centróide (o meio) do seu respectivo cluster.</text:span></text:p>
                  </text:list-item>
                </text:list>
              </text:list-item>
              <text:list-item>
                <text:p text:style-name="P8"><text:span text:style-name="T3">O K-Means busca minimizar a inércia, aproximando os pontos do centróide. Quanto menor a inércia, mais compactos tendem a ser os clusters. </text:span></text:p>
                <text:list>
                  <text:list-item>
                    <text:p text:style-name="P8"><text:span text:style-name="T4">Problema da inércia: se o número de clusters (K) for igual ao número total de usuários, a inércia será ZERO (pois cada usuário será o próprio cluster).</text:span></text:p>
                  </text:list-item>
                  <text:list-item>
                    <text:p text:style-name="P10"><text:span text:style-name="T4">Isso prova que “a menor inércia possível” não é necessariamente o melhor modelo de negóc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2;g3f1862534a5_0_234:notes" draw:style-name="gr1" draw:layer="layout" svg:width="13.147cm" svg:height="10.66cm" svg:x="3.287cm" svg:y="2.132cm" draw:page-number="4" presentation:class="page"/>
          <draw:frame draw:name="Google Shape;103;g3f1862534a5_0_234:notes" presentation:style-name="pr6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Método Cotovelo" draw:style-name="dp1" draw:master-page-name="OBJECT" presentation:presentation-page-layout-name="AL1T11">
        <draw:frame draw:name="Google Shape;111;g3f1862534a5_0_2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étodo Cotovelo</text:span></text:p>
          </draw:text-box>
        </draw:frame>
        <draw:frame draw:name="Google Shape;112;g3f1862534a5_0_239" presentation:style-name="pr2" draw:text-style-name="P5" draw:layer="layout" svg:width="23.655cm" svg:height="12.572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Como a inércia invariavelmente cai à medida que o número de clusters aumenta, usamos a análise visual;</text:span></text:p>
              </text:list-item>
              <text:list-item>
                <text:p text:style-name="P8"><text:span text:style-name="T3">Gráfico com número de clusters no Eixo X e a Inércia no Eixo Y. A curva sempre formará uma descida íngreme que aos poucos perde força;</text:span></text:p>
              </text:list-item>
            </text:list>
            <text:p text:style-name="P16"><text:span text:style-name="T3"/></text:p>
          </draw:text-box>
        </draw:frame>
        <draw:frame draw:name="Google Shape;113;g3f1862534a5_0_239" draw:style-name="gr3" draw:text-style-name="P15" draw:layer="layout" svg:width="8.559cm" svg:height="5.515cm" svg:x="16.366cm" svg:y="10.68cm">
          <draw:image xlink:href="Pictures/1000020100000394000003F4CD7D7CB1C5B573E0.png" xlink:type="simple" xlink:show="embed" xlink:actuate="onLoad">
            <text:p/>
          </draw:image>
        </draw:frame>
        <draw:frame draw:name="Google Shape;114;g3f1862534a5_0_239" presentation:style-name="pr2" draw:text-style-name="P5" draw:layer="layout" svg:width="14.561cm" svg:height="6.398cm" svg:x="1.27cm" svg:y="10.68cm" presentation:class="outline" presentation:user-transformed="true">
          <draw:text-box>
            <text:list text:style-name="L3">
              <text:list-item>
                <text:p text:style-name="P7"><text:span text:style-name="T3">O “cotovelo” da curva define onde o total ideal de clusters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Adicionar um novo cluster a partir dali não traz melhora significativa à coes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8;g3f1862534a5_0_239:notes" draw:style-name="gr1" draw:layer="layout" svg:width="13.147cm" svg:height="10.66cm" svg:x="3.287cm" svg:y="2.132cm" draw:page-number="5" presentation:class="page"/>
          <draw:frame draw:name="Google Shape;109;g3f1862534a5_0_239:notes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eficiente Silhueta" draw:style-name="dp1" draw:master-page-name="OBJECT" presentation:presentation-page-layout-name="AL1T11">
        <draw:frame draw:name="Google Shape;119;g3f1862534a5_0_24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eficiente Silhueta</text:span></text:p>
          </draw:text-box>
        </draw:frame>
        <draw:frame draw:name="Google Shape;120;g3f1862534a5_0_24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Coesão + Separação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iferente da Inércia, o Coeficiente de Silhueta avalia o quão similar um objeto é ao seu próprio cluster (coesão) comparado a outros clusters (separação)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4">Aproximando de +1: O dado está perfeitamente em seu cluster e distante dos demais.</text:span></text:p>
                      </text:list-item>
                      <text:list-item>
                        <text:p text:style-name="P8"><text:span text:style-name="T4">Próximo a 0: O dado está em cima da fronteira entre dois clusters.</text:span></text:p>
                      </text:list-item>
                      <text:list-item>
                        <text:p text:style-name="P17"><text:span text:style-name="T4">Valores Negativos: O modelo provavelmente atribuiu o dado ao grupo errado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3"/></text:p>
          </draw:text-box>
        </draw:frame>
        <draw:frame draw:name="Google Shape;121;g3f1862534a5_0_244" draw:style-name="gr4" draw:text-style-name="P15" draw:layer="layout" svg:width="6.645cm" svg:height="6.611cm" svg:x="17.925cm" svg:y="11.8cm">
          <draw:image xlink:href="Pictures/10000201000004DA0000046ADE4A01FB135C2E5C.png" xlink:type="simple" xlink:show="embed" xlink:actuate="onLoad">
            <text:p/>
          </draw:image>
        </draw:frame>
        <presentation:notes draw:style-name="dp2">
          <draw:page-thumbnail draw:name="Google Shape;116;g3f1862534a5_0_244:notes" draw:style-name="gr1" draw:layer="layout" svg:width="13.147cm" svg:height="10.66cm" svg:x="3.287cm" svg:y="2.132cm" draw:page-number="6" presentation:class="page"/>
          <draw:frame draw:name="Google Shape;117;g3f1862534a5_0_244:notes" presentation:style-name="pr8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Exemplo prático" draw:style-name="dp1" draw:master-page-name="OBJECT" presentation:presentation-page-layout-name="AL1T11">
        <draw:frame draw:name="Google Shape;126;g3f1862534a5_0_26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 prático</text:span></text:p>
          </draw:text-box>
        </draw:frame>
        <draw:frame draw:name="Google Shape;127;g3f1862534a5_0_268" presentation:style-name="pr2" draw:text-style-name="P5" draw:layer="layout" svg:width="22.859cm" svg:height="3.351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Dados de usuários em plataforma web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<text:a xlink:href="https://drive.google.com/file/d/18C31F5R-3ExOgGGJFYAugoZlCSkyvOef/view?usp=sharing" xlink:type="simple">Dataset aqui.</text:a></text:span></text:p>
                  </text:list-item>
                  <text:list-item>
                    <text:p text:style-name="P9"><text:span text:style-name="T6"><text:a xlink:href="https://colab.research.google.com/drive/14iq_nid4Df3AgFx2atA7QqexE-QbT1Fv?usp=sharing" xlink:type="simple">Código no google colab.</text:a></text:span></text:p>
                  </text:list-item>
                </text:list>
              </text:list-item>
            </text:list>
          </draw:text-box>
        </draw:frame>
        <draw:frame draw:name="Google Shape;128;g3f1862534a5_0_268" draw:style-name="standard" draw:layer="layout" svg:width="11.242cm" svg:height="6.97cm" svg:x="8.064cm" svg:y="8.30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7">id</text:span></text:p>
              </table:table-cell>
              <table:table-cell>
                <text:p text:style-name="P19"><text:span text:style-name="T7">acessos_mes</text:span></text:p>
              </table:table-cell>
              <table:table-cell>
                <text:p text:style-name="P19"><text:span text:style-name="T7">tempo_medio_mi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12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11</text:span></text:p>
              </table:table-cell>
              <table:table-cell>
                <text:p text:style-name="P1"><text:span text:style-name="T2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3;g3f1862534a5_0_268:notes" draw:style-name="gr1" draw:layer="layout" svg:width="13.147cm" svg:height="10.66cm" svg:x="3.287cm" svg:y="2.132cm" draw:page-number="7" presentation:class="page"/>
          <draw:frame draw:name="Google Shape;124;g3f1862534a5_0_268:notes" presentation:style-name="pr9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14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3;p14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14;p14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14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14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14" draw:style-name="Mgr3" draw:text-style-name="MP7" draw:layer="backgroundobjects" svg:width="22.1cm" svg:height="0.001cm" svg:x="0cm" svg:y="4.3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14" draw:style-name="Mgr4" draw:text-style-name="MP7" draw:layer="backgroundobjects" svg:width="5.469cm" svg:height="4.005cm" svg:x="19.93cm" svg:y="0.521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18T12:44:31</meta:creation-date>
    <meta:initial-creator>Leandro</meta:initial-creator>
    <meta:document-statistic meta:object-count="56"/>
    <meta:generator>LibreOfficeDev/6.0.5.2$Linux_X86_64 LibreOffice_project/</meta:generator>
  </office:meta>
</office:document-meta>
</file>