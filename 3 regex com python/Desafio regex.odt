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201000000930000006C14CCAA46E89F8D5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style:font-name-asian="Calibri1" style:font-name-complex="Calibri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6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/>
    </style:style>
    <style:style style:name="P7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Calibri" style:font-name-asian="Calibri1" style:font-name-complex="Calibri1"/>
    </style:style>
    <style:style style:name="P8" style:family="paragraph" style:parent-style-name="Standard" style:master-page-name="First_20_Page">
      <style:paragraph-properties fo:text-align="center" style:justify-single-word="false" style:page-number="1"/>
      <style:text-properties style:font-name="Calibri" fo:font-size="13pt" style:font-name-asian="Calibri1" style:font-size-asian="13pt" style:font-name-complex="Calibri1" style:font-size-complex="13pt"/>
    </style:style>
    <style:style style:name="T1" style:family="text">
      <style:text-properties style:font-name="Calibri" fo:font-size="13pt" style:font-name-asian="Calibri1" style:font-size-asian="13pt" style:font-name-complex="Calibri1" style:font-size-complex="13pt"/>
    </style:style>
    <style:style style:name="T2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T3" style:family="text">
      <style:text-properties style:font-name="Calibri" style:font-name-asian="Calibri1" style:font-name-complex="Calibri1"/>
    </style:style>
    <style:style style:name="T4" style:family="text">
      <style:text-properties style:font-name="Calibri" style:text-underline-style="none" style:font-name-asian="Calibri1" style:font-name-complex="Calibri1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><text:span text:style-name="T1">Desafio de Expressões Regulares: Validação de Dados de Produto</text:span></text:p>
      <text:p text:style-name="P1"/>
      <text:p text:style-name="P3"><text:span text:style-name="T2">Contexto:</text:span></text:p>
      <text:p text:style-name="P3"><text:span text:style-name="T3">Você está desenvolvendo um sistema de gestão de estoque para uma loja online. Um dos recursos do sistema é permitir que os administradores cadastrem novos produtos. Para garantir que os dados sejam inseridos no formato correto, você precisa criar expressões regulares para validar as informações fornecidas pelos administradores, como o nome do produto, código do produto, preço, e a data de validade.</text:span></text:p>
      <text:p text:style-name="P1"/>
      <text:p text:style-name="P3"><text:span text:style-name="T2">Requisitos do Formulário de Produto:</text:span></text:p>
      <text:list xml:id="list2946509028" text:style-name="WWNum2">
        <text:list-item>
          <text:p text:style-name="P4"><text:span text:style-name="T3">Nome do Produto: </text:span></text:p>
          <text:list>
            <text:list-item>
              <text:p text:style-name="P6"><text:span text:style-name="T3">O nome do produto deve ser composto por palavras que começam com letras maiúsculas;</text:span></text:p>
            </text:list-item>
            <text:list-item>
              <text:p text:style-name="P6"><text:span text:style-name="T3">Pode ter várias palavras separadas por espaços;</text:span></text:p>
            </text:list-item>
            <text:list-item>
              <text:p text:style-name="P6"><text:span text:style-name="T3">Deve conter no mínimo 3 palavras.</text:span></text:p>
            </text:list-item>
          </text:list>
        </text:list-item>
      </text:list>
      <text:p text:style-name="P7"/>
      <text:list xml:id="list54203451319267" text:continue-numbering="true" text:style-name="WWNum2">
        <text:list-item>
          <text:p text:style-name="P4"><text:span text:style-name="T3">Código do Produto:</text:span></text:p>
          <text:list>
            <text:list-item>
              <text:p text:style-name="P6"><text:span text:style-name="T3">O código do produto deve ser composto por 6 letras maiúsculas seguidas de 4 números (formato: ABCDEF1234);</text:span></text:p>
            </text:list-item>
            <text:list-item>
              <text:p text:style-name="P6"><text:span text:style-name="T3">Não pode conter espaços ou caracteres especiais.</text:span></text:p>
            </text:list-item>
          </text:list>
        </text:list-item>
      </text:list>
      <text:p text:style-name="P7"/>
      <text:list xml:id="list54203480619947" text:continue-numbering="true" text:style-name="WWNum2">
        <text:list-item>
          <text:p text:style-name="P4"><text:span text:style-name="T3">Preço:</text:span></text:p>
          <text:list>
            <text:list-item>
              <text:p text:style-name="P6"><text:span text:style-name="T3">O preço do produto deve ser um número com até 2 casas decimais;</text:span></text:p>
            </text:list-item>
            <text:list-item>
              <text:p text:style-name="P6"><text:span text:style-name="T3">Deve ser um valor positivo, podendo incluir um ponto (para separação de casas decimais) ou vírgula;</text:span></text:p>
            </text:list-item>
            <text:list-item>
              <text:p text:style-name="P6"><text:span text:style-name="T3">O preço não pode ter mais de duas casas decimais (exemplo: 99.99 ou 99,99).</text:span></text:p>
            </text:list-item>
          </text:list>
        </text:list-item>
      </text:list>
      <text:p text:style-name="P7"/>
      <text:list xml:id="list54203100455595" text:continue-numbering="true" text:style-name="WWNum2">
        <text:list-item>
          <text:p text:style-name="P4"><text:span text:style-name="T3">Data de Validade:</text:span></text:p>
          <text:list>
            <text:list-item>
              <text:p text:style-name="P6"><text:span text:style-name="T3">A data de validade do produto deve estar no formato DD/MM/AAAA;</text:span></text:p>
            </text:list-item>
            <text:list-item>
              <text:p text:style-name="P6"><text:span text:style-name="T3">O dia deve estar entre 01 e 31, o mês entre 01 e 12, e o ano deve ser composto por 4 dígitos.</text:span></text:p>
            </text:list-item>
          </text:list>
        </text:list-item>
      </text:list>
      <text:p text:style-name="P1"/>
      <text:p text:style-name="P3"><text:soft-page-break/><text:span text:style-name="T2">Desafio:</text:span></text:p>
      <text:p text:style-name="P3"><text:span text:style-name="T3">Crie as expressões regulares para validar os dados do produto conforme os requisitos acima e explique brevemente como cada uma funciona. Após isso, forneça um código simples em Python para testar a validação dos dados de um produto.</text:span></text:p>
      <text:p text:style-name="P1"/>
      <text:p text:style-name="P3"><text:span text:style-name="T2">Exemplos de Entradas:</text:span></text:p>
      <text:p text:style-name="P3"><text:span text:style-name="T3">1. Nome do Produto:</text:span></text:p>
      <text:p text:style-name="P3"><text:span text:style-name="T3"><text:s text:c="4"/>Entrada válida: Camiseta Polo Masculina</text:span></text:p>
      <text:p text:style-name="P3"><text:span text:style-name="T3"><text:s text:c="4"/>Entrada inválida: camiseta polo masculina (não começa com letra maiúscula)</text:span></text:p>
      <text:p text:style-name="P3"><text:span text:style-name="T3"><text:s text:c="4"/>Entrada inválida: Camiseta Polo (menos de 3 palavras)</text:span></text:p>
      <text:p text:style-name="P1"/>
      <text:p text:style-name="P3"><text:span text:style-name="T3">2. Código do Produto:</text:span></text:p>
      <text:p text:style-name="P3"><text:span text:style-name="T3"><text:s text:c="4"/>Entrada válida: ABCDEF1234</text:span></text:p>
      <text:p text:style-name="P3"><text:span text:style-name="T3"><text:s text:c="4"/>Entrada inválida: abc1234 (letras minúsculas)</text:span></text:p>
      <text:p text:style-name="P3"><text:span text:style-name="T3"><text:s text:c="4"/>Entrada inválida: ABC1234@ (caracteres especiais)</text:span></text:p>
      <text:p text:style-name="P1"/>
      <text:p text:style-name="P3"><text:span text:style-name="T3">3. Preço:</text:span></text:p>
      <text:p text:style-name="P3"><text:span text:style-name="T3"><text:s text:c="4"/>Entrada válida: 99.99</text:span></text:p>
      <text:p text:style-name="P3"><text:span text:style-name="T3"><text:s text:c="4"/>Entrada válida: 99,99</text:span></text:p>
      <text:p text:style-name="P3"><text:span text:style-name="T3"><text:s text:c="4"/>Entrada inválida: 99.999 (mais de 2 casas decimais)</text:span></text:p>
      <text:p text:style-name="P3"><text:span text:style-name="T3"><text:s text:c="4"/>Entrada inválida: -99.99 (valor negativo)</text:span></text:p>
      <text:p text:style-name="P1"/>
      <text:p text:style-name="P3"><text:span text:style-name="T3">4. Data de Validade:</text:span></text:p>
      <text:p text:style-name="P3"><text:span text:style-name="T3"><text:s text:c="4"/>Entrada válida: 02/04/2026</text:span></text:p>
      <text:p text:style-name="P3"><text:span text:style-name="T3"><text:s text:c="4"/>Entrada inválida: 32/13/2026 (dia ou mês inválido)</text:span></text:p>
      <text:p text:style-name="P3"><text:span text:style-name="T3"><text:s text:c="4"/>Entrada inválida: 02/04/26 (ano com apenas 2 dígitos)</text:span></text:p>
      <text:p text:style-name="P1"/>
      <text:p text:style-name="P3"><text:span text:style-name="T3">Observações:</text:span></text:p>
      <text:list xml:id="list4292824647" text:style-name="WWNum1">
        <text:list-item>
          <text:p text:style-name="P5"><text:soft-page-break/><text:span text:style-name="T3">Considerar o arquivo Regex-Dataset.txt disponível no moodle como dados de produtos a serem validados;</text:span></text:p>
        </text:list-item>
        <text:list-item>
          <text:p text:style-name="P5"><text:span text:style-name="T3">O sistema deve corrigir pequenas falhas de formatação quando possível. Por exemplo: capitalizar nomes de produtos que vieram em minúsculas (de 'camiseta polo' para 'Camiseta Polo') ou padronizar o separador decimal do preço (trocar ponto por vírgula);</text:span></text:p>
        </text:list-item>
        <text:list-item>
          <text:p text:style-name="P5"><text:span text:style-name="T3">Utilizar regexes com múltiplas linhas para melhor organização do código;</text:span></text:p>
        </text:list-item>
        <text:list-item>
          <text:p text:style-name="P5"><text:span text:style-name="T3">Utilizar grupos nomeados sempre que necessário;</text:span></text:p>
        </text:list-item>
        <text:list-item>
          <text:p text:style-name="P5"><text:span text:style-name="T3">Casos omissos devem ser tratados pelo desenvolvedor e fazem parte da avaliaçã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style:text-underline-style="none"/>
    </style:style>
    <style:style style:name="ListLabel_20_11" style:display-name="ListLabel 11" style:family="text">
      <style:text-properties style:font-name="Calibri" fo:font-family="Calibri" style:font-family-generic="roman" style:font-pitch="variable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Calibri" style:font-name-asian="Calibri1" style:font-name-complex="Calibri1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><text:span text:style-name="MT1">Colégio Politécnico da UFSM</text:span><draw:frame draw:style-name="Mfr1" draw:name="image1.png" text:anchor-type="char" svg:x="4.6583in" svg:y="-0.2291in" svg:width="1.5311in" svg:height="1.1252in" draw:z-index="0"><draw:image xlink:href="Pictures/10000201000000930000006C14CCAA46E89F8D59.png" xlink:type="simple" xlink:show="embed" xlink:actuate="onLoad" loext:mime-type="image/png"/></draw:frame></text:p>
        <text:p text:style-name="Standard"><text:span text:style-name="MT1">Sistemas para Internet</text:span></text:p>
        <text:p text:style-name="Standard"><text:span text:style-name="MT1">Disciplina: Análise de dados e extração de conhecimento</text:span></text:p>
        <text:p text:style-name="Standard"><text:span text:style-name="MT1">Professor: Leandro Freitas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48" meta:word-count="461" meta:character-count="2918" meta:non-whitespace-character-count="2471"/>
    <meta:generator>LibreOfficeDev/6.0.5.2$Linux_X86_64 LibreOffice_project/</meta:generator>
  </office:meta>
</office:document-meta>
</file>