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7000001D1E69EC22D3069AED4.png" manifest:media-type="image/png"/>
  <manifest:file-entry manifest:full-path="Pictures/10000201000001DA0000015B5D9DBE45C88A5E6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.953cm" fo:margin-right="0cm" fo:margin-top="0.127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2.54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69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5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•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–">
        <style:list-level-properties text:space-before="4.093cm" text:min-label-width="0.987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83cm" text:min-label-width="0.987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83cm" text:min-label-width="0.987cm"/>
        <style:text-properties style:font-name="Calibri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álise de dados e extração de conhecimento" draw:style-name="dp1" draw:master-page-name="OBJECT" presentation:presentation-page-layout-name="AL1T11">
        <draw:frame draw:name="Google Shape;86;p13" presentation:style-name="pr1" draw:text-style-name="P2" draw:layer="layout" svg:width="19.973cm" svg:height="3.175cm" svg:x="1.27cm" svg:y="0.763cm" presentation:class="title" presentation:user-transformed="true">
          <draw:text-box>
            <text:p text:style-name="P1"><text:span text:style-name="T1">Análise de dados e extração de conhecimento</text:span></text:p>
          </draw:text-box>
        </draw:frame>
        <draw:frame draw:name="Google Shape;87;p13" presentation:style-name="pr2" draw:text-style-name="P5" draw:layer="layout" svg:width="8.308cm" svg:height="2.238cm" svg:x="1.405cm" svg:y="15.594cm" presentation:class="outline" presentation:user-transformed="true">
          <draw:text-box>
            <text:p text:style-name="P3"><text:span text:style-name="T2">Professor Leandro O. Freitas</text:span></text:p>
            <text:p text:style-name="P4"><text:span text:style-name="T2">leandro@politecnico.ufsm.br</text:span></text:p>
          </draw:text-box>
        </draw:frame>
        <draw:custom-shape draw:name="Google Shape;88;p13" draw:style-name="gr1" draw:text-style-name="P6" draw:layer="layout" svg:width="17.038cm" svg:height="3.399cm" svg:x="3.13cm" svg:y="9.031cm">
          <text:p text:style-name="P1"><text:span text:style-name="T1">Web craw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3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frame draw:name="Google Shape;83;g1dfd216856c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4;g1dfd216856c_0_0:notes" draw:style-name="gr2" draw:layer="layout" svg:width="12.7cm" svg:height="9.524cm" svg:x="3.176cm" svg:y="1.905cm" draw:page-number="1" presentation:class="page"/>
        </presentation:notes>
      </draw:page>
      <draw:page draw:name="Web crawling" draw:style-name="dp1" draw:master-page-name="OBJECT" presentation:presentation-page-layout-name="AL1T11">
        <draw:frame draw:name="Google Shape;94;p14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95;p14" presentation:style-name="pr2" draw:text-style-name="P5" draw:layer="layout" svg:width="22.859cm" svg:height="7.609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Exercício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Acessar o site quotes.toscrape.com;</text:span></text:p>
                  </text:list-item>
                  <text:list-item>
                    <text:p text:style-name="P11"><text:span text:style-name="T5">Extrair todas as citações da página;</text:span></text:p>
                  </text:list-item>
                  <text:list-item>
                    <text:p text:style-name="P11"><text:span text:style-name="T5">Identificar o link da próxima página (botão “next”);</text:span></text:p>
                  </text:list-item>
                  <text:list-item>
                    <text:p text:style-name="P11"><text:span text:style-name="T5">Exibir esse link na tela;</text:span></text:p>
                  </text:list-item>
                </text:list>
              </text:list-item>
            </text:list>
            <text:p text:style-name="P12"><text:span text:style-name="T4"/></text:p>
            <text:list text:continue-numbering="true" text:style-name="L6">
              <text:list-item>
                <text:p text:style-name="P13"><text:span text:style-name="T4">O que precisamos fazer para acessar as próximas páginas? </text:span></text:p>
              </text:list-item>
            </text:list>
          </draw:text-box>
        </draw:frame>
        <draw:frame draw:name="Google Shape;96;p14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Google Shape;97;p14" presentation:style-name="pr2" draw:text-style-name="P5" xml:id="id1" draw:id="id1" draw:layer="layout" svg:width="22.859cm" svg:height="7.609cm" svg:x="1.277cm" svg:y="10.137cm" presentation:class="outline" presentation:user-transformed="true">
          <draw:text-box>
            <text:p text:style-name="P14"><text:span text:style-name="T4"/></text:p>
            <text:list text:style-name="L9">
              <text:list-item>
                <text:list>
                  <text:list-item>
                    <text:p text:style-name="P15"><text:span text:style-name="T5">Acesse manualmente a próxima página (copiando a URL);</text:span></text:p>
                  </text:list-item>
                  <text:list-item>
                    <text:p text:style-name="P16"><text:span text:style-name="T5">Compare os resultados com a página anterior.</text:span></text:p>
                  </text:list-item>
                </text:list>
              </text:list-item>
            </text:list>
            <text:p text:style-name="P14"><text:span text:style-name="T4"/></text:p>
            <text:list text:style-name="L6">
              <text:list-item>
                <text:p text:style-name="P13"><text:span text:style-name="T4">Como automatizar esse processo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1;g39a6ac239dd_2_4:notes" draw:style-name="gr2" draw:layer="layout" svg:width="12.699cm" svg:height="9.524cm" svg:x="3.176cm" svg:y="1.905cm" draw:page-number="2" presentation:class="page"/>
          <draw:frame draw:name="Google Shape;92;g39a6ac239dd_2_4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tomando…" draw:style-name="dp1" draw:master-page-name="OBJECT" presentation:presentation-page-layout-name="AL1T11">
        <draw:frame draw:name="Google Shape;102;p15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Retomando…</text:span></text:p>
          </draw:text-box>
        </draw:frame>
        <draw:frame draw:name="Google Shape;103;p15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Web scraping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Técnica para automatizar extração de dados da web sem a utilização de um navegador.</text:span></text:p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6">
              <text:list-item>
                <text:p text:style-name="P13"><text:span text:style-name="T4">Construção:</text:span></text:p>
                <text:list>
                  <text:list-item>
                    <text:p text:style-name="P16"><text:span text:style-name="T5">Obter dados HTML de um domínio;</text:span></text:p>
                  </text:list-item>
                  <text:list-item>
                    <text:p text:style-name="P16"><text:span text:style-name="T5">Fazer </text:span><text:span text:style-name="T6">parse</text:span><text:span text:style-name="T5"> desses dados a procura de informações relevantes;</text:span></text:p>
                  </text:list-item>
                  <text:list-item>
                    <text:p text:style-name="P16"><text:span text:style-name="T5">Armazenar essas informações;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6"><text:span text:style-name="T7">Passar para outra página e repetir o processo (se necessário).</text:span></text:p>
                  </text:list-item>
                </text:list>
              </text:list-item>
            </text:list>
          </draw:text-box>
        </draw:frame>
        <draw:frame draw:name="Google Shape;104;p15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99;g1e33db2e12b_0_7:notes" draw:style-name="gr2" draw:layer="layout" svg:width="12.699cm" svg:height="9.524cm" svg:x="3.176cm" svg:y="1.905cm" draw:page-number="3" presentation:class="page"/>
          <draw:frame draw:name="Google Shape;100;g1e33db2e12b_0_7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: definição" draw:style-name="dp1" draw:master-page-name="OBJECT" presentation:presentation-page-layout-name="AL1T11">
        <draw:frame draw:name="Google Shape;109;p16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: definição</text:span></text:p>
          </draw:text-box>
        </draw:frame>
        <draw:frame draw:name="Google Shape;110;p16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Técnica para rastrear e indexar páginas da web;</text:span></text:p>
              </text:list-item>
            </text:list>
            <text:p text:style-name="P14"><text:span text:style-name="T4"/></text:p>
            <text:list text:continue-numbering="true" text:style-name="L5">
              <text:list-item>
                <text:p text:style-name="P13"><text:span text:style-name="T4">Diferente do scraping, aqui o objetivo não é extrair dados, mas sim, indexar todas as páginas que serão (ou foram) visitadas;</text:span></text:p>
              </text:list-item>
            </text:list>
            <text:p text:style-name="P14"><text:span text:style-name="T4"/></text:p>
            <text:list text:continue-numbering="true" text:style-name="L5">
              <text:list-item>
                <text:p text:style-name="P13"><text:span text:style-name="T4">Portanto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Web Scraping captura conteúdo de uma página HTML;</text:span></text:p>
                  </text:list-item>
                  <text:list-item>
                    <text:p text:style-name="P16"><text:span text:style-name="T5">Web Crawling controla um conjunto de páginas a serem acessadas;</text:span></text:p>
                  </text:list-item>
                  <text:list-item>
                    <text:p text:style-name="P16"><text:span text:style-name="T5">WS e WC são técnicas de programação que se complementam.</text:span></text:p>
                  </text:list-item>
                </text:list>
              </text:list-item>
            </text:list>
          </draw:text-box>
        </draw:frame>
        <draw:frame draw:name="Google Shape;111;p16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06;g3599adff289_0_0:notes" draw:style-name="gr2" draw:layer="layout" svg:width="12.699cm" svg:height="9.524cm" svg:x="3.176cm" svg:y="1.905cm" draw:page-number="4" presentation:class="page"/>
          <draw:frame draw:name="Google Shape;107;g3599adff289_0_0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quotes.toscrape.com" draw:style-name="dp1" draw:master-page-name="OBJECT" presentation:presentation-page-layout-name="AL1T11">
        <draw:frame draw:name="Google Shape;116;p17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emplo: quotes.toscrape.com</text:span></text:p>
          </draw:text-box>
        </draw:frame>
        <draw:frame draw:name="Google Shape;117;p17" presentation:style-name="pr2" draw:text-style-name="P5" draw:layer="layout" svg:width="14.432cm" svg:height="8.941cm" svg:x="1.27cm" svg:y="4.445cm" presentation:class="outline" presentation:user-transformed="true">
          <draw:text-box>
            <text:p text:style-name="P13"><text:span text:style-name="T8">from urllib.request import urlopen</text:span></text:p>
            <text:p text:style-name="P13"><text:span text:style-name="T8"/></text:p>
            <text:p text:style-name="P13"><text:span text:style-name="T8">url = 'https://quotes.toscrape.com'</text:span></text:p>
            <text:p text:style-name="P13"><text:span text:style-name="T8"/></text:p>
            <text:p text:style-name="P13"><text:span text:style-name="T8">resposta = urlopen(url)</text:span></text:p>
            <text:p text:style-name="P13"><text:span text:style-name="T8">html = resposta.read()</text:span></text:p>
            <text:p text:style-name="P13"><text:span text:style-name="T8"/></text:p>
            <text:p text:style-name="P13"><text:span text:style-name="T8">print(html)</text:span></text:p>
          </draw:text-box>
        </draw:frame>
        <draw:frame draw:name="Google Shape;118;p17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19;p17" draw:style-name="gr3" draw:text-style-name="P6" xml:id="id2" draw:id="id2" draw:layer="layout" svg:width="19.856cm" svg:height="1.525cm" svg:x="1.27cm" svg:y="12.928cm">
          <text:p text:style-name="P16"><text:span text:style-name="T9">Devolve uma string referente a todo o html da pág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3;g3dabf49d528_0_0:notes" draw:style-name="gr2" draw:layer="layout" svg:width="12.699cm" svg:height="9.524cm" svg:x="3.176cm" svg:y="1.905cm" draw:page-number="5" presentation:class="page"/>
          <draw:frame draw:name="Google Shape;114;g3dabf49d528_0_0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quotes.toscrape.com" draw:style-name="dp1" draw:master-page-name="OBJECT" presentation:presentation-page-layout-name="AL1T11">
        <draw:frame draw:name="Google Shape;124;p18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emplo: quotes.toscrape.com</text:span></text:p>
          </draw:text-box>
        </draw:frame>
        <draw:frame draw:name="Google Shape;125;p18" presentation:style-name="pr2" draw:text-style-name="P5" draw:layer="layout" svg:width="20.337cm" svg:height="12.181cm" svg:x="1.27cm" svg:y="4.445cm" presentation:class="outline" presentation:user-transformed="true">
          <draw:text-box>
            <text:p text:style-name="P13"><text:span text:style-name="T8">from urllib.request import urlopen</text:span></text:p>
            <text:p text:style-name="P13"><text:span text:style-name="T10">from bs4 import BeautifulSoup</text:span></text:p>
            <text:p text:style-name="P13"><text:span text:style-name="T8"/></text:p>
            <text:p text:style-name="P13"><text:span text:style-name="T8">url = 'https://quotes.toscrape.com'</text:span></text:p>
            <text:p text:style-name="P13"><text:span text:style-name="T8"/></text:p>
            <text:p text:style-name="P13"><text:span text:style-name="T8">resposta = urlopen(url)</text:span></text:p>
            <text:p text:style-name="P13"><text:span text:style-name="T8">html = resposta.read()</text:span></text:p>
            <text:p text:style-name="P13"><text:span text:style-name="T8"/></text:p>
            <text:p text:style-name="P13"><text:span text:style-name="T10">soup = BeautifulSoup(html, 'html.parser')</text:span></text:p>
            <text:p text:style-name="P13"><text:span text:style-name="T8"/></text:p>
            <text:p text:style-name="P13"><text:span text:style-name="T10">print(soup.title.text)</text:span></text:p>
            <text:p text:style-name="P13"><text:span text:style-name="T8"/></text:p>
          </draw:text-box>
        </draw:frame>
        <draw:frame draw:name="Google Shape;126;p18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27;p18" draw:style-name="gr3" draw:text-style-name="P6" xml:id="id3" draw:id="id3" draw:layer="layout" svg:width="12.836cm" svg:height="2.541cm" svg:x="11.511cm" svg:y="13.382cm">
          <text:p text:style-name="P16"><text:span text:style-name="T9">Parsing permite transformar o html em um objeto iterá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1;g3dabf49d528_0_9:notes" draw:style-name="gr2" draw:layer="layout" svg:width="12.699cm" svg:height="9.524cm" svg:x="3.176cm" svg:y="1.905cm" draw:page-number="6" presentation:class="page"/>
          <draw:frame draw:name="Google Shape;122;g3dabf49d528_0_9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quotes.toscrape.com" draw:style-name="dp1" draw:master-page-name="OBJECT" presentation:presentation-page-layout-name="AL1T11">
        <draw:frame draw:name="Google Shape;132;p19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emplo: quotes.toscrape.com</text:span></text:p>
          </draw:text-box>
        </draw:frame>
        <draw:frame draw:name="Google Shape;133;p19" presentation:style-name="pr2" draw:text-style-name="P5" draw:layer="layout" svg:width="20.337cm" svg:height="12.611cm" svg:x="1.27cm" svg:y="4.445cm" presentation:class="outline" presentation:user-transformed="true">
          <draw:text-box>
            <text:p text:style-name="P13"><text:span text:style-name="T8">from urllib.request import urlopen</text:span></text:p>
            <text:p text:style-name="P13"><text:span text:style-name="T8">from bs4 import BeautifulSoup</text:span></text:p>
            <text:p text:style-name="P13"><text:span text:style-name="T8"/></text:p>
            <text:p text:style-name="P13"><text:span text:style-name="T8">url = 'https://quotes.toscrape.com'</text:span></text:p>
            <text:p text:style-name="P13"><text:span text:style-name="T8"/></text:p>
            <text:p text:style-name="P13"><text:span text:style-name="T8">resposta = urlopen(url)</text:span></text:p>
            <text:p text:style-name="P13"><text:span text:style-name="T8">html = resposta.read()</text:span></text:p>
            <text:p text:style-name="P13"><text:span text:style-name="T8">soup = BeautifulSoup(html, 'html.parser')</text:span></text:p>
            <text:p text:style-name="P13"><text:span text:style-name="T8"/></text:p>
            <text:p text:style-name="P13"><text:span text:style-name="T10">proxima = soup.find('li', class_='next')</text:span></text:p>
            <text:p text:style-name="P13"><text:span text:style-name="T10"/></text:p>
            <text:p text:style-name="P13"><text:span text:style-name="T10">if proxima:</text:span></text:p>
            <text:p text:style-name="P13"><text:span text:style-name="T10"><text:s text:c="4"/></text:span><text:span text:style-name="T10">link = proxima.find('a')['href']</text:span></text:p>
            <text:p text:style-name="P13"><text:span text:style-name="T10"><text:s text:c="4"/></text:span><text:span text:style-name="T10">print(link)</text:span></text:p>
            <text:p text:style-name="P13"><text:span text:style-name="T8"/></text:p>
          </draw:text-box>
        </draw:frame>
        <draw:frame draw:name="Google Shape;134;p19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35;p19" draw:style-name="gr3" draw:text-style-name="P6" xml:id="id4" draw:id="id4" draw:layer="layout" svg:width="8.864cm" svg:height="2.541cm" svg:x="16.324cm" svg:y="12.685cm">
          <text:p text:style-name="P16"><text:span text:style-name="T9">Procura pela tag &lt;a&gt; que possui um hr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3" draw:text-style-name="P6" xml:id="id5" draw:id="id5" draw:layer="layout" svg:width="9.234cm" svg:height="4.573cm" svg:x="15.314cm" svg:y="4.908cm">
          <text:p text:style-name="P16"><text:span text:style-name="T9">Esses links são absolutos ou relativos?</text:span></text:p>
          <text:p text:style-name="P16"><text:span text:style-name="T9">O que precisamos fazer com el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9;g3dabf49d528_0_25:notes" draw:style-name="gr2" draw:layer="layout" svg:width="12.699cm" svg:height="9.524cm" svg:x="3.176cm" svg:y="1.905cm" draw:page-number="7" presentation:class="page"/>
          <draw:frame draw:name="Google Shape;130;g3dabf49d528_0_25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quotes.toscrape.com" draw:style-name="dp1" draw:master-page-name="OBJECT" presentation:presentation-page-layout-name="AL1T11">
        <draw:frame draw:name="Google Shape;141;p20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emplo: quotes.toscrape.com</text:span></text:p>
          </draw:text-box>
        </draw:frame>
        <draw:frame draw:name="Google Shape;142;p20" presentation:style-name="pr2" draw:text-style-name="P5" draw:layer="layout" svg:width="20.337cm" svg:height="12.611cm" svg:x="1.27cm" svg:y="4.445cm" presentation:class="outline" presentation:user-transformed="true">
          <draw:text-box>
            <text:p text:style-name="P13"><text:span text:style-name="T8">from urllib.request import urlopen</text:span></text:p>
            <text:p text:style-name="P13"><text:span text:style-name="T8">from bs4 import BeautifulSoup</text:span></text:p>
            <text:p text:style-name="P13"><text:span text:style-name="T8"/></text:p>
            <text:p text:style-name="P13"><text:span text:style-name="T8">url = 'https://quotes.toscrape.com'</text:span></text:p>
            <text:p text:style-name="P13"><text:span text:style-name="T8"/></text:p>
            <text:p text:style-name="P13"><text:span text:style-name="T8">resposta = urlopen(url)</text:span></text:p>
            <text:p text:style-name="P13"><text:span text:style-name="T8">html = resposta.read()</text:span></text:p>
            <text:p text:style-name="P13"><text:span text:style-name="T8">soup = BeautifulSoup(html, 'html.parser')</text:span></text:p>
            <text:p text:style-name="P13"><text:span text:style-name="T8"/></text:p>
            <text:p text:style-name="P13"><text:span text:style-name="T8">proxima = soup.find('li', class_='next')</text:span></text:p>
            <text:p text:style-name="P13"><text:span text:style-name="T8"/></text:p>
            <text:p text:style-name="P13"><text:span text:style-name="T8">if proxima:</text:span></text:p>
            <text:p text:style-name="P13"><text:span text:style-name="T8"><text:s text:c="4"/></text:span><text:span text:style-name="T8">link = proxima.find('a')['href']</text:span></text:p>
            <text:p text:style-name="P13"><text:span text:style-name="T8"><text:s text:c="4"/></text:span><text:span text:style-name="T10">url = 'https://quotes.toscrape.com' + link</text:span></text:p>
            <text:p text:style-name="P13"><text:span text:style-name="T10"><text:s text:c="4"/></text:span><text:span text:style-name="T10">print(url)</text:span></text:p>
          </draw:text-box>
        </draw:frame>
        <draw:frame draw:name="Google Shape;143;p20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44;p20" draw:style-name="gr3" draw:text-style-name="P6" xml:id="id6" draw:id="id6" draw:layer="layout" svg:width="8.864cm" svg:height="3.557cm" svg:x="16.29cm" svg:y="10.867cm">
          <text:p text:style-name="P16"><text:span text:style-name="T9">Concatena o link extraído com o resto do endereç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8;g3dabf49d528_0_34:notes" draw:style-name="gr2" draw:layer="layout" svg:width="12.699cm" svg:height="9.524cm" svg:x="3.176cm" svg:y="1.905cm" draw:page-number="8" presentation:class="page"/>
          <draw:frame draw:name="Google Shape;139;g3dabf49d528_0_34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quotes.toscrape.com" draw:style-name="dp1" draw:master-page-name="OBJECT" presentation:presentation-page-layout-name="AL1T11">
        <draw:frame draw:name="Google Shape;149;p21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Exemplo: quotes.toscrape.com</text:span></text:p>
          </draw:text-box>
        </draw:frame>
        <draw:frame draw:name="Google Shape;150;p21" presentation:style-name="pr2" draw:text-style-name="P5" draw:layer="layout" svg:width="20.337cm" svg:height="12.611cm" svg:x="1.27cm" svg:y="4.445cm" presentation:class="outline" presentation:user-transformed="true">
          <draw:text-box>
            <text:p text:style-name="P13"><text:span text:style-name="T8">url = 'https://quotes.toscrape.com'</text:span></text:p>
            <text:p text:style-name="P13"><text:span text:style-name="T8"/></text:p>
            <text:p text:style-name="P13"><text:span text:style-name="T10">while url:</text:span></text:p>
            <text:p text:style-name="P13"><text:span text:style-name="T8"><text:s text:c="4"/></text:span><text:span text:style-name="T8">print("Acessando:", url)</text:span></text:p>
            <text:p text:style-name="P13"><text:span text:style-name="T8"/></text:p>
            <text:p text:style-name="P13"><text:span text:style-name="T8"><text:s text:c="4"/></text:span><text:span text:style-name="T8">resposta = urlopen(url)</text:span></text:p>
            <text:p text:style-name="P13"><text:span text:style-name="T8"><text:s text:c="4"/></text:span><text:span text:style-name="T8">html = resposta.read()</text:span></text:p>
            <text:p text:style-name="P13"><text:span text:style-name="T8"><text:s text:c="4"/></text:span><text:span text:style-name="T8">soup = BeautifulSoup(html, 'html.parser')</text:span></text:p>
            <text:p text:style-name="P13"><text:span text:style-name="T8"/></text:p>
            <text:p text:style-name="P13"><text:span text:style-name="T8"><text:s text:c="4"/></text:span><text:span text:style-name="T8">proxima = soup.find('li', class_='next')</text:span></text:p>
            <text:p text:style-name="P13"><text:span text:style-name="T8"/></text:p>
            <text:p text:style-name="P13"><text:span text:style-name="T8"><text:s text:c="4"/></text:span><text:span text:style-name="T8">if proxima:</text:span></text:p>
            <text:p text:style-name="P13"><text:span text:style-name="T8"><text:s text:c="8"/></text:span><text:span text:style-name="T8">link = proxima.find('a')['href']</text:span></text:p>
            <text:p text:style-name="P13"><text:span text:style-name="T8"><text:s text:c="8"/></text:span><text:span text:style-name="T8">url = 'https://quotes.toscrape.com' + link</text:span></text:p>
            <text:p text:style-name="P13"><text:span text:style-name="T8"><text:s text:c="4"/></text:span><text:span text:style-name="T8">else:</text:span></text:p>
            <text:p text:style-name="P13"><text:span text:style-name="T8"><text:s text:c="8"/></text:span><text:span text:style-name="T8">url = None</text:span></text:p>
          </draw:text-box>
        </draw:frame>
        <draw:frame draw:name="Google Shape;151;p21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152;p21" draw:style-name="gr3" draw:text-style-name="P6" xml:id="id7" draw:id="id7" draw:layer="layout" svg:width="18.44cm" svg:height="1.356cm" svg:x="5.372cm" svg:y="5.539cm">
          <text:p text:style-name="P16"><text:span text:style-name="T7">Loop para acessar as páginas extraídas com scraping do hr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6;g3dabf49d528_0_43:notes" draw:style-name="gr2" draw:layer="layout" svg:width="12.699cm" svg:height="9.524cm" svg:x="3.176cm" svg:y="1.905cm" draw:page-number="9" presentation:class="page"/>
          <draw:frame draw:name="Google Shape;147;g3dabf49d528_0_43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157;p22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158;p22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Aplicaçõe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Motores de busca;</text:span></text:p>
                  </text:list-item>
                </text:list>
              </text:list-item>
            </text:list>
            <text:p text:style-name="P12"><text:span text:style-name="T4"/></text:p>
            <text:list text:style-name="L7">
              <text:list-item>
                <text:list>
                  <text:list-item>
                    <text:p text:style-name="P15"><text:span text:style-name="T5">Controle de bugs e estruturação de páginas de um portal.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16"><text:span text:style-name="T5">Permite buscar links quebrados e duplicados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  <text:list text:continue-numbering="true" text:style-name="L16">
              <text:list-item>
                <text:list>
                  <text:list-item>
                    <text:p text:style-name="P15"><text:span text:style-name="T5">Monitoramento de preços de um produto em diversos sites.</text:span></text:p>
                    <text:list>
                      <text:list-item>
                        <text:p text:style-name="P16"><text:span text:style-name="T5">Exemplo que necessita de WC com W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59;p22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54;g3599adff289_0_12:notes" draw:style-name="gr2" draw:layer="layout" svg:width="12.699cm" svg:height="9.524cm" svg:x="3.176cm" svg:y="1.905cm" draw:page-number="10" presentation:class="page"/>
          <draw:frame draw:name="Google Shape;155;g3599adff289_0_12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164;p23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165;p2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Não existe classificação explícita e definida na literatura, porém há duas formas elementares de implementação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Criar uma lista de páginas pré-definidas que é usada como base para o script;</text:span></text:p>
                  </text:list-item>
                </text:list>
              </text:list-item>
            </text:list>
            <text:p text:style-name="P12"><text:span text:style-name="T4"/></text:p>
            <text:list text:style-name="L7">
              <text:list-item>
                <text:list>
                  <text:list-item>
                    <text:p text:style-name="P15"><text:span text:style-name="T5">Não usar lista inicial de páginas. O crawling acontece a partir da navegação entre os elementos HTML da página em busca de links internos ou externos.</text:span></text:p>
                  </text:list-item>
                </text:list>
              </text:list-item>
            </text:list>
          </draw:text-box>
        </draw:frame>
        <draw:frame draw:name="Google Shape;166;p23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61;g3599adff289_0_18:notes" draw:style-name="gr2" draw:layer="layout" svg:width="12.699cm" svg:height="9.524cm" svg:x="3.176cm" svg:y="1.905cm" draw:page-number="11" presentation:class="page"/>
          <draw:frame draw:name="Google Shape;162;g3599adff289_0_1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171;p24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172;p24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Caso 1: criar uma lista de páginas pré-definidas. Nesse caso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O script fica limitado a visitar somente as páginas da lista;</text:span></text:p>
                  </text:list-item>
                  <text:list-item>
                    <text:p text:style-name="P11"><text:span text:style-name="T5">Tem-se garantia sobre a fiabilidade do conteúdo;</text:span></text:p>
                  </text:list-item>
                  <text:list-item>
                    <text:p text:style-name="P11"><text:span text:style-name="T5">Teoricamente, o código é mais simples. Análise do robots.txt é feito previamente.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draw:frame draw:name="Google Shape;173;p24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68;g3599adff289_0_54:notes" draw:style-name="gr2" draw:layer="layout" svg:width="12.699cm" svg:height="9.524cm" svg:x="3.176cm" svg:y="1.905cm" draw:page-number="12" presentation:class="page"/>
          <draw:frame draw:name="Google Shape;169;g3599adff289_0_54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178;p25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179;p25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Caso 2: sem lista prévia de página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Sempre que um link é encontrado, é enviado para um conjunto (</text:span><text:span text:style-name="T6">set()</text:span><text:span text:style-name="T5">) python e após varrer o HTML em busca de todos os links, o script começa a acessar cada um deles, repetindo esse processo para cada página acessada;</text:span></text:p>
                  </text:list-item>
                </text:list>
              </text:list-item>
            </text:list>
            <text:p text:style-name="P12"><text:span text:style-name="T4"/></text:p>
            <text:list text:style-name="L7">
              <text:list-item>
                <text:list>
                  <text:list-item>
                    <text:p text:style-name="P15"><text:span text:style-name="T5">Não tem-se a garantia sobre a qualidade do conteúdo das páginas;</text:span></text:p>
                  </text:list-item>
                </text:list>
              </text:list-item>
            </text:list>
            <text:p text:style-name="P12"><text:span text:style-name="T4"/></text:p>
            <text:list text:continue-numbering="true" text:style-name="L7">
              <text:list-item>
                <text:list>
                  <text:list-item>
                    <text:p text:style-name="P15"><text:span text:style-name="T5">Deve-se fazer uma análise do robots.txt a nível de código.</text:span></text:p>
                  </text:list-item>
                </text:list>
              </text:list-item>
            </text:list>
          </draw:text-box>
        </draw:frame>
        <draw:frame draw:name="Google Shape;180;p25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75;g3599adff289_0_60:notes" draw:style-name="gr2" draw:layer="layout" svg:width="12.699cm" svg:height="9.524cm" svg:x="3.176cm" svg:y="1.905cm" draw:page-number="13" presentation:class="page"/>
          <draw:frame draw:name="Google Shape;176;g3599adff289_0_60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185;p26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186;p26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Quando utilizar?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A utilização de um scraping isolado ou alinhado com um crawling depende do objetivo do projeto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1"><text:span text:style-name="T5">Somente WS: quando é possível extrair tudo em uma única página;</text:span></text:p>
                      </text:list-item>
                      <text:list-item>
                        <text:p text:style-name="P11"><text:span text:style-name="T5">WS e WC: quando é necessário buscar em fontes diferentes. Nesse caso deve-se definir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Se um conjunto pré-definido de páginas resolve;</text:span></text:p>
                          </text:list-item>
                          <text:list-item>
                            <text:p text:style-name="P11"><text:span text:style-name="T5">Se é necessário rastrear na web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87;p26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182;g3599adff289_0_24:notes" draw:style-name="gr2" draw:layer="layout" svg:width="12.699cm" svg:height="9.524cm" svg:x="3.176cm" svg:y="1.905cm" draw:page-number="14" presentation:class="page"/>
          <draw:frame draw:name="Google Shape;183;g3599adff289_0_24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192;p27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193;p27" presentation:style-name="pr2" draw:text-style-name="P5" draw:layer="layout" svg:width="22.859cm" svg:height="14.604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Cuidados na estruturação de um web crawling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Verificar o que está sendo buscado. Sempre que possível opte pela lista pré-definida de páginas. Isso garante que o conteúdo acessado </text:span><text:span text:style-name="T7">vai de acordo com o esperado</text:span><text:span text:style-name="T5">.</text:span></text:p>
                  </text:list-item>
                  <text:list-item>
                    <text:p text:style-name="P11"><text:span text:style-name="T5">Deve-se verificar se é</text:span><text:span text:style-name="T7"> realmente necessário capturar dados</text:span><text:span text:style-name="T5"> de todas as páginas ou só de algumas das visitadas;</text:span></text:p>
                  </text:list-item>
                  <text:list-item>
                    <text:p text:style-name="P11"><text:span text:style-name="T7">Cuidar sobrecarga do servidor</text:span><text:span text:style-name="T5"> acessado devido ao excesso de requisições;</text:span></text:p>
                  </text:list-item>
                  <text:list-item>
                    <text:p text:style-name="P11"><text:span text:style-name="T5">Evitar </text:span><text:span text:style-name="T7">acesso recorrente</text:span><text:span text:style-name="T5"> a links já visitados;</text:span></text:p>
                  </text:list-item>
                </text:list>
              </text:list-item>
            </text:list>
            <text:p text:style-name="P14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list text:style-name="L7">
              <text:list-item>
                <text:list>
                  <text:list-item>
                    <text:p text:style-name="P15"><text:span text:style-name="T5">Cuidar estrutura do scraping. Sites diferentes possuem estruturas diferentes.</text:span></text:p>
                  </text:list-item>
                </text:list>
              </text:list-item>
            </text:list>
          </draw:text-box>
        </draw:frame>
        <draw:frame draw:name="Google Shape;194;p27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g draw:name="Google Shape;195;p27">
          <draw:g draw:name="Google Shape;196;p27">
            <draw:custom-shape draw:name="Google Shape;197;p27" draw:style-name="gr3" draw:text-style-name="P6" draw:layer="layout" svg:width="2.942cm" svg:height="1.185cm" svg:x="6.715cm" svg:y="13.373cm">
              <text:p text:style-name="P1"><text:span text:style-name="T11">index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98;p27" draw:style-name="gr3" draw:text-style-name="P6" draw:layer="layout" svg:width="2.942cm" svg:height="1.185cm" svg:x="10.525cm" svg:y="12.599cm">
              <text:p text:style-name="P1"><text:span text:style-name="T11">página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99;p27" draw:style-name="gr3" draw:text-style-name="P6" draw:layer="layout" svg:width="3.748cm" svg:height="1.185cm" svg:x="18.719cm" svg:y="12.514cm">
              <text:p text:style-name="P1"><text:span text:style-name="T11">subsubpag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00;p27" draw:style-name="gr3" draw:text-style-name="P6" draw:layer="layout" svg:width="2.942cm" svg:height="1.185cm" svg:x="14.577cm" svg:y="11.825cm">
              <text:p text:style-name="P1"><text:span text:style-name="T11">subpag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01;p27" draw:style-name="gr3" draw:text-style-name="P6" draw:layer="layout" svg:width="2.942cm" svg:height="1.185cm" svg:x="14.567cm" svg:y="13.243cm">
              <text:p text:style-name="P1"><text:span text:style-name="T11">subpag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02;p27" draw:style-name="gr3" draw:text-style-name="P6" draw:layer="layout" svg:width="4.031cm" svg:height="1.185cm" svg:x="18.588cm" svg:y="13.878cm">
              <text:p text:style-name="P1"><text:span text:style-name="T11">subsubpag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03;p27" draw:style-name="gr3" draw:text-style-name="P6" draw:layer="layout" svg:width="2.942cm" svg:height="1.185cm" svg:x="10.525cm" svg:y="14.081cm">
              <text:p text:style-name="P1"><text:span text:style-name="T11">página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04;p27" draw:style-name="gr4" draw:text-style-name="P17" draw:layer="layout" svg:width="0.866cm" svg:height="0.773cm" draw:transform="rotate (-3.14159265358979) translate (10.525cm 13.972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05;p27" draw:style-name="gr4" draw:text-style-name="P17" draw:layer="layout" svg:width="0.866cm" svg:height="0.707cm" svg:x="9.658cm" svg:y="13.97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06;p27" draw:style-name="gr4" draw:text-style-name="P17" draw:layer="layout" svg:width="1.107cm" svg:height="0.773cm" draw:transform="rotate (-3.14159265358979) translate (14.575cm 13.198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07;p27" draw:style-name="gr4" draw:text-style-name="P17" draw:layer="layout" svg:width="1.097cm" svg:height="0.643cm" svg:x="13.468cm" svg:y="13.1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08;p27" draw:style-name="gr4" draw:text-style-name="P17" draw:layer="layout" svg:width="1.208cm" svg:height="0.728cm" draw:transform="rotate (-3.14159265358979) translate (18.719cm 13.842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09;p27" draw:style-name="gr4" draw:text-style-name="P17" draw:layer="layout" svg:width="1.077cm" svg:height="0.634cm" svg:x="17.51cm" svg:y="13.842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210;p27" draw:style-name="gr5" draw:text-style-name="P17" draw:layer="layout" svg:width="1.097cm" svg:height="0.837cm" draw:transform="rotate (-3.14159265358979) translate (14.565cm 14.679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189;g3599adff289_0_30:notes" draw:style-name="gr2" draw:layer="layout" svg:width="12.699cm" svg:height="9.524cm" svg:x="3.176cm" svg:y="1.905cm" draw:page-number="15" presentation:class="page"/>
          <draw:frame draw:name="Google Shape;190;g3599adff289_0_30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215;p28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216;p28" presentation:style-name="pr2" draw:text-style-name="P5" draw:layer="layout" svg:width="22.859cm" svg:height="1.61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Evitar acesso recorrente à páginas já visitadas.</text:span></text:p>
              </text:list-item>
            </text:list>
          </draw:text-box>
        </draw:frame>
        <draw:frame draw:name="Google Shape;217;p28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218;p28" draw:style-name="gr3" draw:text-style-name="P6" draw:layer="layout" svg:width="19.386cm" svg:height="5.164cm" svg:x="2.157cm" svg:y="6.703cm">
          <text:p text:style-name="P16"><text:span text:style-name="T12">visitados = set()</text:span></text:p>
          <text:p text:style-name="P16"><text:span text:style-name="T12"/></text:p>
          <text:p text:style-name="P16"><text:span text:style-name="T12">while url </text:span><text:span text:style-name="T13">and url not in visitados</text:span><text:span text:style-name="T12">:</text:span></text:p>
          <text:p text:style-name="P16"><text:span text:style-name="T12"><text:s text:c="4"/></text:span><text:span text:style-name="T12">print(f"Acessando: {url}")</text:span></text:p>
          <text:p text:style-name="P16"><text:span text:style-name="T12"><text:s text:c="4"/></text:span><text:span text:style-name="T12">visitados.add(ur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8" draw:style-name="gr3" draw:text-style-name="P6" draw:layer="layout" svg:width="21.972cm" svg:height="3.557cm" svg:x="2.157cm" svg:y="13.13cm">
          <text:p text:style-name="P16"><text:span text:style-name="T9">Cria um conjunto (</text:span><text:span text:style-name="T14">set()</text:span><text:span text:style-name="T9">), estrutura semelhante a lista mas não permite elementos repetidos.</text:span></text:p>
          <text:p text:style-name="P16"><text:span text:style-name="T9">Loop para iterar sobre os elementos do conju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3dabf49d528_0_54:notes" draw:style-name="gr2" draw:layer="layout" svg:width="12.699cm" svg:height="9.524cm" svg:x="3.176cm" svg:y="1.905cm" draw:page-number="16" presentation:class="page"/>
          <draw:frame draw:name="Google Shape;213;g3dabf49d528_0_54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224;p29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225;p29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Exemplo de código:</text:span></text:p>
              </text:list-item>
            </text:list>
          </draw:text-box>
        </draw:frame>
        <draw:frame draw:name="Google Shape;226;p29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Google Shape;227;p29" draw:style-name="gr6" draw:text-style-name="P17" draw:layer="layout" svg:width="11.792cm" svg:height="14.024cm" svg:x="9.785cm" svg:y="4.646cm">
          <draw:image xlink:href="Pictures/1000000000000187000001D1E69EC22D3069AED4.png" xlink:type="simple" xlink:show="embed" xlink:actuate="onLoad">
            <text:p/>
          </draw:image>
        </draw:frame>
        <presentation:notes draw:style-name="dp2">
          <draw:page-thumbnail draw:name="Google Shape;221;g3599adff289_0_36:notes" draw:style-name="gr2" draw:layer="layout" svg:width="12.699cm" svg:height="9.524cm" svg:x="3.176cm" svg:y="1.905cm" draw:page-number="17" presentation:class="page"/>
          <draw:frame draw:name="Google Shape;222;g3599adff289_0_36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232;p30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233;p30" presentation:style-name="pr2" draw:text-style-name="P5" draw:layer="layout" svg:width="22.859cm" svg:height="14.225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Surface web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Páginas indexadas pelos motores de busca;</text:span></text:p>
                  </text:list-item>
                </text:list>
              </text:list-item>
            </text:list>
            <text:p text:style-name="P13"><text:span text:style-name="T4"/></text:p>
            <text:list text:continue-numbering="true" text:style-name="L6">
              <text:list-item>
                <text:p text:style-name="P13"><text:span text:style-name="T4">Deep web:</text:span></text:p>
                <text:list>
                  <text:list-item>
                    <text:p text:style-name="P16"><text:span text:style-name="T5">O que não faz parte da surface web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6"><text:span text:style-name="T5">Conteúdo protegido por login (email, intranet, etc);</text:span></text:p>
                      </text:list-item>
                      <text:list-item>
                        <text:p text:style-name="P16"><text:span text:style-name="T5">Bancos de dados acadêmicos ou jurídicos;</text:span></text:p>
                      </text:list-item>
                      <text:list-item>
                        <text:p text:style-name="P16"><text:span text:style-name="T5">Páginas com resultados dinâmicos (passagens aéreas);</text:span></text:p>
                      </text:list-item>
                      <text:list-item>
                        <text:p text:style-name="P16"><text:span text:style-name="T5">Uso legal. Apenas não é pesquisável.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/></text:p>
            <text:list text:continue-numbering="true" text:style-name="L17">
              <text:list-item>
                <text:p text:style-name="P13"><text:span text:style-name="T4">Dark web:</text:span></text:p>
                <text:list>
                  <text:list-item>
                    <text:p text:style-name="P16"><text:span text:style-name="T5">Subconjunto da deep web que foca no anonimato e privacidade;</text:span></text:p>
                  </text:list-item>
                  <text:list-item>
                    <text:p text:style-name="P16"><text:span text:style-name="T5">Acessível por softwares específicos;</text:span></text:p>
                  </text:list-item>
                  <text:list-item>
                    <text:p text:style-name="P16"><text:span text:style-name="T5">Parcialmente legal. Exemplos:</text:span></text:p>
                    <text:list>
                      <text:list-item>
                        <text:p text:style-name="P16"><text:span text:style-name="T5">Fóruns secretos de jornalistas em países autoritários;</text:span></text:p>
                      </text:list-item>
                      <text:list-item>
                        <text:p text:style-name="P16"><text:span text:style-name="T5">Atividades ilegais (tráficos, hackers, comércio ilegal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34;p30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229;g3599adff289_0_42:notes" draw:style-name="gr2" draw:layer="layout" svg:width="12.699cm" svg:height="9.524cm" svg:x="3.176cm" svg:y="1.905cm" draw:page-number="18" presentation:class="page"/>
          <draw:frame draw:name="Google Shape;230;g3599adff289_0_42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 pouco sobre a ética…" draw:style-name="dp1" draw:master-page-name="OBJECT" presentation:presentation-page-layout-name="AL1T11">
        <draw:frame draw:name="Google Shape;239;p31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Um pouco sobre a ética…</text:span></text:p>
          </draw:text-box>
        </draw:frame>
        <draw:frame draw:name="Google Shape;240;p31" presentation:style-name="pr2" draw:text-style-name="P5" draw:layer="layout" svg:width="22.859cm" svg:height="4.365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robots.txt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Arquivo de texto simples, público, localizado na raíz do domínio;</text:span></text:p>
                  </text:list-item>
                  <text:list-item>
                    <text:p text:style-name="P11"><text:span text:style-name="T5">Não é um </text:span><text:span text:style-name="T6">firewall </text:span><text:span text:style-name="T5">ou mecanismo de segurança.</text:span></text:p>
                  </text:list-item>
                  <text:list-item>
                    <text:p text:style-name="P11"><text:span text:style-name="T5">Estrutura básica:</text:span></text:p>
                  </text:list-item>
                </text:list>
              </text:list-item>
            </text:list>
          </draw:text-box>
        </draw:frame>
        <draw:frame draw:name="Google Shape;241;p31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242;p31" draw:style-name="gr3" draw:text-style-name="P6" draw:layer="layout" svg:width="9.137cm" svg:height="5.843cm" svg:x="5.06cm" svg:y="8.096cm">
          <text:p text:style-name="P16"><text:span text:style-name="T15">User-agent: *</text:span></text:p>
          <text:p text:style-name="P16"><text:span text:style-name="T15">Disallow: /admin/</text:span></text:p>
          <text:p text:style-name="P16"><text:span text:style-name="T15">Disallow: /privado/</text:span></text:p>
          <text:p text:style-name="P16"><text:span text:style-name="T15">Allow: /admin/publico/</text:span></text:p>
          <text:p text:style-name="P16"><text:span text:style-name="T15"/></text:p>
          <text:p text:style-name="P16"><text:span text:style-name="T15">User-agent: BadBot</text:span></text:p>
          <text:p text:style-name="P16"><text:span text:style-name="T15">Disallow: 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1" draw:style-name="gr3" draw:text-style-name="P6" draw:layer="layout" svg:width="23.405cm" svg:height="3.897cm" svg:x="1.27cm" svg:y="13.907cm">
          <text:list text:style-name="L19">
            <text:list-item>
              <text:p text:style-name="P11"><text:span text:style-name="T5">Ou seja: </text:span></text:p>
            </text:list-item>
          </text:list>
          <text:list text:style-name="L20">
            <text:list-item>
              <text:list>
                <text:list-item>
                  <text:p text:style-name="P11"><text:span text:style-name="T5">Qualquer robô está proibido de acessar as pastas /admin/ e /privado/, com exceção da subpasta /admin/publico/;</text:span></text:p>
                </text:list-item>
                <text:list-item>
                  <text:p text:style-name="P11"><text:span text:style-name="T5">BadBot não tem autorização a nad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3da76fe502a_0_0:notes" draw:style-name="gr2" draw:layer="layout" svg:width="12.699cm" svg:height="9.524cm" svg:x="3.176cm" svg:y="1.905cm" draw:page-number="19" presentation:class="page"/>
          <draw:frame draw:name="Google Shape;237;g3da76fe502a_0_0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r permissões no robots.txt" draw:style-name="dp1" draw:master-page-name="OBJECT" presentation:presentation-page-layout-name="AL1T11">
        <draw:frame draw:name="Google Shape;248;p32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6"><text:span text:style-name="T1">Verificar permissões no robots.txt</text:span></text:p>
          </draw:text-box>
        </draw:frame>
        <draw:frame draw:name="Google Shape;249;p32" presentation:style-name="pr23" draw:text-style-name="P5" draw:layer="layout" svg:width="22.859cm" svg:height="13.839cm" svg:x="0.351cm" svg:y="4.511cm" presentation:class="outline" presentation:user-transformed="true">
          <draw:text-box>
            <text:p text:style-name="P18"><text:span text:style-name="T8">import urllib.robotparser</text:span></text:p>
            <text:p text:style-name="P18"><text:span text:style-name="T8"/></text:p>
            <text:p text:style-name="P18"><text:span text:style-name="T8">rp = urllib.robotparser.RobotFileParser()</text:span></text:p>
            <text:p text:style-name="P18"><text:span text:style-name="T8">rp.set_url("https://quotes.toscrape.com/robots.txt")</text:span></text:p>
            <text:p text:style-name="P18"><text:span text:style-name="T8">rp.read()</text:span></text:p>
            <text:p text:style-name="P18"><text:span text:style-name="T8"/></text:p>
            <text:p text:style-name="P18"><text:span text:style-name="T8"/></text:p>
            <text:p text:style-name="P18"><text:span text:style-name="T8">user_agent = "*"</text:span></text:p>
            <text:p text:style-name="P18"><text:span text:style-name="T8"/></text:p>
            <text:p text:style-name="P18"><text:span text:style-name="T8">url = "https://quotes.toscrape.com/page/1/"</text:span></text:p>
            <text:p text:style-name="P18"><text:span text:style-name="T8"/></text:p>
            <text:p text:style-name="P18"><text:span text:style-name="T8">if rp.can_fetch(user_agent, url):</text:span></text:p>
            <text:p text:style-name="P18"><text:span text:style-name="T8"><text:s text:c="4"/></text:span><text:span text:style-name="T8">print("Acesso permitido")</text:span></text:p>
            <text:p text:style-name="P18"><text:span text:style-name="T8">else:</text:span></text:p>
            <text:p text:style-name="P18"><text:span text:style-name="T8"><text:s text:c="4"/></text:span><text:span text:style-name="T8">print("Acesso bloqueado")</text:span></text:p>
            <text:p text:style-name="P18"><text:span text:style-name="T8"><text:tab/></text:span><text:span text:style-name="T8"> </text:span><text:span text:style-name="T8">break</text:span></text:p>
          </draw:text-box>
        </draw:frame>
        <draw:frame draw:name="Google Shape;250;p32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Google Shape;251;p32" draw:style-name="gr3" draw:text-style-name="P6" xml:id="id8" draw:id="id8" draw:layer="layout" svg:width="14.232cm" svg:height="1.271cm" svg:x="10.477cm" svg:y="4.292cm">
          <text:p text:style-name="P16"><text:span text:style-name="T16"># importa biblioteca para ler o arquivo robots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2" draw:style-name="gr3" draw:text-style-name="P6" xml:id="id9" draw:id="id9" draw:layer="layout" svg:width="9.029cm" svg:height="1.271cm" svg:x="16.79cm" svg:y="5.998cm">
          <text:p text:style-name="P16"><text:span text:style-name="T16"># cria objeto para interpre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2" draw:style-name="gr3" draw:text-style-name="P6" xml:id="id10" draw:id="id10" draw:layer="layout" svg:width="10.784cm" svg:height="1.118cm" svg:x="4.367cm" svg:y="7.907cm">
          <text:p text:style-name="P18"><text:span text:style-name="T16"># acessa, baixa e interpreta o arqu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2" draw:style-name="gr3" draw:text-style-name="P6" xml:id="id11" draw:id="id11" draw:layer="layout" svg:width="11.82cm" svg:height="1.727cm" svg:x="13.579cm" svg:y="13.626cm">
          <text:p text:style-name="P18"><text:span text:style-name="T16"># verifica se o user_agent tem permissão para acessar a pág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55;p32" xml:id="id12" draw:id="id12">
          <draw:custom-shape draw:name="Google Shape;256;p32" draw:style-name="gr3" draw:text-style-name="P6" draw:layer="layout" svg:width="11.82cm" svg:height="1.118cm" svg:x="13.745cm" svg:y="15.37cm">
            <text:p text:style-name="P18"><text:span text:style-name="T16"># crawling e scraping continuam neste i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7;p32" draw:style-name="gr5" draw:text-style-name="P17" draw:layer="layout" svg:width="1.608cm" svg:height="0.672cm" draw:transform="rotate (-3.14159265358979) translate (13.745cm 15.934cm)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45;g3dabf49d528_0_79:notes" draw:style-name="gr2" draw:layer="layout" svg:width="12.699cm" svg:height="9.524cm" svg:x="3.176cm" svg:y="1.905cm" draw:page-number="20" presentation:class="page"/>
          <draw:frame draw:name="Google Shape;246;g3dabf49d528_0_79:notes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 três pilares da ética no crawling" draw:style-name="dp1" draw:master-page-name="OBJECT" presentation:presentation-page-layout-name="AL1T11">
        <draw:frame draw:name="Google Shape;262;p33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6"><text:span text:style-name="T1">Os três pilares da ética no crawling</text:span></text:p>
          </draw:text-box>
        </draw:frame>
        <draw:frame draw:name="Google Shape;263;p33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Respeito a infraestrutura (DDoS acidental)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Script com um loop sem nenhum </text:span><text:span text:style-name="T6">time.sleep() </text:span><text:span text:style-name="T5">pode fazer dezenas ou centenas de requisições por segundo. Em sites pequenos, isso </text:span><text:span text:style-name="T7">pode consomir toda a banda e os recursos do servidor</text:span><text:span text:style-name="T5">, tirando o site do ar. Na prática, um ataque de Negação de Serviço (DDoS).</text:span></text:p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6">
              <text:list-item>
                <text:p text:style-name="P13"><text:span text:style-name="T4">Transparência e identificação:</text:span></text:p>
                <text:list>
                  <text:list-item>
                    <text:p text:style-name="P16"><text:span text:style-name="T5">O User-Agent padrão da biblioteca </text:span><text:span text:style-name="T6">requests </text:span><text:span text:style-name="T5">é algo como python-requests/2.28.1. Isso parece suspeito para servidores. </text:span><text:span text:style-name="T7">É boa prática alterar o cabeçalho HTTP para se identificar</text:span><text:span text:style-name="T5">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6"><text:span text:style-name="T5">{'User-Agent': 'BotEstudoUFSM/1.0 (seu_email@ufsm.br)'}</text:span></text:p>
                      </text:list-item>
                    </text:list>
                  </text:list-item>
                  <text:list-item>
                    <text:p text:style-name="P16"><text:span text:style-name="T5">Dessa forma, se o bot causar problemas, o administrador do sistema sabe quem contatar em vez de apenas bloquear o IP da universidade.</text:span></text:p>
                  </text:list-item>
                </text:list>
              </text:list-item>
            </text:list>
          </draw:text-box>
        </draw:frame>
        <draw:frame draw:name="Google Shape;264;p33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259;g3da76fe502a_0_10:notes" draw:style-name="gr2" draw:layer="layout" svg:width="12.699cm" svg:height="9.524cm" svg:x="3.176cm" svg:y="1.905cm" draw:page-number="21" presentation:class="page"/>
          <draw:frame draw:name="Google Shape;260;g3da76fe502a_0_10:notes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 três pilares da ética no crawling" draw:style-name="dp1" draw:master-page-name="OBJECT" presentation:presentation-page-layout-name="AL1T11">
        <draw:frame draw:name="Google Shape;269;p34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6"><text:span text:style-name="T1">Os três pilares da ética no crawling</text:span></text:p>
          </draw:text-box>
        </draw:frame>
        <draw:frame draw:name="Google Shape;270;p34" presentation:style-name="pr2" draw:text-style-name="P5" draw:layer="layout" svg:width="22.859cm" svg:height="12.572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A Natureza dos Dados (Público vs. Privado)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7">Dado Público</text:span><text:span text:style-name="T5">: 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1"><text:span text:style-name="T5">Se o dado é acessível a qualquer usuário não logado na internet, geralmente é aceitável raspar (respeitando a infraestrutura e os direitos autorais para fins de republicação).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/></text:p>
            <text:list text:style-name="L16">
              <text:list-item>
                <text:list>
                  <text:list-item>
                    <text:p text:style-name="P15"><text:span text:style-name="T17">Áreas Autenticadas</text:span><text:span text:style-name="T5">: </text:span></text:p>
                    <text:list>
                      <text:list-item>
                        <text:p text:style-name="P16"><text:span text:style-name="T5">O cenário muda quando o crawler precisa fazer login (inserir usuário e senha) para acessar os dados;</text:span></text:p>
                      </text:list-item>
                      <text:list-item>
                        <text:p text:style-name="P16"><text:span text:style-name="T5">Ao fazer login, o usuário aceita os "Termos de Serviço" (ToS) da plataforma, que </text:span><text:span text:style-name="T7">quase sempre proíbem explicitamente a raspagem automatizada</text:span><text:span text:style-name="T5"> (ex.: LinkedIn ou Facebook). Tenha cuidado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71;p34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Google Shape;266;g3da76fe502a_0_16:notes" draw:style-name="gr2" draw:layer="layout" svg:width="12.699cm" svg:height="9.524cm" svg:x="3.176cm" svg:y="1.905cm" draw:page-number="22" presentation:class="page"/>
          <draw:frame draw:name="Google Shape;267;g3da76fe502a_0_16:notes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crawling" draw:style-name="dp1" draw:master-page-name="OBJECT" presentation:presentation-page-layout-name="AL1T11">
        <draw:frame draw:name="Google Shape;276;p35" presentation:style-name="pr1" draw:text-style-name="P2" draw:layer="layout" svg:width="22.859cm" svg:height="3.175cm" svg:x="1.27cm" svg:y="0.763cm" presentation:class="title" presentation:user-transformed="true">
          <draw:text-box>
            <text:p text:style-name="P1"><text:span text:style-name="T1">Web crawling</text:span></text:p>
          </draw:text-box>
        </draw:frame>
        <draw:frame draw:name="Google Shape;277;p35" presentation:style-name="pr2" draw:text-style-name="P5" draw:layer="layout" svg:width="22.859cm" svg:height="7.609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Exercício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Acessar o site quotes.toscrape.com;</text:span></text:p>
                  </text:list-item>
                  <text:list-item>
                    <text:p text:style-name="P11"><text:span text:style-name="T5">Extrair todas as citações da página;</text:span></text:p>
                  </text:list-item>
                  <text:list-item>
                    <text:p text:style-name="P11"><text:span text:style-name="T5">Identificar o link da próxima página (botão “next”);</text:span></text:p>
                  </text:list-item>
                  <text:list-item>
                    <text:p text:style-name="P11"><text:span text:style-name="T5">Exibir esse link na tela;</text:span></text:p>
                  </text:list-item>
                </text:list>
              </text:list-item>
            </text:list>
            <text:p text:style-name="P12"><text:span text:style-name="T4"/></text:p>
            <text:list text:continue-numbering="true" text:style-name="L6">
              <text:list-item>
                <text:p text:style-name="P13"><text:span text:style-name="T4">O que precisamos fazer para acessar as próximas páginas? </text:span></text:p>
              </text:list-item>
            </text:list>
          </draw:text-box>
        </draw:frame>
        <draw:frame draw:name="Google Shape;278;p35" presentation:style-name="pr3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Google Shape;279;p35" presentation:style-name="pr2" draw:text-style-name="P5" xml:id="id13" draw:id="id13" draw:layer="layout" svg:width="22.859cm" svg:height="7.609cm" svg:x="1.277cm" svg:y="10.137cm" presentation:class="outline" presentation:user-transformed="true">
          <draw:text-box>
            <text:p text:style-name="P14"><text:span text:style-name="T4"/></text:p>
            <text:list text:style-name="L9">
              <text:list-item>
                <text:list>
                  <text:list-item>
                    <text:p text:style-name="P15"><text:span text:style-name="T5">Acesse manualmente a próxima página (copiando a URL);</text:span></text:p>
                  </text:list-item>
                  <text:list-item>
                    <text:p text:style-name="P16"><text:span text:style-name="T5">Compare os resultados com a página anterior.</text:span></text:p>
                  </text:list-item>
                </text:list>
              </text:list-item>
            </text:list>
            <text:p text:style-name="P14"><text:span text:style-name="T4"/></text:p>
            <text:list text:style-name="L6">
              <text:list-item>
                <text:p text:style-name="P13"><text:span text:style-name="T4">Como automatizar esse processo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73;g3599adff289_0_48:notes" draw:style-name="gr2" draw:layer="layout" svg:width="12.699cm" svg:height="9.524cm" svg:x="3.176cm" svg:y="1.905cm" draw:page-number="23" presentation:class="page"/>
          <draw:frame draw:name="Google Shape;274;g3599adff289_0_48:notes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2;p2" presentation:style-name="OBJECT-title" draw:layer="backgroundobjects" svg:width="22.859cm" svg:height="3.175cm" svg:x="1.27cm" svg:y="0.763cm" presentation:class="title" presentation:placeholder="true" presentation:user-transformed="true">
        <draw:text-box/>
      </draw:frame>
      <draw:frame draw:name="Google Shape;13;p2" presentation:style-name="OBJECT-outline1" draw:layer="backgroundobjects" svg:width="22.859cm" svg:height="12.572cm" svg:x="1.27cm" svg:y="4.445cm" presentation:class="outline" presentation:placeholder="true" presentation:user-transformed="true">
        <draw:text-box/>
      </draw:frame>
      <draw:frame draw:name="Google Shape;14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7;p2" draw:style-name="Mgr3" draw:text-style-name="MP7" draw:layer="backgroundobjects" svg:width="22.1cm" svg:height="0.001cm" svg:x="0cm" svg:y="4.32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2" draw:style-name="Mgr4" draw:text-style-name="MP7" draw:layer="backgroundobjects" svg:width="5.027cm" svg:height="3.682cm" svg:x="19.004cm" svg:y="0.521cm">
        <draw:image xlink:href="Pictures/10000201000001DA0000015B5D9DBE45C88A5E6E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5"/>
    <meta:generator>LibreOfficeDev/6.0.5.2$Linux_X86_64 LibreOffice_project/</meta:generator>
  </office:meta>
</office:document-meta>
</file>