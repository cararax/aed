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A0000015B5D9DBE45C88A5E6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.953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.953cm" fo:margin-right="0cm" fo:margin-top="0.127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4" style:family="paragraph">
      <style:paragraph-properties fo:margin-left="1.27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18" style:family="paragraph">
      <style:paragraph-properties fo:margin-left="2.54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69cm" fo:margin-bottom="0cm" fo:line-height="90%" fo:text-align="start" fo:text-indent="0cm" style:writing-mode="lr-tb"/>
    </style:style>
    <style:style style:name="P21" style:family="paragraph">
      <style:paragraph-properties fo:margin-left="1.27cm" fo:margin-right="0cm" fo:margin-top="0.169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169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353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8" style:family="text">
      <style:text-properties fo:font-variant="normal" fo:text-transform="none" fo:color="#080808" style:text-line-through-style="none" style:text-line-through-type="none" style:text-position="0% 100%" style:font-name="Consolas" fo:font-size="15pt" fo:letter-spacing="normal" fo:font-style="normal" style:text-underline-style="none" fo:font-weight="normal" style:font-name-asian="Consolas" style:font-size-asian="15pt" style:font-style-asian="normal" style:font-weight-asian="normal" style:font-name-complex="Consolas" style:font-size-complex="15pt" style:font-style-complex="normal" style:font-weight-complex="normal"/>
    </style:style>
    <style:style style:name="T9" style:family="text">
      <style:text-properties fo:font-variant="normal" fo:text-transform="none" fo:color="#067d17" style:text-line-through-style="none" style:text-line-through-type="none" style:text-position="0% 100%" style:font-name="Consolas" fo:font-size="15pt" fo:letter-spacing="normal" fo:font-style="normal" style:text-underline-style="none" fo:font-weight="normal" style:font-name-asian="Consolas" style:font-size-asian="15pt" style:font-style-asian="normal" style:font-weight-asian="normal" style:font-name-complex="Consolas" style:font-size-complex="15pt" style:font-style-complex="normal" style:font-weight-complex="normal"/>
    </style:style>
    <style:style style:name="T10" style:family="text">
      <style:text-properties fo:font-variant="normal" fo:text-transform="none" fo:color="#0033b3" style:text-line-through-style="none" style:text-line-through-type="none" style:text-position="0% 100%" style:font-name="Consolas" fo:font-size="15pt" fo:letter-spacing="normal" fo:font-style="normal" style:text-underline-style="none" fo:font-weight="normal" style:font-name-asian="Consolas" style:font-size-asian="15pt" style:font-style-asian="normal" style:font-weight-asian="normal" style:font-name-complex="Consolas" style:font-size-complex="15pt" style:font-style-complex="normal" style:font-weight-complex="normal"/>
    </style:style>
    <style:style style:name="T11" style:family="text">
      <style:text-properties fo:font-variant="normal" fo:text-transform="none" fo:color="#000080" style:text-line-through-style="none" style:text-line-through-type="none" style:text-position="0% 100%" style:font-name="Consolas" fo:font-size="15pt" fo:letter-spacing="normal" fo:font-style="normal" style:text-underline-style="none" fo:font-weight="normal" style:font-name-asian="Consolas" style:font-size-asian="15pt" style:font-style-asian="normal" style:font-weight-asian="normal" style:font-name-complex="Consolas" style:font-size-complex="1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Calibri" style:font-size-asian="20pt" style:font-style-asian="italic" style:font-weight-asian="bold" style:font-name-complex="Calibri" style:font-size-complex="20pt" style:font-style-complex="italic" style:font-weight-complex="bold"/>
    </style:style>
    <style:style style:name="T17" style:family="text">
      <style:text-properties fo:font-variant="normal" fo:text-transform="none" fo:color="#0033b3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8" style:family="text">
      <style:text-properties fo:font-variant="normal" fo:text-transform="none" fo:color="#00627a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9" style:family="text">
      <style:text-properties fo:font-variant="normal" fo:text-transform="none" fo:color="#080808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1" style:family="text">
      <style:text-properties fo:font-variant="normal" fo:text-transform="none" fo:color="#8c8c8c" style:text-line-through-style="none" style:text-line-through-type="none" style:text-position="0% 100%" style:font-name="Consolas" fo:font-size="18pt" fo:letter-spacing="normal" fo:font-style="italic" style:text-underline-style="none" fo:font-weight="normal" style:font-name-asian="Consolas" style:font-size-asian="18pt" style:font-style-asian="italic" style:font-weight-asian="normal" style:font-name-complex="Consolas" style:font-size-complex="18pt" style:font-style-complex="italic" style:font-weight-complex="normal"/>
    </style:style>
    <style:style style:name="T22" style:family="text">
      <style:text-properties fo:font-variant="normal" fo:text-transform="none" fo:color="#00008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3" style:family="text">
      <style:text-properties fo:font-variant="normal" fo:text-transform="none" fo:color="#1750eb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Calibri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8" style:family="text">
      <style:text-properties fo:font-variant="normal" fo:text-transform="none" fo:color="#000080" style:text-line-through-style="none" style:text-line-through-type="none" style:text-position="0% 100%" style:font-name="Consolas" fo:font-size="18pt" fo:letter-spacing="normal" fo:font-style="normal" style:text-underline-style="none" fo:font-weight="bold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name-asian="Consolas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Consolas" fo:font-size="16pt" fo:letter-spacing="normal" fo:font-style="normal" style:text-underline-style="none" fo:font-weight="normal" style:font-name-asian="Consolas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onsolas" fo:font-size="16pt" fo:letter-spacing="normal" fo:font-style="italic" style:text-underline-style="none" fo:font-weight="normal" style:font-name-asian="Consolas" style:font-size-asian="16pt" style:font-style-asian="italic" style:font-weight-asian="normal" style:font-name-complex="Consolas" style:font-size-complex="16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Calibri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35" style:family="text">
      <style:text-properties fo:font-variant="normal" fo:text-transform="none" fo:color="#660099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bold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37" style:family="text">
      <style:text-properties fo:font-variant="normal" fo:text-transform="none" fo:color="#0000ff" style:text-line-through-style="none" style:text-line-through-type="none" style:text-position="0% 100%" style:font-name="Calibri" fo:font-size="20pt" fo:letter-spacing="normal" fo:font-style="normal" style:text-underline-style="solid" style:text-underline-width="auto" style:text-underline-color="font-color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38" style:family="text">
      <style:text-properties fo:font-variant="normal" fo:text-transform="none" fo:color="#000080" style:text-line-through-style="none" style:text-line-through-type="none" style:text-position="0% 100%" style:font-name="Consolas" fo:font-size="15pt" fo:letter-spacing="normal" fo:font-style="normal" style:text-underline-style="none" fo:font-weight="bold" style:font-name-asian="Consolas" style:font-size-asian="15pt" style:font-style-asian="normal" style:font-weight-asian="bold" style:font-name-complex="Consolas" style:font-size-complex="15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15pt" fo:letter-spacing="normal" fo:font-style="normal" style:text-underline-style="none" fo:font-weight="normal" style:font-name-asian="Consolas" style:font-size-asian="15pt" style:font-style-asian="normal" style:font-weight-asian="normal" style:font-name-complex="Consolas" style:font-size-complex="15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" fo:font-size="15pt" fo:letter-spacing="normal" fo:font-style="normal" style:text-underline-style="none" fo:font-weight="bold" style:font-name-asian="Consolas" style:font-size-asian="15pt" style:font-style-asian="normal" style:font-weight-asian="bold" style:font-name-complex="Consolas" style:font-size-complex="15pt" style:font-style-complex="normal" style:font-weight-complex="bold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Consolas" fo:font-size="17pt" fo:letter-spacing="normal" fo:font-style="normal" style:text-underline-style="none" fo:font-weight="normal" style:font-name-asian="Consolas" style:font-size-asian="17pt" style:font-style-asian="normal" style:font-weight-asian="normal" style:font-name-complex="Consolas" style:font-size-complex="1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•">
        <style:list-level-properties text:space-before="2.823cm" text:min-label-width="0.987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823cm" text:min-label-width="0.987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283cm" text:min-label-width="0.98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•">
        <style:list-level-properties text:space-before="2.858cm" text:min-label-width="0.952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283cm" text:min-label-width="0.98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eb scraping parte 2:&#10;Expressões regulares e lambda&#10;" draw:style-name="dp1" draw:master-page-name="OBJECT" presentation:presentation-page-layout-name="AL1T11">
        <draw:frame draw:name="Google Shape;88;p13" presentation:style-name="pr1" draw:text-style-name="P2" draw:layer="layout" svg:width="22.859cm" svg:height="3.175cm" svg:x="0.972cm" svg:y="7.937cm" presentation:class="title" presentation:user-transformed="true">
          <draw:text-box>
            <text:p text:style-name="P1"><text:span text:style-name="T1">Web scraping parte 2:</text:span><text:span text:style-name="T1"><text:line-break/></text:span><text:span text:style-name="T1">Expressões regulares e lambda</text:span><text:span text:style-name="T1"><text:line-break/></text:span><text:span text:style-name="T1"/></text:p>
          </draw:text-box>
        </draw:frame>
        <draw:frame draw:name="Google Shape;89;p13" presentation:style-name="pr2" draw:text-style-name="P5" draw:layer="layout" svg:width="14.857cm" svg:height="2.757cm" svg:x="1.27cm" svg:y="14.26cm" presentation:class="outline" presentation:user-transformed="true">
          <draw:text-box>
            <text:p text:style-name="P3"><text:span text:style-name="T2">Professor Leandro O. Freitas</text:span></text:p>
            <text:p text:style-name="P4"><text:span text:style-name="T2">leandro@politecnico.ufsm.br</text:span></text:p>
          </draw:text-box>
        </draw:frame>
        <draw:custom-shape draw:name="Google Shape;90;p13" draw:style-name="gr1" draw:text-style-name="P6" draw:layer="layout" svg:width="18.463cm" svg:height="3.399cm" svg:x="1.407cm" svg:y="0.289cm">
          <text:p text:style-name="P1"><text:span text:style-name="T1">Análise de dados e extração de conhec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3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frame draw:name="Google Shape;85;g1dfd216856c_0_0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6;g1dfd216856c_0_0:notes" draw:style-name="gr2" draw:layer="layout" svg:width="12.7cm" svg:height="9.524cm" svg:x="3.176cm" svg:y="1.905cm" draw:page-number="1" presentation:class="page"/>
        </presentation:notes>
      </draw:page>
      <draw:page draw:name="Expressões regulares" draw:style-name="dp1" draw:master-page-name="OBJECT" presentation:presentation-page-layout-name="AL1T11">
        <draw:frame draw:name="Google Shape;96;p14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Expressões regulares</text:span></text:p>
          </draw:text-box>
        </draw:frame>
        <draw:frame draw:name="Google Shape;97;p14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5">
              <text:list-item>
                <text:p text:style-name="P10"><text:span text:style-name="T4">Regexes são extremamente úteis para criar funções de pesquisa e filtro;</text:span></text:p>
              </text:list-item>
            </text:list>
            <text:p text:style-name="P11"><text:span text:style-name="T4"/></text:p>
            <text:list text:continue-numbering="true" text:style-name="L5">
              <text:list-item>
                <text:p text:style-name="P12"><text:span text:style-name="T4">Visam verificar se uma string segue regras definidas pelo programa;</text:span></text:p>
              </text:list-item>
            </text:list>
            <text:p text:style-name="P11"><text:span text:style-name="T4"/></text:p>
            <text:list text:continue-numbering="true" text:style-name="L5">
              <text:list-item>
                <text:p text:style-name="P12"><text:span text:style-name="T4">Conveniente para análise de padrões em documentos grandes.</text:span></text:p>
              </text:list-item>
            </text:list>
            <text:p text:style-name="P11"><text:span text:style-name="T4"/></text:p>
          </draw:text-box>
        </draw:frame>
        <draw:frame draw:name="Google Shape;98;p14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frame draw:name="Google Shape;93;g1e1c5045b18_0_43:notes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4;g1e1c5045b18_0_43:notes" draw:style-name="gr2" draw:layer="layout" svg:width="12.7cm" svg:height="9.524cm" svg:x="3.176cm" svg:y="1.905cm" draw:page-number="2" presentation:class="page"/>
        </presentation:notes>
      </draw:page>
      <draw:page draw:name="Regex e BS4" draw:style-name="dp1" draw:master-page-name="OBJECT" presentation:presentation-page-layout-name="AL1T11">
        <draw:frame draw:name="Google Shape;103;p15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Regex e BS4</text:span></text:p>
          </draw:text-box>
        </draw:frame>
        <draw:frame draw:name="Google Shape;104;p15" presentation:style-name="pr2" draw:text-style-name="P5" draw:layer="layout" svg:width="22.859cm" svg:height="11.645cm" svg:x="1.27cm" svg:y="4.445cm" presentation:class="outline" presentation:user-transformed="true">
          <draw:text-box>
            <text:list text:style-name="L7">
              <text:list-item>
                <text:p text:style-name="P13"><text:span text:style-name="T4">Regexes podem ser usadas com funções do módulo BS4;</text:span></text:p>
              </text:list-item>
            </text:list>
            <text:p text:style-name="P14"><text:span text:style-name="T4"/></text:p>
            <text:list text:continue-numbering="true" text:style-name="L7">
              <text:list-item>
                <text:p text:style-name="P15"><text:span text:style-name="T4">Funções que aceitam argumentos do tipo string, também aceitam expressões regulares;</text:span></text:p>
              </text:list-item>
            </text:list>
            <text:p text:style-name="P14"><text:span text:style-name="T4"/></text:p>
            <text:list text:continue-numbering="true" text:style-name="L7">
              <text:list-item>
                <text:p text:style-name="P15"><text:span text:style-name="T4">Acessar a página de </text:span><text:span text:style-name="T5"><text:a xlink:href="http://pythonscraping.com/pages/page3.html" xlink:type="simple">exemplo</text:a></text:span><text:span text:style-name="T4">;</text:span></text:p>
              </text:list-item>
            </text:list>
            <text:list text:style-name="L9">
              <text:list-item>
                <text:list>
                  <text:list-item>
                    <text:p text:style-name="P12"><text:span text:style-name="T6">Produtos estão definidos em &lt;img src="../img/gifts/img2.jpg"&gt;</text:span></text:p>
                  </text:list-item>
                  <text:list-item>
                    <text:p text:style-name="P12"><text:span text:style-name="T6">Como criar um scraper para buscar imagens de produtos?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2"><text:span text:style-name="T6">.find_all(“img”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105;p15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g draw:name="Google Shape;106;p15" xml:id="id1" draw:id="id1">
          <draw:custom-shape draw:name="Google Shape;107;p15" draw:style-name="gr3" draw:text-style-name="P6" draw:layer="layout" svg:width="10.405cm" svg:height="2.033cm" svg:x="10.306cm" svg:y="12.912cm">
            <text:p text:style-name="P12"><text:span text:style-name="T7">Irá retornar todas as imagens da página, não apenas as de produto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8;p15" draw:style-name="gr4" draw:text-style-name="P16" draw:layer="layout" svg:width="4.687cm" svg:height="0.032cm" svg:x="5.22cm" svg:y="13.539cm">
            <text:p/>
            <draw:enhanced-geometry draw:mirror-horizontal="false" draw:mirror-vertical="false" svg:viewBox="0 0 21600 21600" draw:type="mso-spt32" draw:enhanced-path="M 0 0 L 21600 21600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0;g1e251d1ba5d_0_0:notes" draw:style-name="gr2" draw:layer="layout" svg:width="12.699cm" svg:height="9.524cm" svg:x="3.176cm" svg:y="1.905cm" draw:page-number="3" presentation:class="page"/>
          <draw:frame draw:name="Google Shape;101;g1e251d1ba5d_0_0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ex e BS4" draw:style-name="dp1" draw:master-page-name="OBJECT" presentation:presentation-page-layout-name="AL1T11">
        <draw:frame draw:name="Google Shape;113;p16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Regex e BS4</text:span></text:p>
          </draw:text-box>
        </draw:frame>
        <draw:frame draw:name="Google Shape;114;p16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7">
              <text:list-item>
                <text:p text:style-name="P13"><text:span text:style-name="T4">Em uma rápida análise do código fonte da página percebe-se a existência de outra imagem, além dos produtos;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6">Imagens ocultas são muito usadas para espaçamento de linhas, alinhamento de elementos, etc..</text:span></text:p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9">
              <text:list-item>
                <text:p text:style-name="P15"><text:span text:style-name="T4">Ou seja, deve-se certificar que o argumento da função de busca retorne exatamente o que se procura;</text:span></text:p>
              </text:list-item>
            </text:list>
            <text:p text:style-name="P14"><text:span text:style-name="T4"/></text:p>
            <text:list text:continue-numbering="true" text:style-name="L9">
              <text:list-item>
                <text:p text:style-name="P15"><text:span text:style-name="T4">Outros problemas:</text:span></text:p>
                <text:list>
                  <text:list-item>
                    <text:p text:style-name="P12"><text:span text:style-name="T6">Layout da página pode mudar;</text:span></text:p>
                  </text:list-item>
                  <text:list-item>
                    <text:p text:style-name="P12"><text:span text:style-name="T6">Não queremos depender da posição da imagem para encontrar uma tag;</text:span></text:p>
                  </text:list-item>
                  <text:list-item>
                    <text:p text:style-name="P12"><text:span text:style-name="T6">Dados procurados podem estar espalhados aleatoriamente pelo site.</text:span></text:p>
                  </text:list-item>
                </text:list>
              </text:list-item>
            </text:list>
          </draw:text-box>
        </draw:frame>
        <draw:frame draw:name="Google Shape;115;p16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name="Google Shape;110;g1e251d1ba5d_0_11:notes" draw:style-name="gr2" draw:layer="layout" svg:width="12.699cm" svg:height="9.524cm" svg:x="3.176cm" svg:y="1.905cm" draw:page-number="4" presentation:class="page"/>
          <draw:frame draw:name="Google Shape;111;g1e251d1ba5d_0_11:notes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ex e BS4" draw:style-name="dp1" draw:master-page-name="OBJECT" presentation:presentation-page-layout-name="AL1T11">
        <draw:frame draw:name="Google Shape;120;p17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Regex e BS4</text:span></text:p>
          </draw:text-box>
        </draw:frame>
        <draw:frame draw:name="Google Shape;121;p17" presentation:style-name="pr2" draw:text-style-name="P5" draw:layer="layout" svg:width="22.859cm" svg:height="6.426cm" svg:x="1.27cm" svg:y="4.445cm" presentation:class="outline" presentation:user-transformed="true">
          <draw:text-box>
            <text:list text:style-name="L7">
              <text:list-item>
                <text:p text:style-name="P13"><text:span text:style-name="T4">Solução: encontrar algo sirva como identificador da tag: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6">Isso pode ser feito com expressões regulares!</text:span></text:p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9">
              <text:list-item>
                <text:p text:style-name="P15"><text:span text:style-name="T4">No exemplo: buscar apenas imagens de produtos:</text:span></text:p>
                <text:list>
                  <text:list-item>
                    <text:p text:style-name="P12"><text:span text:style-name="T6">&lt;img src="../img/gifts/img2.jpg"&gt;</text:span></text:p>
                  </text:list-item>
                  <text:list-item>
                    <text:p text:style-name="P12"><text:span text:style-name="T6">Uma regex para esse caso pode ser definida assim:</text:span></text:p>
                  </text:list-item>
                </text:list>
              </text:list-item>
            </text:list>
          </draw:text-box>
        </draw:frame>
        <draw:frame draw:name="Google Shape;122;p17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custom-shape draw:name="Google Shape;123;p17" draw:style-name="gr3" draw:text-style-name="P6" xml:id="id2" draw:id="id2" draw:layer="layout" svg:width="23.437cm" svg:height="6.849cm" svg:x="1.786cm" svg:y="12.002cm">
          <text:p text:style-name="P12"><text:span text:style-name="T8">pagina = urlopen(</text:span><text:span text:style-name="T9">"https://pythonscraping.com/pages/page3.html"</text:span><text:span text:style-name="T8">)</text:span></text:p>
          <text:p text:style-name="P12"><text:span text:style-name="T8">bs = BeautifulSoup(pagina, </text:span><text:span text:style-name="T9">"html.parser"</text:span><text:span text:style-name="T8">)</text:span></text:p>
          <text:p text:style-name="P12"><text:span text:style-name="T8"/></text:p>
          <text:p text:style-name="P12"><text:span text:style-name="T8">regex = re.compile(</text:span><text:span text:style-name="T9">r'\.\./img/gifts/img.*.jpg'</text:span><text:span text:style-name="T8">)</text:span></text:p>
          <text:p text:style-name="P12"><text:span text:style-name="T8"/></text:p>
          <text:p text:style-name="P12"><text:span text:style-name="T8">imagens = bs.find_all(</text:span><text:span text:style-name="T9">'img'</text:span><text:span text:style-name="T8">, {</text:span><text:span text:style-name="T9">'src'</text:span><text:span text:style-name="T8">:regex})</text:span></text:p>
          <text:p text:style-name="P12"><text:span text:style-name="T8"/></text:p>
          <text:p text:style-name="P12"><text:span text:style-name="T10">for </text:span><text:span text:style-name="T8">img </text:span><text:span text:style-name="T10">in </text:span><text:span text:style-name="T8">imagens:</text:span></text:p>
          <text:p text:style-name="P12"><text:span text:style-name="T8"><text:s text:c="2"/></text:span><text:span text:style-name="T11">print</text:span><text:span text:style-name="T8">(img[</text:span><text:span text:style-name="T9">'src'</text:span><text:span text:style-name="T8">])</text:span></text:p>
          <text:p text:style-name="P12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17" presentation:style-name="pr2" draw:text-style-name="P5" xml:id="id3" draw:id="id3" draw:layer="layout" svg:width="22.859cm" svg:height="1.414cm" svg:x="1.033cm" svg:y="10.587cm" presentation:class="outline" presentation:user-transformed="true">
          <draw:text-box>
            <text:list text:style-name="L14">
              <text:list-item>
                <text:list>
                  <text:list-item>
                    <text:list>
                      <text:list-item>
                        <text:p text:style-name="P17"><text:span text:style-name="T6">‘</text:span><text:span text:style-name="T6">\.\./img/gifts/img.*.jpg’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17;g1e251d1ba5d_0_17:notes" draw:style-name="gr2" draw:layer="layout" svg:width="12.699cm" svg:height="9.524cm" svg:x="3.176cm" svg:y="1.905cm" draw:page-number="5" presentation:class="page"/>
          <draw:frame draw:name="Google Shape;118;g1e251d1ba5d_0_17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ressões lambda" draw:style-name="dp1" draw:master-page-name="OBJECT" presentation:presentation-page-layout-name="AL1T11">
        <draw:frame draw:name="Google Shape;129;p18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Expressões lambda</text:span></text:p>
          </draw:text-box>
        </draw:frame>
        <draw:frame draw:name="Google Shape;130;p18" presentation:style-name="pr2" draw:text-style-name="P5" draw:layer="layout" svg:width="24.129cm" svg:height="12.572cm" svg:x="1.27cm" svg:y="4.445cm" presentation:class="outline" presentation:user-transformed="true">
          <draw:text-box>
            <text:list text:style-name="L7">
              <text:list-item>
                <text:p text:style-name="P13"><text:span text:style-name="T4">Refere-se a uma função que é passada para outra função como parâmetro: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13">funcF(</text:span><text:span text:style-name="T14">funcG()</text:span><text:span text:style-name="T13">, y)</text:span></text:p>
                  </text:list-item>
                  <text:list-item>
                    <text:p text:style-name="P10"><text:span text:style-name="T13">funcF(</text:span><text:span text:style-name="T14">funcG()</text:span><text:span text:style-name="T13">, </text:span><text:span text:style-name="T15">funcH()</text:span><text:span text:style-name="T13">)</text:span><text:span text:style-name="T6"> </text:span></text:p>
                  </text:list-item>
                </text:list>
              </text:list-item>
            </text:list>
            <text:p text:style-name="P14"><text:span text:style-name="T4"/></text:p>
            <text:list text:style-name="L15">
              <text:list-item>
                <text:p text:style-name="P15"><text:span text:style-name="T6">Usadas quando se precisa de uma lógica rápida, sem perder tempo definindo uma função formal com </text:span><text:span text:style-name="T16">def</text:span><text:span text:style-name="T6">. Elas são anônimas, de linha única e ideais para operações descartáveis.</text:span></text:p>
              </text:list-item>
            </text:list>
            <text:p text:style-name="P18"><text:span text:style-name="T4"/></text:p>
          </draw:text-box>
        </draw:frame>
        <draw:frame draw:name="Google Shape;131;p18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custom-shape draw:name="Google Shape;132;p18" draw:style-name="gr3" draw:text-style-name="P6" draw:layer="layout" svg:width="19.882cm" svg:height="5.081cm" svg:x="3.691cm" svg:y="12.948cm">
          <text:p text:style-name="P12"><text:span text:style-name="T17">def </text:span><text:span text:style-name="T18">somar</text:span><text:span text:style-name="T19">(</text:span><text:span text:style-name="T20">x</text:span><text:span text:style-name="T19">, </text:span><text:span text:style-name="T20">y</text:span><text:span text:style-name="T19">): </text:span><text:span text:style-name="T21"># Função tradicional</text:span></text:p>
          <text:p text:style-name="P12"><text:span text:style-name="T19"><text:s text:c="3"/></text:span><text:span text:style-name="T17">return </text:span><text:span text:style-name="T20">x </text:span><text:span text:style-name="T19">+ </text:span><text:span text:style-name="T20">y</text:span></text:p>
          <text:p text:style-name="P12"><text:span text:style-name="T20"/></text:p>
          <text:p text:style-name="P12"><text:span text:style-name="T19">somar_lambda = </text:span><text:span text:style-name="T17">lambda </text:span><text:span text:style-name="T19">x, y: x + y </text:span><text:span text:style-name="T21"># Função Lambda</text:span></text:p>
          <text:p text:style-name="P12"><text:span text:style-name="T19"/></text:p>
          <text:p text:style-name="P12"><text:span text:style-name="T22">print</text:span><text:span text:style-name="T19">(somar_lambda(</text:span><text:span text:style-name="T23">5</text:span><text:span text:style-name="T19">, </text:span><text:span text:style-name="T23">3</text:span><text:span text:style-name="T19">)) </text:span><text:span text:style-name="T21"># Resultado: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1e251d1ba5d_0_25:notes" draw:style-name="gr2" draw:layer="layout" svg:width="12.699cm" svg:height="9.524cm" svg:x="3.176cm" svg:y="1.905cm" draw:page-number="6" presentation:class="page"/>
          <draw:frame draw:name="Google Shape;127;g1e251d1ba5d_0_25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ressões lambda" draw:style-name="dp1" draw:master-page-name="OBJECT" presentation:presentation-page-layout-name="AL1T11">
        <draw:frame draw:name="Google Shape;137;p19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Expressões lambda</text:span></text:p>
          </draw:text-box>
        </draw:frame>
        <draw:frame draw:name="Google Shape;138;p19" presentation:style-name="pr2" draw:text-style-name="P5" draw:layer="layout" svg:width="24.129cm" svg:height="12.572cm" svg:x="1.27cm" svg:y="4.445cm" presentation:class="outline" presentation:user-transformed="true">
          <draw:text-box>
            <text:list text:style-name="L7">
              <text:list-item>
                <text:p text:style-name="P13"><text:span text:style-name="T4">BS4: .find_all() permite passar algumas funções como parâmetro, ou seja, utilizar expressões lambda: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6">Devem aceitar um </text:span><text:span text:style-name="T24">objeto tag </text:span><text:span text:style-name="T6">como argumento e devolver um booleano;</text:span></text:p>
                  </text:list-item>
                  <text:list-item>
                    <text:p text:style-name="P10"><text:span text:style-name="T6">Todo </text:span><text:span text:style-name="T24">objeto tag</text:span><text:span text:style-name="T6"> encontrado pelo BS4 é avaliado pela função e as tags classificadas como True são devolvidas.</text:span></text:p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9">
              <text:list-item>
                <text:p text:style-name="P15"><text:span text:style-name="T4">Bastante útil para filtros complexos que os seletores CSS ou atributos simples não alcançam.</text:span></text:p>
              </text:list-item>
            </text:list>
            <text:p text:style-name="P18"><text:span text:style-name="T4"/></text:p>
          </draw:text-box>
        </draw:frame>
        <draw:frame draw:name="Google Shape;139;p19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name="Google Shape;134;g3973674567a_0_3:notes" draw:style-name="gr2" draw:layer="layout" svg:width="12.699cm" svg:height="9.524cm" svg:x="3.176cm" svg:y="1.905cm" draw:page-number="7" presentation:class="page"/>
          <draw:frame draw:name="Google Shape;135;g3973674567a_0_3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ressões lambda" draw:style-name="dp1" draw:master-page-name="OBJECT" presentation:presentation-page-layout-name="AL1T11">
        <draw:frame draw:name="Google Shape;144;p20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Expressões lambda</text:span></text:p>
          </draw:text-box>
        </draw:frame>
        <draw:frame draw:name="Google Shape;145;p20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7">
              <text:list-item>
                <text:p text:style-name="P13"><text:span text:style-name="T4">Exemplo:</text:span></text:p>
              </text:list-item>
            </text:list>
            <text:p text:style-name="P15"><text:span text:style-name="T4"/></text:p>
            <text:p text:style-name="P15"><text:span text:style-name="T4"/></text:p>
            <text:p text:style-name="P15"><text:span text:style-name="T4"/></text:p>
            <text:list text:continue-numbering="true" text:style-name="L7">
              <text:list-item>
                <text:p text:style-name="P15"><text:span text:style-name="T4">Sempre que </text:span><text:span text:style-name="T25">len(tag.attrs) == 2 </text:span><text:span text:style-name="T4">for True, <text:s/>a função </text:span><text:span text:style-name="T26">find_all()</text:span><text:span text:style-name="T4"> retorna tags com dois argumentos:</text:span></text:p>
              </text:list-item>
            </text:list>
            <text:p text:style-name="P14"><text:span text:style-name="T4"/></text:p>
            <text:p text:style-name="P18"><text:span text:style-name="T20">&lt;img </text:span><text:span text:style-name="T25">src="../img/gifts/logo.jpg"</text:span><text:span text:style-name="T20"> </text:span><text:span text:style-name="T27">style="float:left;"</text:span><text:span text:style-name="T20">/&gt;</text:span></text:p>
            <text:p text:style-name="P18"><text:span text:style-name="T20">&lt;tr </text:span><text:span text:style-name="T25">class="gift"</text:span><text:span text:style-name="T20"> </text:span><text:span text:style-name="T27">id="gift1"</text:span><text:span text:style-name="T20">&gt;&lt;td&gt;Vegetable Basket&lt;/td&gt;</text:span></text:p>
            <text:p text:style-name="P18"><text:span text:style-name="T20">…</text:span></text:p>
            <text:p text:style-name="P18"><text:span text:style-name="T13"/></text:p>
          </draw:text-box>
        </draw:frame>
        <draw:frame draw:name="Google Shape;146;p20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custom-shape draw:name="Google Shape;147;p20" draw:style-name="gr3" draw:text-style-name="P6" draw:layer="layout" svg:width="20.977cm" svg:height="2.795cm" svg:x="3.757cm" svg:y="5.885cm">
          <text:p text:style-name="P12"><text:span text:style-name="T20">lbda = bs.find_all(</text:span><text:span text:style-name="T28">lambda </text:span><text:span text:style-name="T20">tag: </text:span><text:span text:style-name="T25">len(tag.attrs) == 2</text:span><text:span text:style-name="T20">)</text:span></text:p>
          <text:p text:style-name="P12"><text:span text:style-name="T28">for </text:span><text:span text:style-name="T20">lamb </text:span><text:span text:style-name="T28">in </text:span><text:span text:style-name="T20">lbda:</text:span></text:p>
          <text:p text:style-name="P12"><text:span text:style-name="T20"><text:s text:c="3"/></text:span><text:span text:style-name="T22">print</text:span><text:span text:style-name="T20">(lam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1;g1e251d1ba5d_0_31:notes" draw:style-name="gr2" draw:layer="layout" svg:width="12.699cm" svg:height="9.524cm" svg:x="3.176cm" svg:y="1.905cm" draw:page-number="8" presentation:class="page"/>
          <draw:frame draw:name="Google Shape;142;g1e251d1ba5d_0_31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scraping parte 2:&#10;Tratamento de exceções&#10;" draw:style-name="dp1" draw:master-page-name="OBJECT" presentation:presentation-page-layout-name="AL1T11">
        <draw:frame draw:name="Google Shape;152;p21" presentation:style-name="pr1" draw:text-style-name="P2" draw:layer="layout" svg:width="22.859cm" svg:height="3.175cm" svg:x="0.972cm" svg:y="7.937cm" presentation:class="title" presentation:user-transformed="true">
          <draw:text-box>
            <text:p text:style-name="P1"><text:span text:style-name="T1">Web scraping parte 2:</text:span><text:span text:style-name="T1"><text:line-break/></text:span><text:span text:style-name="T1">Tratamento de exceções</text:span><text:span text:style-name="T1"><text:line-break/></text:span><text:span text:style-name="T1"/></text:p>
          </draw:text-box>
        </draw:frame>
        <draw:frame draw:name="Google Shape;153;p21" presentation:style-name="pr2" draw:text-style-name="P5" draw:layer="layout" svg:width="14.857cm" svg:height="2.757cm" svg:x="1.27cm" svg:y="14.26cm" presentation:class="outline" presentation:user-transformed="true">
          <draw:text-box>
            <text:p text:style-name="P3"><text:span text:style-name="T2">Professor Leandro O. Freitas</text:span></text:p>
            <text:p text:style-name="P4"><text:span text:style-name="T2">leandro@politecnico.ufsm.br</text:span></text:p>
          </draw:text-box>
        </draw:frame>
        <draw:custom-shape draw:name="Google Shape;154;p21" draw:style-name="gr1" draw:text-style-name="P6" draw:layer="layout" svg:width="18.463cm" svg:height="3.399cm" svg:x="1.407cm" svg:y="0.289cm">
          <text:p text:style-name="P1"><text:span text:style-name="T1">Análise de dados e extração de conhec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21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frame draw:name="Google Shape;149;g3d69be62cf8_0_0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0;g3d69be62cf8_0_0:notes" draw:style-name="gr2" draw:layer="layout" svg:width="12.7cm" svg:height="9.524cm" svg:x="3.176cm" svg:y="1.905cm" draw:page-number="9" presentation:class="page"/>
        </presentation:notes>
      </draw:page>
      <draw:page draw:name="Tratamento de exceções" draw:style-name="dp1" draw:master-page-name="OBJECT" presentation:presentation-page-layout-name="AL1T11">
        <draw:frame draw:name="Google Shape;160;p22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Tratamento de exceções</text:span></text:p>
          </draw:text-box>
        </draw:frame>
        <draw:frame draw:name="Google Shape;161;p22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7">
              <text:list-item>
                <text:p text:style-name="P13"><text:span text:style-name="T29">Dados mal formatados, sites inativos e tags sem fechamento </text:span><text:span text:style-name="T4">são alguns dos problemas que podem afetar o desempenho de um web scraping;</text:span></text:p>
              </text:list-item>
            </text:list>
            <text:p text:style-name="P14"><text:span text:style-name="T4"/></text:p>
            <text:list text:continue-numbering="true" text:style-name="L7">
              <text:list-item>
                <text:p text:style-name="P15"><text:span text:style-name="T4">O desenvolvedor do web scraping é o único culpado quando um script não funciona por algum desses motivos. É ele quem deve prever isso e tratar exceções;</text:span></text:p>
              </text:list-item>
            </text:list>
            <text:p text:style-name="P14"><text:span text:style-name="T4"/></text:p>
            <text:list text:continue-numbering="true" text:style-name="L7">
              <text:list-item>
                <text:p text:style-name="P15"><text:span text:style-name="T4">Diversos erros podem ser gerados ao rodar um script sem tratamento de exceções:</text:span></text:p>
              </text:list-item>
            </text:list>
            <text:list text:style-name="L9">
              <text:list-item>
                <text:list>
                  <text:list-item>
                    <text:p text:style-name="P12"><text:span text:style-name="T6">HTTPError;</text:span></text:p>
                  </text:list-item>
                  <text:list-item>
                    <text:p text:style-name="P12"><text:span text:style-name="T6">URLError;</text:span></text:p>
                  </text:list-item>
                  <text:list-item>
                    <text:p text:style-name="P12"><text:span text:style-name="T6">AttributeError.</text:span></text:p>
                  </text:list-item>
                </text:list>
              </text:list-item>
            </text:list>
          </draw:text-box>
        </draw:frame>
        <draw:frame draw:name="Google Shape;162;p22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name="Google Shape;157;g1e2646f06c9_0_1:notes" draw:style-name="gr2" draw:layer="layout" svg:width="12.699cm" svg:height="9.524cm" svg:x="3.176cm" svg:y="1.905cm" draw:page-number="10" presentation:class="page"/>
          <draw:frame draw:name="Google Shape;158;g1e2646f06c9_0_1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Error" draw:style-name="dp1" draw:master-page-name="OBJECT" presentation:presentation-page-layout-name="AL1T11">
        <draw:frame draw:name="Google Shape;167;p23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HTTPError</text:span></text:p>
          </draw:text-box>
        </draw:frame>
        <draw:frame draw:name="Google Shape;168;p23" presentation:style-name="pr2" draw:text-style-name="P5" draw:layer="layout" svg:width="22.859cm" svg:height="5.451cm" svg:x="1.27cm" svg:y="4.445cm" presentation:class="outline" presentation:user-transformed="true">
          <draw:text-box>
            <text:list text:style-name="L7">
              <text:list-item>
                <text:p text:style-name="P13"><text:span text:style-name="T4">Referentes a falha de requisição: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24">404 page not found, 500 internal server error,</text:span><text:span text:style-name="T6"> etc.</text:span></text:p>
                  </text:list-item>
                </text:list>
              </text:list-item>
            </text:list>
            <text:p text:style-name="P18"><text:span text:style-name="T4"/></text:p>
            <text:list text:continue-numbering="true" text:style-name="L9">
              <text:list-item>
                <text:p text:style-name="P15"><text:span text:style-name="T4">Nesses casos a função </text:span><text:span text:style-name="T26">urlopen()</text:span><text:span text:style-name="T4"> lança uma exceção genérica HTTPError. Para tratar esse problema basta importar a função HTTPError:</text:span></text:p>
              </text:list-item>
            </text:list>
          </draw:text-box>
        </draw:frame>
        <draw:frame draw:name="Google Shape;169;p23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custom-shape draw:name="Google Shape;170;p23" draw:style-name="gr3" draw:text-style-name="P6" draw:layer="layout" svg:width="23.807cm" svg:height="7.269cm" svg:x="0.905cm" svg:y="10.31cm">
          <text:p text:style-name="P12"><text:span text:style-name="T30">f</text:span><text:span text:style-name="T31">rom urllib.request import urlopen</text:span></text:p>
          <text:p text:style-name="P12"><text:span text:style-name="T32">from urllib.error import HTTPError</text:span></text:p>
          <text:p text:style-name="P12"><text:span text:style-name="T31"/></text:p>
          <text:p text:style-name="P12"><text:span text:style-name="T31">try:</text:span></text:p>
          <text:p text:style-name="P19"><text:span text:style-name="T31">html = urlopen('http://www.pythonscraping.com/pages/page1.html')</text:span></text:p>
          <text:p text:style-name="P12"><text:span text:style-name="T31">except HTTPError as e:</text:span></text:p>
          <text:p text:style-name="P11"><text:span text:style-name="T31">print(e)</text:span><text:span text:style-name="T33"> # mostra erro ou outro tratamento definido pelo desenvolvedor</text:span></text:p>
          <text:p text:style-name="P11"><text:span text:style-name="T33"># devolve um null. Executa conjunto de instruções alternativas</text:span></text:p>
          <text:p text:style-name="P12"><text:span text:style-name="T31">else:</text:span></text:p>
          <text:p text:style-name="P19"><text:span text:style-name="T33"># o programa continua com demais instruções do scraping.</text:span><text:span text:style-name="T31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4;g1e2646f06c9_0_7:notes" draw:style-name="gr2" draw:layer="layout" svg:width="12.699cm" svg:height="9.524cm" svg:x="3.176cm" svg:y="1.905cm" draw:page-number="11" presentation:class="page"/>
          <draw:frame draw:name="Google Shape;165;g1e2646f06c9_0_7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Error" draw:style-name="dp1" draw:master-page-name="OBJECT" presentation:presentation-page-layout-name="AL1T11">
        <draw:frame draw:name="Google Shape;175;p24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HTTPError</text:span></text:p>
          </draw:text-box>
        </draw:frame>
        <draw:frame draw:name="Google Shape;176;p24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7">
              <text:list-item>
                <text:p text:style-name="P13"><text:span text:style-name="T26">Error 403 forbidden</text:span><text:span text:style-name="T4">: gerado quando o servidor que está sendo acessado identifica que a requisição vem de um scraper.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6">urllib usa protocolo de fácil identificação;</text:span></text:p>
                  </text:list-item>
                  <text:list-item>
                    <text:p text:style-name="P10"><text:span text:style-name="T6">Antes de continuar, certifique-se que o site permite scraping;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10"><text:span text:style-name="T2">Se sim, então definir um </text:span><text:span text:style-name="T34">user agent</text:span><text:span text:style-name="T2"> para simular a utilização de navegador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177;p24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custom-shape draw:name="Google Shape;178;p24" draw:style-name="gr3" draw:text-style-name="P6" draw:layer="layout" svg:width="21.327cm" svg:height="6.605cm" svg:x="2.803cm" svg:y="10.987cm">
          <text:p text:style-name="P12"><text:span text:style-name="T28">from </text:span><text:span text:style-name="T20">urllib.request </text:span><text:span text:style-name="T28">import </text:span><text:span text:style-name="T20">Request, urlopen</text:span></text:p>
          <text:p text:style-name="P12"><text:span text:style-name="T20"/></text:p>
          <text:p text:style-name="P12"><text:span text:style-name="T20">req = Request(</text:span></text:p>
          <text:p text:style-name="P12"><text:span text:style-name="T20"><text:s text:c="3"/></text:span><text:span text:style-name="T35">url</text:span><text:span text:style-name="T20">=</text:span><text:span text:style-name="T36">&lt;URL DO SITE&gt;</text:span><text:span text:style-name="T20">,</text:span></text:p>
          <text:p text:style-name="P12"><text:span text:style-name="T20"><text:s text:c="3"/></text:span><text:span text:style-name="T35">headers</text:span><text:span text:style-name="T20">={</text:span><text:span text:style-name="T36">'User-Agent'</text:span><text:span text:style-name="T20">: </text:span><text:span text:style-name="T36">'Mozilla/5.0'</text:span><text:span text:style-name="T20">}</text:span></text:p>
          <text:p text:style-name="P12"><text:span text:style-name="T20">)</text:span></text:p>
          <text:p text:style-name="P12"><text:span text:style-name="T20">html = urlopen(req).read()</text:span></text:p>
          <text:p text:style-name="P12"><text:span text:style-name="T20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2;g1e26fd8c841_0_0:notes" draw:style-name="gr2" draw:layer="layout" svg:width="12.699cm" svg:height="9.524cm" svg:x="3.176cm" svg:y="1.905cm" draw:page-number="12" presentation:class="page"/>
          <draw:frame draw:name="Google Shape;173;g1e26fd8c841_0_0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RLError" draw:style-name="dp1" draw:master-page-name="OBJECT" presentation:presentation-page-layout-name="AL1T11">
        <draw:frame draw:name="Google Shape;183;p25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URLError</text:span></text:p>
          </draw:text-box>
        </draw:frame>
        <draw:frame draw:name="Google Shape;184;p25" presentation:style-name="pr2" draw:text-style-name="P5" draw:layer="layout" svg:width="22.859cm" svg:height="4.527cm" svg:x="1.27cm" svg:y="4.445cm" presentation:class="outline" presentation:user-transformed="true">
          <draw:text-box>
            <text:list text:style-name="L7">
              <text:list-item>
                <text:p text:style-name="P13"><text:span text:style-name="T4">Servidor não encontrado: fora do ar, erro de grafia, etc.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6">Impede geração de HTTPError, pois o servidor é o responsável por retornar status HTTP;</text:span></text:p>
                  </text:list-item>
                  <text:list-item>
                    <text:p text:style-name="P10"><text:span text:style-name="T6">Portanto, sugere-se tratar sempre os dois tipos de erros.</text:span></text:p>
                  </text:list-item>
                </text:list>
              </text:list-item>
            </text:list>
          </draw:text-box>
        </draw:frame>
        <draw:frame draw:name="Google Shape;185;p25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custom-shape draw:name="Google Shape;186;p25" draw:style-name="gr3" draw:text-style-name="P6" draw:layer="layout" svg:width="23.225cm" svg:height="8.621cm" svg:x="0.905cm" svg:y="8.648cm">
          <text:p text:style-name="P12"><text:span text:style-name="T31">from urllib.request import urlopen</text:span></text:p>
          <text:p text:style-name="P12"><text:span text:style-name="T31">from urllib.error import HTTPError</text:span></text:p>
          <text:p text:style-name="P12"><text:span text:style-name="T32">from urllib.error import URLError</text:span></text:p>
          <text:p text:style-name="P12"><text:span text:style-name="T31"/></text:p>
          <text:p text:style-name="P12"><text:span text:style-name="T31">try:</text:span></text:p>
          <text:p text:style-name="P19"><text:span text:style-name="T31">html = urlopen('https://pythonscrapingthisurldoesnotexist.com')</text:span></text:p>
          <text:p text:style-name="P12"><text:span text:style-name="T31">except HTTPError as e:</text:span></text:p>
          <text:p text:style-name="P19"><text:span text:style-name="T31">print(e)</text:span></text:p>
          <text:p text:style-name="P12"><text:span text:style-name="T32">except URLError as e:</text:span></text:p>
          <text:p text:style-name="P19"><text:span text:style-name="T32">print('Servidor não encontrado.')</text:span></text:p>
          <text:p text:style-name="P12"><text:span text:style-name="T31">else:</text:span></text:p>
          <text:p text:style-name="P19"><text:span text:style-name="T31">print('Tudo certo. Seguir com o scraping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0;g1e2646f06c9_0_15:notes" draw:style-name="gr2" draw:layer="layout" svg:width="12.699cm" svg:height="9.524cm" svg:x="3.176cm" svg:y="1.905cm" draw:page-number="13" presentation:class="page"/>
          <draw:frame draw:name="Google Shape;181;g1e2646f06c9_0_15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tributeError" draw:style-name="dp1" draw:master-page-name="OBJECT" presentation:presentation-page-layout-name="AL1T11">
        <draw:frame draw:name="Google Shape;191;p26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AttributeError</text:span></text:p>
          </draw:text-box>
        </draw:frame>
        <draw:frame draw:name="Google Shape;192;p26" presentation:style-name="pr2" draw:text-style-name="P5" draw:layer="layout" svg:width="14.053cm" svg:height="12.742cm" svg:x="-0.423cm" svg:y="4.445cm" presentation:class="outline" presentation:user-transformed="true">
          <draw:text-box>
            <text:list text:style-name="L19">
              <text:list-item>
                <text:p text:style-name="P20"><text:span text:style-name="T6">Relacionado ao conteúdo da página, que nem sempre conterá o que se busca;</text:span></text:p>
              </text:list-item>
            </text:list>
            <text:p text:style-name="P21"><text:span text:style-name="T6"/></text:p>
            <text:list text:continue-numbering="true" text:style-name="L19">
              <text:list-item>
                <text:p text:style-name="P22"><text:span text:style-name="T6">Ao acessar uma tag em um objeto BS4, é interessante verificar se ela realmente existe;</text:span></text:p>
              </text:list-item>
            </text:list>
            <text:p text:style-name="P21"><text:span text:style-name="T6"/></text:p>
            <text:list text:continue-numbering="true" text:style-name="L19">
              <text:list-item>
                <text:p text:style-name="P22"><text:span text:style-name="T6">Ao tentar acessar uma tag inexistente, será retornado um objeto </text:span><text:span text:style-name="T24">None</text:span><text:span text:style-name="T6"> e resultará no lançamento de um </text:span><text:span text:style-name="T24">AttributeError</text:span><text:span text:style-name="T6">;</text:span></text:p>
              </text:list-item>
            </text:list>
            <text:p text:style-name="P21"><text:span text:style-name="T6"/></text:p>
            <text:list text:continue-numbering="true" text:style-name="L19">
              <text:list-item>
                <text:p text:style-name="P22"><text:span text:style-name="T6">Página de </text:span><text:span text:style-name="T37"><text:a xlink:href="http://www.pythonscraping.com/pages/page1.html" xlink:type="simple">exemplo</text:a></text:span><text:span text:style-name="T6">.</text:span></text:p>
              </text:list-item>
            </text:list>
          </draw:text-box>
        </draw:frame>
        <draw:frame draw:name="Google Shape;193;p26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custom-shape draw:name="Google Shape;194;p26" draw:style-name="gr3" draw:text-style-name="P6" draw:layer="layout" svg:width="12.048cm" svg:height="7.908cm" svg:x="13.656cm" svg:y="4.726cm">
          <text:p text:style-name="P12"><text:span text:style-name="T38">try</text:span><text:span text:style-name="T39">:</text:span></text:p>
          <text:p text:style-name="P19"><text:span text:style-name="T39">conteudo = bs.find_all(</text:span><text:span text:style-name="T40">'img'</text:span><text:span text:style-name="T39">)</text:span></text:p>
          <text:p text:style-name="P19"><text:span text:style-name="T11">print</text:span><text:span text:style-name="T39">(conteudo.attrs[</text:span><text:span text:style-name="T40">'src'</text:span><text:span text:style-name="T39">])</text:span></text:p>
          <text:p text:style-name="P23"><text:span text:style-name="T38">except </text:span><text:span text:style-name="T11">AttributeError </text:span><text:span text:style-name="T38">as </text:span><text:span text:style-name="T39">e:</text:span></text:p>
          <text:p text:style-name="P12"><text:span text:style-name="T39"><text:s text:c="4"/></text:span><text:span text:style-name="T11">print</text:span><text:span text:style-name="T39">(</text:span><text:span text:style-name="T40">'Tag não encontrada'</text:span><text:span text:style-name="T39">)</text:span></text:p>
          <text:p text:style-name="P23"><text:span text:style-name="T38">else</text:span><text:span text:style-name="T39">:</text:span></text:p>
          <text:p text:style-name="P11"><text:span text:style-name="T38">if </text:span><text:span text:style-name="T39">conteudo == </text:span><text:span text:style-name="T38">None</text:span><text:span text:style-name="T39">:</text:span></text:p>
          <text:p text:style-name="P19"><text:span text:style-name="T39"><text:s text:c="4"/></text:span><text:span text:style-name="T11">print </text:span><text:span text:style-name="T39">(</text:span><text:span text:style-name="T40">'Tag não encontrada'</text:span><text:span text:style-name="T39">)</text:span></text:p>
          <text:p text:style-name="P24"><text:span text:style-name="T38">else</text:span><text:span text:style-name="T39">:</text:span></text:p>
          <text:p text:style-name="P12"><text:span text:style-name="T39"><text:s text:c="8"/></text:span><text:span text:style-name="T11">print</text:span><text:span text:style-name="T39">(conteud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6" draw:style-name="gr3" draw:text-style-name="P6" draw:layer="layout" svg:width="20.777cm" svg:height="1.229cm" svg:x="0.964cm" svg:y="16.662cm">
          <text:p text:style-name="P15"><text:span text:style-name="T41">AttributeError: ResultSet object has no attribute 'attrs'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8;g1e2646f06c9_0_23:notes" draw:style-name="gr2" draw:layer="layout" svg:width="12.699cm" svg:height="9.524cm" svg:x="3.176cm" svg:y="1.905cm" draw:page-number="14" presentation:class="page"/>
          <draw:frame draw:name="Google Shape;189;g1e2646f06c9_0_23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ícios" draw:style-name="dp1" draw:master-page-name="OBJECT" presentation:presentation-page-layout-name="AL1T11">
        <draw:frame draw:name="Google Shape;200;p27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Exercícios</text:span></text:p>
          </draw:text-box>
        </draw:frame>
        <draw:frame draw:name="Google Shape;201;p27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21">
              <text:list-item>
                <text:p text:style-name="P13"><text:span text:style-name="T4">Resolver os exercícios propostos </text:span><text:span text:style-name="T5"><text:a xlink:href="https://docs.google.com/document/d/1XosJTxvxTstuq6sVEj4d7mJ2if-uOwWQ3BUY3ldvPxA/edit?usp=sharing" xlink:type="simple">aqui</text:a></text:span><text:span text:style-name="T4">.</text:span></text:p>
              </text:list-item>
            </text:list>
          </draw:text-box>
        </draw:frame>
        <draw:frame draw:name="Google Shape;202;p27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name="Google Shape;197;g34dcc4fe5c7_0_0:notes" draw:style-name="gr2" draw:layer="layout" svg:width="12.699cm" svg:height="9.524cm" svg:x="3.176cm" svg:y="1.905cm" draw:page-number="15" presentation:class="page"/>
          <draw:frame draw:name="Google Shape;198;g34dcc4fe5c7_0_0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f81b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frame draw:name="Google Shape;12;p2" presentation:style-name="OBJECT-title" draw:layer="backgroundobjects" svg:width="22.859cm" svg:height="3.175cm" svg:x="1.27cm" svg:y="0.763cm" presentation:class="title" presentation:placeholder="true" presentation:user-transformed="true">
        <draw:text-box/>
      </draw:frame>
      <draw:frame draw:name="Google Shape;13;p2" presentation:style-name="OBJECT-outline1" draw:layer="backgroundobjects" svg:width="22.859cm" svg:height="12.572cm" svg:x="1.27cm" svg:y="4.445cm" presentation:class="outline" presentation:placeholder="true" presentation:user-transformed="true">
        <draw:text-box/>
      </draw:frame>
      <draw:frame draw:name="Google Shape;14;p2" presentation:style-name="Mpr1" draw:text-style-name="MP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5;p2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6;p2" presentation:style-name="Mpr1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17;p2" draw:style-name="Mgr3" draw:text-style-name="MP7" draw:layer="backgroundobjects" svg:width="22.528cm" svg:height="0.01cm" draw:transform="rotate (-3.14159265358979) translate (22.529cm 4.324cm)">
        <text:p/>
        <draw:enhanced-geometry draw:mirror-horizontal="true" draw:mirror-vertical="false" svg:viewBox="0 0 21600 21600" draw:type="mso-spt32" draw:enhanced-path="M 0 0 L 21600 21600 N"/>
      </draw:custom-shape>
      <draw:frame draw:name="Google Shape;18;p2" draw:style-name="Mgr4" draw:text-style-name="MP7" draw:layer="backgroundobjects" svg:width="5.013cm" svg:height="3.671cm" svg:x="19.302cm" svg:y="0.733cm">
        <draw:image xlink:href="Pictures/10000201000001DA0000015B5D9DBE45C88A5E6E.png" xlink:type="simple" xlink:show="embed" xlink:actuate="onLoad">
          <text:p/>
        </draw:image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6.0.5.2$Linux_X86_64 LibreOffice_project/</meta:generator>
  </office:meta>
</office:document-meta>
</file>