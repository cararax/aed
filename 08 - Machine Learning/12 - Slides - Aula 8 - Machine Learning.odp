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0BF000000C2A6AC07F27BF8270E.png" manifest:media-type="image/png"/>
  <manifest:file-entry manifest:full-path="Pictures/100002010000034D00000163BEB318FD9F4148C6.png" manifest:media-type="image/png"/>
  <manifest:file-entry manifest:full-path="Pictures/10000000000002300000020CC88E431426493EE8.png" manifest:media-type="image/png"/>
  <manifest:file-entry manifest:full-path="Pictures/TablePreview3.svm" manifest:media-type=""/>
  <manifest:file-entry manifest:full-path="Pictures/1000000000000352000002404D045A289637C8EA.png" manifest:media-type="image/png"/>
  <manifest:file-entry manifest:full-path="Pictures/10000000000000D7000000EBDD3D1EBFAD53AF10.png" manifest:media-type="image/png"/>
  <manifest:file-entry manifest:full-path="Pictures/1000000000000493000001F6A758242A0E81A19B.png" manifest:media-type="image/png"/>
  <manifest:file-entry manifest:full-path="Pictures/100002010000022B0000005CD5939FC9786C7872.png" manifest:media-type="image/png"/>
  <manifest:file-entry manifest:full-path="Pictures/1000020100000552000002E421DE455F3B7CC4AD.png" manifest:media-type="image/png"/>
  <manifest:file-entry manifest:full-path="Pictures/10000201000001F4000001EFFB041C5C5064D5C5.png" manifest:media-type="image/png"/>
  <manifest:file-entry manifest:full-path="Pictures/10000201000001DA0000015B5D9DBE45C88A5E6E.png" manifest:media-type="image/png"/>
  <manifest:file-entry manifest:full-path="Pictures/TablePreview1.svm" manifest:media-type=""/>
  <manifest:file-entry manifest:full-path="Pictures/10000201000004DA0000046ADE4A01FB135C2E5C.png" manifest:media-type="image/png"/>
  <manifest:file-entry manifest:full-path="Pictures/10000000000003340000025FDED515C74095C4DF.png" manifest:media-type="image/png"/>
  <manifest:file-entry manifest:full-path="Pictures/100000000000022A0000017720736B012BDB407A.png" manifest:media-type="image/png"/>
  <manifest:file-entry manifest:full-path="Pictures/100000000000021E000001840CFF1F6C53B7740E.png" manifest:media-type="image/png"/>
  <manifest:file-entry manifest:full-path="Pictures/1000000000000222000000B05D59A73F91ABB02C.png" manifest:media-type="image/png"/>
  <manifest:file-entry manifest:full-path="Pictures/1000020100000500000002D068F4CFD153363EEF.png" manifest:media-type="image/png"/>
  <manifest:file-entry manifest:full-path="Pictures/TablePreview2.svm" manifest:media-type=""/>
  <manifest:file-entry manifest:full-path="Pictures/1000020100000137000001F4D107D8C21A992EC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1f497d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stroke-linejoin="round" draw:fill="solid" draw:fill-color="#1f49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1f497d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aa84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1f49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1f49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15cm, 6.499cm, 5.599cm, 5.024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3cm, 1.692cm, 3.703cm, 2.068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7cm, 0.382cm)" draw:image-opacity="100%" style:mirror="none"/>
    </style:style>
    <style:style style:name="gr20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3.277cm" style:use-optimal-column-width="false"/>
    </style:style>
    <style:style style:name="co3" style:family="table-column">
      <style:table-column-properties style:column-width="3.831cm" style:use-optimal-column-width="false"/>
    </style:style>
    <style:style style:name="co4" style:family="table-column">
      <style:table-column-properties style:column-width="3.832cm" style:use-optimal-column-width="false"/>
    </style:style>
    <style:style style:name="co5" style:family="table-column">
      <style:table-column-properties style:column-width="5.027cm" style:use-optimal-column-width="false"/>
    </style:style>
    <style:style style:name="co6" style:family="table-column">
      <style:table-column-properties style:column-width="2.192cm" style:use-optimal-column-width="false"/>
    </style:style>
    <style:style style:name="co7" style:family="table-column">
      <style:table-column-properties style:column-width="2.899cm" style:use-optimal-column-width="false"/>
    </style:style>
    <style:style style:name="co8" style:family="table-column">
      <style:table-column-properties style:column-width="5.693cm" style:use-optimal-column-width="false"/>
    </style:style>
    <style:style style:name="co9" style:family="table-column">
      <style:table-column-properties style:column-width="10.423cm" style:use-optimal-column-width="false"/>
    </style:style>
    <style:style style:name="co10" style:family="table-column">
      <style:table-column-properties style:column-width="6.144cm" style:use-optimal-column-width="false"/>
    </style:style>
    <style:style style:name="ro1" style:family="table-row">
      <style:table-row-properties style:row-height="1.241cm"/>
    </style:style>
    <style:style style:name="ro2" style:family="table-row">
      <style:table-row-properties style:row-height="1.146cm"/>
    </style:style>
    <style:style style:name="ro3" style:family="table-row">
      <style:table-row-properties style:row-height="1.44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058cm"/>
    </style:style>
    <style:style style:name="ro6" style:family="table-row">
      <style:table-row-properties style:row-height="1.05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9e9e9e"/>
    </style:style>
    <style:style style:name="ce4" style:family="table-cell">
      <loext:graphic-properties draw:fill="none" draw:textarea-vertical-align="bottom" fo:padding-top="0.052cm" fo:padding-bottom="0.052cm" fo:padding-left="0.253cm" fo:padding-right="0.253cm"/>
      <style:paragraph-properties fo:border-left="0.37pt solid #9e9e9e" fo:border-right="0.37pt solid #000000" fo:border-top="0.37pt solid #9e9e9e" fo:border-bottom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1f497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80%" fo:text-align="start" fo:text-indent="0cm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1.058cm" fo:margin-top="0.423cm" fo:margin-bottom="0cm" fo:line-height="115%" fo:text-align="start" fo:text-indent="0cm" style:writing-mode="lr-tb"/>
    </style:style>
    <style:style style:name="P26" style:family="paragraph">
      <style:paragraph-properties fo:margin-left="0cm" fo:margin-right="1.058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4" style:family="text">
      <style:text-properties fo:font-variant="normal" fo:text-transform="none" fo:color="#b7b7b7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1.5pt" fo:letter-spacing="normal" fo:font-style="normal" style:text-underline-style="none" fo:font-weight="normal" style:font-name-asian="Calibri" style:font-size-asian="21.5pt" style:font-style-asian="normal" style:font-weight-asian="normal" style:font-name-complex="Calibri" style:font-size-complex="21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177cm" text:min-label-width="1.09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244cm" text:min-label-width="1.02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257cm" text:min-label-width="1.01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257cm" text:min-label-width="1.013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257cm" text:min-label-width="1.013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257cm" text:min-label-width="1.013cm"/>
        <style:text-properties fo:color="#000000" fo:font-size="100%"/>
      </text:list-level-style-number>
      <text:list-level-style-bullet text:level="2" text:bullet-char="–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de dados e extração de conhecimento:&#10;Machine learning" draw:style-name="dp1" draw:master-page-name="OBJECT" presentation:presentation-page-layout-name="AL1T11">
        <draw:frame draw:name="Google Shape;86;p1" presentation:style-name="pr1" draw:text-style-name="P2" draw:layer="layout" svg:width="22.281cm" svg:height="4.162cm" svg:x="1.136cm" svg:y="7.925cm" presentation:class="title" presentation:user-transformed="true">
          <draw:text-box>
            <text:p text:style-name="P1"><text:span text:style-name="T1">Análise de dados e extração de conhecimento:</text:span><text:span text:style-name="T1"><text:line-break/></text:span><text:span text:style-name="T2">Machine learning</text:span></text:p>
          </draw:text-box>
        </draw:frame>
        <draw:frame draw:name="Google Shape;87;p1" presentation:style-name="pr2" draw:text-style-name="P5" draw:layer="layout" svg:width="9.203cm" svg:height="2.239cm" svg:x="1.499cm" svg:y="16.326cm" presentation:class="outline" presentation:user-transformed="true">
          <draw:text-box>
            <text:p text:style-name="P3"><text:span text:style-name="T3">Professor Leandro O. Freitas</text:span></text:p>
            <text:p text:style-name="P4"><text:span text:style-name="T3">leandro@politecnico.ufsm.br</text:span></text:p>
          </draw:text-box>
        </draw:frame>
        <draw:frame draw:name="Google Shape;88;p1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frame draw:name="Google Shape;83;p1:notes" presentation:style-name="pr4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84;p1:notes" draw:style-name="gr1" draw:layer="layout" svg:width="13.147cm" svg:height="10.66cm" svg:x="3.287cm" svg:y="2.132cm" draw:page-number="1" presentation:class="page"/>
        </presentation:notes>
      </draw:page>
      <draw:page draw:name="Cronograma" draw:style-name="dp1" draw:master-page-name="OBJECT" presentation:presentation-page-layout-name="AL1T11">
        <draw:custom-shape draw:name="Google Shape;93;g1e3beef4504_0_0" draw:style-name="gr2" draw:text-style-name="P9" draw:layer="layout" svg:width="21.169cm" svg:height="0.008cm" svg:x="2.117cm" svg:y="10.7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4;g1e3beef4504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onograma</text:span></text:p>
          </draw:text-box>
        </draw:frame>
        <draw:custom-shape draw:name="Google Shape;95;g1e3beef4504_0_0" draw:style-name="gr3" draw:text-style-name="P11" draw:layer="layout" svg:width="4.769cm" svg:height="2.203cm" draw:transform="rotate (0.611214304048414) translate (6.321cm 9.078cm)">
          <text:p text:style-name="P10"><text:span text:style-name="T5">Expressões regul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g1e3beef4504_0_0" draw:style-name="gr3" draw:text-style-name="P11" draw:layer="layout" svg:width="3.349cm" svg:height="2.203cm" draw:transform="rotate (0.611388836973614) translate (10.591cm 11.755cm)">
          <text:p text:style-name="P10"><text:span text:style-name="T5">Web scra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g1e3beef4504_0_0" draw:style-name="gr3" draw:text-style-name="P11" draw:layer="layout" svg:width="4.184cm" svg:height="2.203cm" draw:transform="rotate (0.611388836973614) translate (19.215cm 12.297cm)">
          <text:p text:style-name="P10"><text:span text:style-name="T6">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g1e3beef4504_0_0" draw:style-name="gr3" draw:text-style-name="P11" draw:layer="layout" svg:width="4.554cm" svg:height="2.203cm" draw:transform="rotate (0.611214304048414) translate (-0.484cm 12.729cm)">
          <text:p text:style-name="P10"><text:span text:style-name="T5">Ambientação pyth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g1e3beef4504_0_0" draw:style-name="gr4" draw:text-style-name="P12" draw:layer="layout" svg:width="0.506cm" svg:height="0.506cm" svg:x="1.775cm" svg:y="10.478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g1e3beef4504_0_0" draw:style-name="gr4" draw:text-style-name="P12" draw:layer="layout" svg:width="0.506cm" svg:height="0.506cm" svg:x="6.634cm" svg:y="10.483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g1e3beef4504_0_0" draw:style-name="gr4" draw:text-style-name="P12" draw:layer="layout" svg:width="0.506cm" svg:height="0.506cm" svg:x="12cm" svg:y="10.483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g1e3beef4504_0_0" draw:style-name="gr3" draw:text-style-name="P11" draw:layer="layout" svg:width="1.841cm" svg:height="1.101cm" svg:x="-0.067cm" svg:y="10.175cm">
          <text:p text:style-name="P10"><text:span text:style-name="T7">Mar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g1e3beef4504_0_0" draw:style-name="gr3" draw:text-style-name="P11" draw:layer="layout" svg:width="1.841cm" svg:height="1.101cm" svg:x="23.216cm" svg:y="10.175cm">
          <text:p text:style-name="P10"><text:span text:style-name="T7">Ju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g1e3beef4504_0_0" draw:style-name="gr5" draw:text-style-name="P13" draw:layer="layout" svg:width="0.506cm" svg:height="0.506cm" svg:x="21.644cm" svg:y="10.483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g1e3beef4504_0_0" draw:style-name="gr4" draw:text-style-name="P12" draw:layer="layout" svg:width="0.506cm" svg:height="0.506cm" svg:x="16.822cm" svg:y="10.483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g1e3beef4504_0_0" draw:style-name="gr3" draw:text-style-name="P11" draw:layer="layout" svg:width="3.349cm" svg:height="1.356cm" draw:transform="rotate (0.611388836973614) translate (16.518cm 9.427cm)">
          <text:p text:style-name="P10"><text:span text:style-name="T5">A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g1e3beef4504_0_0" draw:style-name="gr6" draw:text-style-name="P9" draw:layer="layout" svg:width="19.869cm" svg:height="0.004cm" svg:x="1.775cm" svg:y="10.7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8;g1e3beef4504_0_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90;g1e3beef4504_0_0:notes" draw:style-name="gr1" draw:layer="layout" svg:width="13.147cm" svg:height="10.66cm" svg:x="3.287cm" svg:y="2.132cm" draw:page-number="2" presentation:class="page"/>
          <draw:frame draw:name="Google Shape;91;g1e3beef4504_0_0:notes" presentation:style-name="pr5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Machine learning" draw:style-name="dp1" draw:master-page-name="OBJECT" presentation:presentation-page-layout-name="AL1T11">
        <draw:frame draw:name="Google Shape;113;g24e6ceff1fa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Machine learning</text:span></text:p>
          </draw:text-box>
        </draw:frame>
        <draw:frame draw:name="Google Shape;114;g24e6ceff1fa_0_0" presentation:style-name="pr6" draw:text-style-name="P5" draw:layer="layout" svg:width="22.859cm" svg:height="13.801cm" svg:x="1.27cm" svg:y="4.445cm" presentation:class="outline" presentation:user-transformed="true">
          <draw:text-box>
            <text:list text:style-name="L6">
              <text:list-item>
                <text:p text:style-name="P14"><text:span text:style-name="T3">A partir dos dados coletados via web scraping, cria-se um dataset (conjunto de linhas e colunas com dados extraídos);</text:span></text:p>
              </text:list-item>
            </text:list>
            <text:p text:style-name="P15"><text:span text:style-name="T8"/></text:p>
            <text:p text:style-name="P16"><text:span text:style-name="T3"/></text:p>
            <text:p text:style-name="P16"><text:span text:style-name="T3"/></text:p>
            <text:list text:continue-numbering="true" text:style-name="L6">
              <text:list-item>
                <text:p text:style-name="P15"><text:span text:style-name="T3">Após a AED, este dataset será usado como input de um algoritmo aprendizagem de máquina (</text:span><text:span text:style-name="T9">machine learning - ml</text:span><text:span text:style-name="T3">)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“</text:span><text:span text:style-name="T9">ML</text:span><text:span text:style-name="T3"> é um campo de estudo que dá ao computador a habilidade de aprender sem ser explicitamente programado.” (Samuel, A. 1959)</text:span></text:p>
                  </text:list-item>
                </text:list>
              </text:list-item>
              <text:list-item>
                <text:p text:style-name="P17"><text:span text:style-name="T3">Programação Tradicional: </text:span></text:p>
                <text:list>
                  <text:list-item>
                    <text:p text:style-name="P10"><text:span text:style-name="T3">Nós damos ao computador </text:span><text:span text:style-name="T8">Dados + Regras </text:span><text:span text:style-name="T3">→ ele nos dá Respostas.</text:span></text:p>
                  </text:list-item>
                </text:list>
              </text:list-item>
              <text:list-item>
                <text:p text:style-name="P10"><text:span text:style-name="T3">Aprendizado de Máquina: </text:span></text:p>
                <text:list>
                  <text:list-item>
                    <text:p text:style-name="P10"><text:span text:style-name="T3">Nós damos ao computador </text:span><text:span text:style-name="T8">Dados + Respostas (Exemplos)</text:span><text:span text:style-name="T3"> → ele aprende as Regras.</text:span></text:p>
                  </text:list-item>
                </text:list>
              </text:list-item>
              <text:list-item>
                <text:p text:style-name="P17"><text:span text:style-name="T3">Isso permite fazer: reconhecimento e análise de dados, identificação de padrões, tomada de decisões, etc..</text:span></text:p>
              </text:list-item>
            </text:list>
          </draw:text-box>
        </draw:frame>
        <draw:frame draw:name="Google Shape;115;g24e6ceff1fa_0_0" draw:style-name="gr7" draw:text-style-name="P9" draw:layer="layout" svg:width="15.908cm" svg:height="2.636cm" svg:x="3.113cm" svg:y="6.197cm">
          <draw:image xlink:href="Pictures/100002010000022B0000005CD5939FC9786C7872.png" xlink:type="simple" xlink:show="embed" xlink:actuate="onLoad">
            <text:p/>
          </draw:image>
        </draw:frame>
        <draw:frame draw:name="Google Shape;116;g24e6ceff1fa_0_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10;g24e6ceff1fa_0_0:notes" draw:style-name="gr1" draw:layer="layout" svg:width="13.147cm" svg:height="10.66cm" svg:x="3.287cm" svg:y="2.132cm" draw:page-number="3" presentation:class="page"/>
          <draw:frame draw:name="Google Shape;111;g24e6ceff1fa_0_0:notes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Machine learning na web (1)" draw:style-name="dp1" draw:master-page-name="OBJECT" presentation:presentation-page-layout-name="AL1T11">
        <draw:frame draw:name="Google Shape;121;g3ed32f8271e_0_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na web (1)</text:span></text:p>
          </draw:text-box>
        </draw:frame>
        <draw:frame draw:name="Google Shape;122;g3ed32f8271e_0_3" presentation:style-name="pr2" draw:text-style-name="P5" draw:layer="layout" svg:width="23.553cm" svg:height="14.225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Netflix (recomendação): Sistema web distribuído;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Analisa filmes assistidos, tempo de uso, avaliações, gêneros preferidos, usuários semelhantes;</text:span></text:p>
                  </text:list-item>
                  <text:list-item>
                    <text:p text:style-name="P18"><text:span text:style-name="T6">Técnicas: classificação, clusterização, filtragem colaborativa.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0">
              <text:list-item>
                <text:p text:style-name="P15"><text:span text:style-name="T10">Gmail (classificação): app de análise e classificação de texto;</text:span></text:p>
                <text:list>
                  <text:list-item>
                    <text:p text:style-name="P10"><text:span text:style-name="T6">Analisa conteúdo das mensagens (strings);</text:span></text:p>
                  </text:list-item>
                  <text:list-item>
                    <text:p text:style-name="P10"><text:span text:style-name="T6">Técnica: classificação (spam/ não spam).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0">
              <text:list-item>
                <text:p text:style-name="P15"><text:span text:style-name="T10">Amazon: e-commerce;</text:span></text:p>
                <text:list>
                  <text:list-item>
                    <text:p text:style-name="P10"><text:span text:style-name="T6">Analisa histórico de compras, produtos visualizados, carrinho abandonado, comportamento de clientes semelhantes;</text:span></text:p>
                  </text:list-item>
                  <text:list-item>
                    <text:p text:style-name="P10"><text:span text:style-name="T6">Técnica: sistema de recomendação e previsão de interesse.</text:span></text:p>
                  </text:list-item>
                </text:list>
              </text:list-item>
            </text:list>
            <text:p text:style-name="P15"><text:span text:style-name="T10"/></text:p>
            <text:p text:style-name="P15"><text:span text:style-name="T11">Dados → ML → Decisões automáticas → Experiência personalizada</text:span></text:p>
          </draw:text-box>
        </draw:frame>
        <draw:frame draw:name="Google Shape;123;g3ed32f8271e_0_3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18;g3ed32f8271e_0_3:notes" draw:style-name="gr1" draw:layer="layout" svg:width="13.147cm" svg:height="10.66cm" svg:x="3.287cm" svg:y="2.132cm" draw:page-number="4" presentation:class="page"/>
          <draw:frame draw:name="Google Shape;119;g3ed32f8271e_0_3:notes" presentation:style-name="pr8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Dataset, indivíduos, features e rótulos" draw:style-name="dp1" draw:master-page-name="OBJECT" presentation:presentation-page-layout-name="AL1T11">
        <draw:frame draw:name="Google Shape;128;g3e5e236e45b_0_3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1">Dataset, indivíduos, features e rótulos</text:span></text:p>
          </draw:text-box>
        </draw:frame>
        <draw:frame draw:name="Google Shape;129;g3e5e236e45b_0_31" presentation:style-name="pr6" draw:text-style-name="P5" draw:layer="layout" svg:width="22.859cm" svg:height="8.594cm" svg:x="1.27cm" svg:y="9.846cm" presentation:class="outline" presentation:user-transformed="true">
          <draw:text-box>
            <text:list text:style-name="L13">
              <text:list-item>
                <text:p text:style-name="P14"><text:span text:style-name="T12">Dataset</text:span><text:span text:style-name="T6">: conjunto de dados que será usado pelo algoritmo para aprender sobre algo;</text:span></text:p>
              </text:list-item>
              <text:list-item>
                <text:p text:style-name="P18"><text:span text:style-name="T12">Indivíduos</text:span><text:span text:style-name="T6">: também chamados de exemplos. São as linhas do dataset (registros);</text:span></text:p>
              </text:list-item>
              <text:list-item>
                <text:p text:style-name="P18"><text:span text:style-name="T12">Features</text:span><text:span text:style-name="T6">: colunas do dataset. Representam características de cada indivíduo do dataset (horas estudo, faltas e exercícios); </text:span></text:p>
              </text:list-item>
              <text:list-item>
                <text:p text:style-name="P18"><text:span text:style-name="T12">Label</text:span><text:span text:style-name="T6">: coluna “especial” do dataset. Serve para classificar (rotular) os indivíduos (Nota). Nem sempre está presente.</text:span></text:p>
              </text:list-item>
            </text:list>
          </draw:text-box>
        </draw:frame>
        <draw:frame draw:name="Google Shape;130;g3e5e236e45b_0_31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31;g3e5e236e45b_0_31" draw:style-name="standard" draw:layer="layout" svg:width="15.324cm" svg:height="3.532cm" svg:x="5.037cm" svg:y="4.92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9"><text:span text:style-name="T13">Horas estudo</text:span></text:p>
              </table:table-cell>
              <table:table-cell>
                <text:p text:style-name="P19"><text:span text:style-name="T13">Faltas</text:span></text:p>
              </table:table-cell>
              <table:table-cell>
                <text:p text:style-name="P19"><text:span text:style-name="T13">Exercícios</text:span></text:p>
              </table:table-cell>
              <table:table-cell>
                <text:p text:style-name="P19"><text:span text:style-name="T13">Nota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">8</text:span></text:p>
              </table:table-cell>
              <table:table-cell>
                <text:p text:style-name="P1"><text:span text:style-name="T3">0</text:span></text:p>
              </table:table-cell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3e5e236e45b_0_31:notes" draw:style-name="gr1" draw:layer="layout" svg:width="13.147cm" svg:height="10.66cm" svg:x="3.287cm" svg:y="2.132cm" draw:page-number="5" presentation:class="page"/>
          <draw:frame draw:name="Google Shape;126;g3e5e236e45b_0_31:notes" presentation:style-name="pr9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mo funciona um algoritmo de ML" draw:style-name="dp1" draw:master-page-name="OBJECT" presentation:presentation-page-layout-name="AL1T11">
        <draw:frame draw:name="Google Shape;136;g3e5e236e45b_0_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o funciona um algoritmo de ML</text:span></text:p>
          </draw:text-box>
        </draw:frame>
        <draw:frame draw:name="Google Shape;137;g3e5e236e45b_0_39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138;g3e5e236e45b_0_39" draw:style-name="gr3" draw:text-style-name="P11" draw:layer="layout" svg:width="6.888cm" svg:height="7.621cm" svg:x="1.862cm" svg:y="6.329cm">
          <text:p text:style-name="P1"><text:span text:style-name="T10">Dataset</text:span></text:p>
          <text:p text:style-name="P1"><text:span text:style-name="T10"><text:s text:c="3"/>↓</text:span></text:p>
          <text:p text:style-name="P1"><text:span text:style-name="T10">Treinamento</text:span></text:p>
          <text:p text:style-name="P1"><text:span text:style-name="T10"><text:s text:c="3"/>↓</text:span></text:p>
          <text:p text:style-name="P1"><text:span text:style-name="T10">Modelo</text:span></text:p>
          <text:p text:style-name="P1"><text:span text:style-name="T10"><text:s text:c="3"/>↓</text:span></text:p>
          <text:p text:style-name="P1"><text:span text:style-name="T10">Prev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g3e5e236e45b_0_39" draw:style-name="gr3" draw:text-style-name="P11" xml:id="id1" draw:id="id1" draw:layer="layout" svg:width="12.709cm" svg:height="7.621cm" svg:x="9.942cm" svg:y="6.329cm">
          <text:p text:style-name="P1"><text:span text:style-name="T10">1000 imóveis conhecidos</text:span></text:p>
          <text:p text:style-name="P1"><text:span text:style-name="T10">↓</text:span></text:p>
          <text:p text:style-name="P1"><text:span text:style-name="T10">Treinar modelo</text:span></text:p>
          <text:p text:style-name="P1"><text:span text:style-name="T10">↓</text:span></text:p>
          <text:p text:style-name="P1"><text:span text:style-name="T10">Modelo aprende padrões</text:span></text:p>
          <text:p text:style-name="P1"><text:span text:style-name="T10">↓</text:span></text:p>
          <text:p text:style-name="P1"><text:span text:style-name="T10">Estimar valor de novo imó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3;g3e5e236e45b_0_39:notes" draw:style-name="gr1" draw:layer="layout" svg:width="13.147cm" svg:height="10.66cm" svg:x="3.287cm" svg:y="2.132cm" draw:page-number="6" presentation:class="page"/>
          <draw:frame draw:name="Google Shape;134;g3e5e236e45b_0_39:notes" presentation:style-name="pr10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Treino e teste" draw:style-name="dp1" draw:master-page-name="OBJECT" presentation:presentation-page-layout-name="AL1T11">
        <draw:frame draw:name="Google Shape;144;g3e5e236e45b_0_5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eino e teste</text:span></text:p>
          </draw:text-box>
        </draw:frame>
        <draw:frame draw:name="Google Shape;145;g3e5e236e45b_0_5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O processo de treinamento de um modelo de ML passa por duas etapas - treino e teste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Treino (aprendizado): algoritmo analisa parte dos dados do dataset, identifica padrões nas características dos indivíduos e aprende o comportamento deles;</text:span></text:p>
                  </text:list-item>
                  <text:list-item>
                    <text:p text:style-name="P18"><text:span text:style-name="T6">Teste (avaliação): utiliza outra parte dos dados do dataset para verificar se o que ele aprendeu está, de fato, correto. 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0">
              <text:list-item>
                <text:p text:style-name="P15"><text:span text:style-name="T10">Geralmente o dataset é dividido em 80% das amostras (indivíduos ou registros) para o treinamento e 20% para teste.</text:span></text:p>
              </text:list-item>
            </text:list>
          </draw:text-box>
        </draw:frame>
        <draw:frame draw:name="Google Shape;146;g3e5e236e45b_0_53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41;g3e5e236e45b_0_53:notes" draw:style-name="gr1" draw:layer="layout" svg:width="13.147cm" svg:height="10.66cm" svg:x="3.287cm" svg:y="2.132cm" draw:page-number="7" presentation:class="page"/>
          <draw:frame draw:name="Google Shape;142;g3e5e236e45b_0_53:notes" presentation:style-name="pr11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do de máquina" draw:style-name="dp1" draw:master-page-name="OBJECT" presentation:presentation-page-layout-name="AL1T11">
        <draw:frame draw:name="Google Shape;151;g24e6ceff1fa_0_5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do de máquina</text:span></text:p>
          </draw:text-box>
        </draw:frame>
        <draw:frame draw:name="Google Shape;152;g24e6ceff1fa_0_51" draw:style-name="gr7" draw:text-style-name="P9" draw:layer="layout" svg:width="18.273cm" svg:height="13.526cm" svg:x="3.844cm" svg:y="4.612cm">
          <draw:image xlink:href="Pictures/10000000000003340000025FDED515C74095C4DF.png" xlink:type="simple" xlink:show="embed" xlink:actuate="onLoad">
            <text:p/>
          </draw:image>
        </draw:frame>
        <draw:custom-shape draw:name="Google Shape;153;g24e6ceff1fa_0_51" draw:style-name="gr3" draw:text-style-name="P11" draw:layer="layout" svg:width="23.972cm" svg:height="1.523cm" svg:x="0.674cm" svg:y="17.823cm">
          <text:p text:style-name="P10"><text:span text:style-name="T14">Anisha, P. R. and A. Polati (2021). “A Bird Eye View on the Usage of Artificial Intelligence.” In: Communication Software and Networks. Ed. by S. C. Satapathy, V. Bhateja, M. Ramakrishna Murty, N. Gia Nhu, and J. Kotti. Springer Singapore: Singapore, pp. 61–77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g24e6ceff1fa_0_51" presentation:style-name="pr3" draw:text-style-name="P7" draw:layer="layout" svg:width="5.926cm" svg:height="1.013cm" svg:x="18.203cm" svg:y="17.468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48;g24e6ceff1fa_0_51:notes" draw:style-name="gr1" draw:layer="layout" svg:width="13.147cm" svg:height="10.66cm" svg:x="3.287cm" svg:y="2.132cm" draw:page-number="8" presentation:class="page"/>
          <draw:frame draw:name="Google Shape;149;g24e6ceff1fa_0_51:notes" presentation:style-name="pr12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supervisionada" draw:style-name="dp1" draw:master-page-name="OBJECT" presentation:presentation-page-layout-name="AL1T11">
        <draw:frame draw:name="Google Shape;159;g24e6ceff1fa_0_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supervisionada</text:span></text:p>
          </draw:text-box>
        </draw:frame>
        <draw:frame draw:name="Google Shape;160;g24e6ceff1fa_0_5" presentation:style-name="pr2" draw:text-style-name="P5" draw:layer="layout" svg:width="23.657cm" svg:height="13.995cm" svg:x="1.27cm" svg:y="4.445cm" presentation:class="outline" presentation:user-transformed="true">
          <draw:text-box>
            <text:list text:style-name="L16">
              <text:list-item>
                <text:p text:style-name="P14"><text:span text:style-name="T6">Trabalha com dados rotulados, onde para cada exemplo/amostra do dataset existe uma saída que os identifica (classificação);</text:span></text:p>
              </text:list-item>
            </text:list>
            <text:p text:style-name="P15"><text:span text:style-name="T6"/></text:p>
            <text:p text:style-name="P15"><text:span text:style-name="T6"/></text:p>
            <text:p text:style-name="P16"><text:span text:style-name="T6"/></text:p>
            <text:list text:continue-numbering="true" text:style-name="L16">
              <text:list-item>
                <text:p text:style-name="P15"><text:span text:style-name="T6">O aprendizado se dá pela relação entre as características que formam o exemplo e a saída esperada (rótulo);</text:span></text:p>
              </text:list-item>
            </text:list>
            <text:list text:style-name="L18">
              <text:list-item>
                <text:list>
                  <text:list-item>
                    <text:p text:style-name="P10"><text:span text:style-name="T15">Objetivo: a partir da análise de registros e suas saídas, prever o comportamento ou tomar decisões para situações futuras;</text:span></text:p>
                  </text:list-item>
                </text:list>
              </text:list-item>
              <text:list-item>
                <text:p text:style-name="P10"><text:span text:style-name="T6">Exemplos:</text:span></text:p>
              </text:list-item>
            </text:list>
            <text:list text:style-name="L19">
              <text:list-item>
                <text:list>
                  <text:list-item>
                    <text:p text:style-name="P10"><text:span text:style-name="T8">Figuras de animais</text:span><text:span text:style-name="T3"> com seus nomes para identificação de outras figuras de animais;</text:span></text:p>
                  </text:list-item>
                  <text:list-item>
                    <text:p text:style-name="P10"><text:span text:style-name="T3">Lista com </text:span><text:span text:style-name="T8">hábitos de navegação</text:span><text:span text:style-name="T3"> de usuários para sugerir dicas de pesquisa na web (viagens, música, comida, etc).</text:span></text:p>
                  </text:list-item>
                </text:list>
              </text:list-item>
            </text:list>
          </draw:text-box>
        </draw:frame>
        <draw:frame draw:name="Google Shape;161;g24e6ceff1fa_0_5" draw:style-name="gr7" draw:text-style-name="P9" draw:layer="layout" svg:width="16.808cm" svg:height="2.785cm" svg:x="6.241cm" svg:y="6.547cm">
          <draw:image xlink:href="Pictures/100002010000022B0000005CD5939FC9786C7872.png" xlink:type="simple" xlink:show="embed" xlink:actuate="onLoad">
            <text:p/>
          </draw:image>
        </draw:frame>
        <draw:custom-shape draw:name="Google Shape;162;g24e6ceff1fa_0_5" draw:style-name="gr8" draw:text-style-name="P11" draw:layer="layout" svg:width="3.366cm" svg:height="2.995cm" svg:x="19.915cm" svg:y="6.508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g24e6ceff1fa_0_5" draw:style-name="gr3" draw:text-style-name="P11" draw:layer="layout" svg:width="1.86cm" svg:height="1.101cm" svg:x="21.349cm" svg:y="5.629cm">
          <text:p text:style-name="P10"><text:span text:style-name="T7">rótu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g24e6ceff1fa_0_5" draw:style-name="gr3" draw:text-style-name="P11" draw:layer="layout" svg:width="2.599cm" svg:height="2.285cm" svg:x="2.135cm" svg:y="6.851cm">
          <text:p text:style-name="P10"><text:span text:style-name="T7">exemplo 0</text:span></text:p>
          <text:p text:style-name="P10"><text:span text:style-name="T7">exemplo 1</text:span></text:p>
          <text:p text:style-name="P10"><text:span text:style-name="T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g24e6ceff1fa_0_5" draw:style-name="gr9" draw:text-style-name="P9" draw:layer="layout" svg:width="1.422cm" svg:height="0.082cm" draw:transform="rotate (-3.14159265358979) translate (6.158cm 7.3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g24e6ceff1fa_0_5" draw:style-name="gr9" draw:text-style-name="P9" draw:layer="layout" svg:width="1.422cm" svg:height="0.082cm" draw:transform="rotate (-3.14159265358979) translate (6.158cm 7.99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7;g24e6ceff1fa_0_5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56;g24e6ceff1fa_0_5:notes" draw:style-name="gr1" draw:layer="layout" svg:width="13.147cm" svg:height="10.66cm" svg:x="3.287cm" svg:y="2.132cm" draw:page-number="9" presentation:class="page"/>
          <draw:frame draw:name="Google Shape;157;g24e6ceff1fa_0_5:notes" presentation:style-name="pr13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supervisionada" draw:style-name="dp1" draw:master-page-name="OBJECT" presentation:presentation-page-layout-name="AL1T11">
        <draw:frame draw:name="Google Shape;172;g24e6ceff1fa_0_1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supervisionada</text:span></text:p>
          </draw:text-box>
        </draw:frame>
        <draw:frame draw:name="Google Shape;173;g24e6ceff1fa_0_10" presentation:style-name="pr2" draw:text-style-name="P5" draw:layer="layout" svg:width="22.859cm" svg:height="1.806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Exemplo:</text:span></text:p>
              </text:list-item>
            </text:list>
          </draw:text-box>
        </draw:frame>
        <draw:frame draw:name="Google Shape;174;g24e6ceff1fa_0_10" draw:style-name="gr7" draw:text-style-name="P9" draw:layer="layout" svg:width="14.657cm" svg:height="9.921cm" svg:x="1.27cm" svg:y="5.898cm">
          <draw:image xlink:href="Pictures/100000000000022A0000017720736B012BDB407A.png" xlink:type="simple" xlink:show="embed" xlink:actuate="onLoad">
            <text:p/>
          </draw:image>
        </draw:frame>
        <draw:custom-shape draw:name="Google Shape;175;g24e6ceff1fa_0_10" draw:style-name="gr10" draw:text-style-name="P11" xml:id="id2" draw:id="id2" draw:layer="layout" svg:width="6.877cm" svg:height="2.224cm" svg:x="0.978cm" svg:y="6.912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g24e6ceff1fa_0_10" draw:style-name="gr10" draw:text-style-name="P11" xml:id="id3" draw:id="id3" draw:layer="layout" svg:width="6.877cm" svg:height="0.891cm" svg:x="1.011cm" svg:y="10.336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g24e6ceff1fa_0_10" draw:style-name="gr10" draw:text-style-name="P11" xml:id="id4" draw:id="id4" draw:layer="layout" svg:width="6.877cm" svg:height="0.891cm" svg:x="1.011cm" svg:y="13.558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g24e6ceff1fa_0_10" draw:style-name="gr11" draw:text-style-name="P11" xml:id="id5" draw:id="id5" draw:layer="layout" svg:width="8.496cm" svg:height="2.877cm" svg:x="16.325cm" svg:y="6.305cm">
          <text:p text:style-name="P10"><text:span text:style-name="T7">A: gosta de filmes de fantasia.</text:span></text:p>
          <text:p text:style-name="P10"><text:span text:style-name="T7">Sugerir outros filmes da franquia HP, Senhor dos Anéis, Crônicas de Nárnia, etc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g24e6ceff1fa_0_10" draw:style-name="gr12" draw:text-style-name="P11" xml:id="id6" draw:id="id6" draw:layer="layout" svg:width="6.507cm" svg:height="2.035cm" svg:x="1.011cm" svg:y="11.333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g24e6ceff1fa_0_10" draw:style-name="gr12" draw:text-style-name="P11" xml:id="id7" draw:id="id7" draw:layer="layout" svg:width="6.507cm" svg:height="0.668cm" svg:x="1.011cm" svg:y="9.428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g24e6ceff1fa_0_10" draw:style-name="gr12" draw:text-style-name="P11" xml:id="id8" draw:id="id8" draw:layer="layout" svg:width="6.507cm" svg:height="0.668cm" svg:x="1.011cm" svg:y="14.864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g24e6ceff1fa_0_10" draw:style-name="gr13" draw:text-style-name="P11" xml:id="id9" draw:id="id9" draw:layer="layout" svg:width="8.496cm" svg:height="2.285cm" svg:x="16.325cm" svg:y="9.692cm">
          <text:p text:style-name="P10"><text:span text:style-name="T7">B: gosta de filmes de ficção científica.</text:span></text:p>
          <text:p text:style-name="P10"><text:span text:style-name="T7">Sugerir outros filmes da franquia SW ou Star Tre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g24e6ceff1fa_0_10" presentation:style-name="pr2" draw:text-style-name="P5" draw:layer="layout" svg:width="22.859cm" svg:height="1.806cm" svg:x="1.27cm" svg:y="16.51cm" presentation:class="outline" presentation:user-transformed="true">
          <draw:text-box>
            <text:list text:style-name="L20">
              <text:list-item>
                <text:p text:style-name="P14"><text:span text:style-name="T10">Quanto maior o dataset de entrada usado para treino, mais preciso será o resultado da aprendizagem.</text:span></text:p>
              </text:list-item>
            </text:list>
          </draw:text-box>
        </draw:frame>
        <draw:frame draw:name="Google Shape;184;g24e6ceff1fa_0_1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9;g24e6ceff1fa_0_10:notes" draw:style-name="gr1" draw:layer="layout" svg:width="13.147cm" svg:height="10.66cm" svg:x="3.287cm" svg:y="2.132cm" draw:page-number="10" presentation:class="page"/>
          <draw:frame draw:name="Google Shape;170;g24e6ceff1fa_0_10:notes" presentation:style-name="pr14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supervisionada" draw:style-name="dp1" draw:master-page-name="OBJECT" presentation:presentation-page-layout-name="AL1T11">
        <draw:frame draw:name="Google Shape;189;g24e6ceff1fa_0_3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supervisionada</text:span></text:p>
          </draw:text-box>
        </draw:frame>
        <draw:frame draw:name="Google Shape;190;g24e6ceff1fa_0_31" presentation:style-name="pr2" draw:text-style-name="P5" draw:layer="layout" svg:width="23.342cm" svg:height="14.388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Análise de crédito de clientes:</text:span></text:p>
              </text:list-item>
            </text:list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6"><text:span text:style-name="T16"/></text:p>
            <text:list text:style-name="L22">
              <text:list-item>
                <text:p text:style-name="P15"><text:span text:style-name="T16">O resultado da aprendizagem supervisionada deve estar relacionada aos rótulos dos registros do dataset (no exemplo: bom ou mau).</text:span></text:p>
              </text:list-item>
            </text:list>
          </draw:text-box>
        </draw:frame>
        <draw:g draw:name="Google Shape;191;g24e6ceff1fa_0_31">
          <draw:frame draw:name="Google Shape;192;g24e6ceff1fa_0_31" draw:style-name="gr7" draw:text-style-name="P9" draw:layer="layout" svg:width="11.954cm" svg:height="8.741cm" svg:x="0.173cm" svg:y="5.94cm">
            <draw:image xlink:href="Pictures/100000000000021E000001840CFF1F6C53B7740E.png" xlink:type="simple" xlink:show="embed" xlink:actuate="onLoad">
              <text:p/>
            </draw:image>
          </draw:frame>
          <draw:custom-shape draw:name="Google Shape;193;g24e6ceff1fa_0_31" draw:style-name="gr14" draw:text-style-name="P11" draw:layer="layout" svg:width="1.969cm" svg:height="4.108cm" svg:x="4.757cm" svg:y="10.645cm">
            <text:p text:style-name="P10"><text:span text:style-name="T1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4;g24e6ceff1fa_0_31" draw:style-name="gr9" draw:text-style-name="P9" draw:layer="layout" svg:width="1.071cm" svg:height="0.001cm" svg:x="6.727cm" svg:y="14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5;g24e6ceff1fa_0_31" draw:style-name="gr3" draw:text-style-name="P11" draw:layer="layout" svg:width="3.579cm" svg:height="1.693cm" svg:x="7.985cm" svg:y="13.755cm">
            <text:p text:style-name="P10"><text:span text:style-name="T7">Rótulo ou saída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96;g24e6ceff1fa_0_31" draw:style-name="gr7" draw:text-style-name="P9" draw:layer="layout" svg:width="11.954cm" svg:height="3.853cm" svg:x="13.445cm" svg:y="9.713cm">
          <draw:image xlink:href="Pictures/1000000000000222000000B05D59A73F91ABB02C.png" xlink:type="simple" xlink:show="embed" xlink:actuate="onLoad">
            <text:p/>
          </draw:image>
        </draw:frame>
        <draw:custom-shape draw:name="Google Shape;197;g24e6ceff1fa_0_31" draw:style-name="gr15" draw:text-style-name="P9" draw:layer="layout" svg:width="0.032cm" svg:height="9.305cm" draw:transform="rotate (-3.14159265358979) translate (12.914cm 15.307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8;g24e6ceff1fa_0_31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86;g24e6ceff1fa_0_31:notes" draw:style-name="gr1" draw:layer="layout" svg:width="13.147cm" svg:height="10.66cm" svg:x="3.287cm" svg:y="2.132cm" draw:page-number="11" presentation:class="page"/>
          <draw:frame draw:name="Google Shape;187;g24e6ceff1fa_0_31:notes" presentation:style-name="pr15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não supervisionada" draw:style-name="dp1" draw:master-page-name="OBJECT" presentation:presentation-page-layout-name="AL1T11">
        <draw:frame draw:name="Google Shape;203;g24e6ceff1fa_0_26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não supervisionada</text:span></text:p>
          </draw:text-box>
        </draw:frame>
        <draw:frame draw:name="Google Shape;204;g24e6ceff1fa_0_2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Nesta abordagem </text:span><text:span text:style-name="T11">não usamos dados rotulados</text:span><text:span text:style-name="T10">, ou seja, os registros do dataset não possuem um atributo que serve para identificá-los;</text:span></text:p>
              </text:list-item>
            </text:list>
            <text:p text:style-name="P16"><text:span text:style-name="T10"/></text:p>
            <text:list text:continue-numbering="true" text:style-name="L9">
              <text:list-item>
                <text:p text:style-name="P15"><text:span text:style-name="T10">Objetivo: </text:span><text:span text:style-name="T11">agrupar elementos</text:span><text:span text:style-name="T10"> baseando-se nas suas características e similaridades, tornando-os grupos únicos (cluster);</text:span></text:p>
              </text:list-item>
            </text:list>
            <text:p text:style-name="P16"><text:span text:style-name="T10"/></text:p>
            <text:list text:continue-numbering="true" text:style-name="L9">
              <text:list-item>
                <text:p text:style-name="P15"><text:span text:style-name="T10">Neste caso não buscamos respostas corretas (rótulos), pois não há. A acurácia dos resultados é alcançada pelos </text:span><text:span text:style-name="T11">comportamentos semelhantes dos indivíduos</text:span><text:span text:style-name="T10"> (exemplos), quando comparados com outros grupos.</text:span></text:p>
              </text:list-item>
            </text:list>
          </draw:text-box>
        </draw:frame>
        <draw:frame draw:name="Google Shape;205;g24e6ceff1fa_0_26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00;g24e6ceff1fa_0_26:notes" draw:style-name="gr1" draw:layer="layout" svg:width="13.147cm" svg:height="10.66cm" svg:x="3.287cm" svg:y="2.132cm" draw:page-number="12" presentation:class="page"/>
          <draw:frame draw:name="Google Shape;201;g24e6ceff1fa_0_26:notes" presentation:style-name="pr16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não supervisionada" draw:style-name="dp1" draw:master-page-name="OBJECT" presentation:presentation-page-layout-name="AL1T11">
        <draw:frame draw:name="Google Shape;210;g24e6ceff1fa_0_46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não supervisionada</text:span></text:p>
          </draw:text-box>
        </draw:frame>
        <draw:frame draw:name="Google Shape;211;g24e6ceff1fa_0_4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Exemplos semelhantes a aprendizagem supervisionada, porém sem rótul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Conjunto de imagens de animais pode ser usado para </text:span><text:span text:style-name="T5">separar felinos de caninos,</text:span><text:span text:style-name="T6"> etc.;</text:span></text:p>
                  </text:list-item>
                  <text:list-item>
                    <text:p text:style-name="P18"><text:span text:style-name="T6">Itens comprados online podem ajudar a identificação de hábitos de compras e agrupar de acordo com </text:span><text:span text:style-name="T5">localização geográfica ou idade</text:span><text:span text:style-name="T6">.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0">
              <text:list-item>
                <text:p text:style-name="P15"><text:span text:style-name="T10">A </text:span><text:span text:style-name="T11">quantidade de clusters</text:span><text:span text:style-name="T10"> necessária para agrupar indivíduos semelhantes deve ser definida de acordo com as características dos mesmos.</text:span></text:p>
              </text:list-item>
            </text:list>
          </draw:text-box>
        </draw:frame>
        <draw:frame draw:name="Google Shape;212;g24e6ceff1fa_0_46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07;g24e6ceff1fa_0_46:notes" draw:style-name="gr1" draw:layer="layout" svg:width="13.147cm" svg:height="10.66cm" svg:x="3.287cm" svg:y="2.132cm" draw:page-number="13" presentation:class="page"/>
          <draw:frame draw:name="Google Shape;208;g24e6ceff1fa_0_46:notes" presentation:style-name="pr1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não supervisionada" draw:style-name="dp1" draw:master-page-name="OBJECT" presentation:presentation-page-layout-name="AL1T11">
        <draw:frame draw:name="Google Shape;217;g24e6ceff1fa_0_5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não supervisionada</text:span></text:p>
          </draw:text-box>
        </draw:frame>
        <draw:frame draw:name="Google Shape;218;g24e6ceff1fa_0_57" presentation:style-name="pr2" draw:text-style-name="P5" draw:layer="layout" svg:width="22.859cm" svg:height="1.037cm" svg:x="1.27cm" svg:y="17.461cm" presentation:class="outline" presentation:user-transformed="true">
          <draw:text-box>
            <text:p text:style-name="P15"><text:span text:style-name="T14">https://www.diegocalvo.es/en/learning-non-supervised/</text:span></text:p>
          </draw:text-box>
        </draw:frame>
        <draw:frame draw:name="Google Shape;219;g24e6ceff1fa_0_57" draw:style-name="gr7" draw:text-style-name="P9" draw:layer="layout" svg:width="20.604cm" svg:height="11.194cm" svg:x="2.8cm" svg:y="4.785cm">
          <draw:image xlink:href="Pictures/1000020100000552000002E421DE455F3B7CC4AD.png" xlink:type="simple" xlink:show="embed" xlink:actuate="onLoad">
            <text:p/>
          </draw:image>
        </draw:frame>
        <draw:frame draw:name="Google Shape;220;g24e6ceff1fa_0_57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221;g24e6ceff1fa_0_57" draw:style-name="gr16" draw:text-style-name="P11" draw:layer="layout" svg:width="5.922cm" svg:height="11.965cm" svg:x="3.006cm" svg:y="4.733cm">
          <text:p text:style-name="P1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2;g24e6ceff1fa_0_57" draw:style-name="gr3" draw:text-style-name="P11" draw:layer="layout" svg:width="4.583cm" svg:height="1.143cm" svg:x="4.65cm" svg:y="16.39cm">
          <text:p text:style-name="P10"><text:span text:style-name="T17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24e6ceff1fa_0_57:notes" draw:style-name="gr1" draw:layer="layout" svg:width="13.147cm" svg:height="10.66cm" svg:x="3.287cm" svg:y="2.132cm" draw:page-number="14" presentation:class="page"/>
          <draw:frame draw:name="Google Shape;215;g24e6ceff1fa_0_57:notes" presentation:style-name="pr18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não supervisionada" draw:style-name="dp1" draw:master-page-name="OBJECT" presentation:presentation-page-layout-name="AL1T11">
        <draw:frame draw:name="Google Shape;227;g24e6d6317cb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não supervisionada</text:span></text:p>
          </draw:text-box>
        </draw:frame>
        <draw:frame draw:name="Google Shape;228;g24e6d6317cb_0_0" presentation:style-name="pr2" draw:text-style-name="P5" draw:layer="layout" svg:width="24.107cm" svg:height="14.604cm" svg:x="0.742cm" svg:y="4.445cm" presentation:class="outline" presentation:user-transformed="true">
          <draw:text-box>
            <text:list text:style-name="L24">
              <text:list-item>
                <text:p text:style-name="P14"><text:span text:style-name="T18">Cenário: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6">Visando maximizar suas vendas, uma rede de supermercados solicita a análise de sua base de dados para criar </text:span><text:span text:style-name="T5">campanhas específicas para cada grupo de clientes</text:span><text:span text:style-name="T6">;</text:span></text:p>
                  </text:list-item>
                  <text:list-item>
                    <text:p text:style-name="P20"><text:span text:style-name="T6">Não fornecem detalhes sobre como agrupar os clientes;</text:span></text:p>
                  </text:list-item>
                  <text:list-item>
                    <text:p text:style-name="P20"><text:span text:style-name="T6">Solicitam a </text:span><text:span text:style-name="T5">identificação de relações </text:span><text:span text:style-name="T6">entre indivíduos, se houver.</text:span></text:p>
                  </text:list-item>
                  <text:list-item>
                    <text:p text:style-name="P20"><text:span text:style-name="T6">É possível descobrir que: </text:span></text:p>
                  </text:list-item>
                </text:list>
              </text:list-item>
            </text:list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list text:style-name="L27">
              <text:list-item>
                <text:list>
                  <text:list-item>
                    <text:p text:style-name="P21"><text:span text:style-name="T3">Após agrupar clientes em categorias com </text:span><text:span text:style-name="T8">hábitos de compra e métodos de pagamento semelhantes</text:span><text:span text:style-name="T3">, será possível definir estratégias de marketing para propor ao seu cliente. Eles podem considerar </text:span><text:span text:style-name="T8">oferecer descontos para idosos nas segundas e terças-feiras</text:span><text:span text:style-name="T3"> ou para </text:span><text:span text:style-name="T8">pessoas que pagam com pix</text:span><text:span text:style-name="T3">.</text:span></text:p>
                  </text:list-item>
                </text:list>
              </text:list-item>
            </text:list>
          </draw:text-box>
        </draw:frame>
        <draw:frame draw:name="Google Shape;229;g24e6d6317cb_0_0" draw:style-name="standard" draw:layer="layout" svg:width="20.107cm" svg:height="3.059cm" svg:x="2.741cm" svg:y="11.545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ce2"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1"><text:span text:style-name="T19">pagamentos com cartão sextas-feiras</text:span></text:p>
              </table:table-cell>
              <table:table-cell>
                <text:p text:style-name="P1"><text:span text:style-name="T19">produtos de bebê sábados</text:span></text:p>
              </table:table-cell>
              <table:table-cell>
                <text:p text:style-name="P1"><text:span text:style-name="T19">idosos segundas e terças-feiras</text:span></text:p>
              </table:table-cell>
              <table:table-cell>
                <text:p text:style-name="P1"><text:span text:style-name="T19">abaixo de R$ 50,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30;g24e6d6317cb_0_0" draw:style-name="gr7" draw:text-style-name="P9" draw:layer="layout" svg:width="1.185cm" svg:height="1.906cm" svg:x="4.872cm" svg:y="10.739cm">
          <draw:image xlink:href="Pictures/1000020100000137000001F4D107D8C21A992ECB.png" xlink:type="simple" xlink:show="embed" xlink:actuate="onLoad">
            <text:p/>
          </draw:image>
        </draw:frame>
        <draw:frame draw:name="Google Shape;231;g24e6d6317cb_0_0" draw:style-name="gr7" draw:text-style-name="P9" draw:layer="layout" svg:width="2.494cm" svg:height="2.469cm" svg:x="9.117cm" svg:y="10.175cm">
          <draw:image xlink:href="Pictures/10000201000001F4000001EFFB041C5C5064D5C5.png" xlink:type="simple" xlink:show="embed" xlink:actuate="onLoad">
            <text:p/>
          </draw:image>
        </draw:frame>
        <draw:frame draw:name="Google Shape;232;g24e6d6317cb_0_0" draw:style-name="gr7" draw:text-style-name="P9" draw:layer="layout" svg:width="2.103cm" svg:height="2.299cm" svg:x="14.371cm" svg:y="10.346cm">
          <draw:image xlink:href="Pictures/10000000000000D7000000EBDD3D1EBFAD53AF10.png" xlink:type="simple" xlink:show="embed" xlink:actuate="onLoad">
            <text:p/>
          </draw:image>
        </draw:frame>
        <draw:frame draw:name="Google Shape;233;g24e6d6317cb_0_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234;g24e6d6317cb_0_0" draw:style-name="gr17" draw:text-style-name="P9" draw:layer="layout" svg:width="4.648cm" svg:height="1.748cm" svg:x="17.823cm" svg:y="10.873cm">
          <draw:image xlink:href="Pictures/1000000000000352000002404D045A289637C8EA.png" xlink:type="simple" xlink:show="embed" xlink:actuate="onLoad">
            <text:p/>
          </draw:image>
        </draw:frame>
        <presentation:notes draw:style-name="dp2">
          <draw:page-thumbnail draw:name="Google Shape;224;g24e6d6317cb_0_0:notes" draw:style-name="gr1" draw:layer="layout" svg:width="13.147cm" svg:height="10.66cm" svg:x="3.287cm" svg:y="2.132cm" draw:page-number="15" presentation:class="page"/>
          <draw:frame draw:name="Google Shape;225;g24e6d6317cb_0_0:notes" presentation:style-name="pr19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por reforço" draw:style-name="dp1" draw:master-page-name="OBJECT" presentation:presentation-page-layout-name="AL1T11">
        <draw:frame draw:name="Google Shape;239;g24e6d6317cb_0_6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por reforço</text:span></text:p>
          </draw:text-box>
        </draw:frame>
        <draw:frame draw:name="Google Shape;240;g24e6d6317cb_0_6" presentation:style-name="pr6" draw:text-style-name="P5" draw:layer="layout" svg:width="23.563cm" svg:height="13.211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Utiliza a técnica de recompensa e punição para o treinamento: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5">Agente</text:span><text:span text:style-name="T6"> de IA realiza </text:span><text:span text:style-name="T5">ações</text:span><text:span text:style-name="T6"> em um </text:span><text:span text:style-name="T5">ambiente</text:span><text:span text:style-name="T6"> e aprende com experiências: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22"><text:span text:style-name="T6">Recebe </text:span><text:span text:style-name="T5">recompensa </text:span><text:span text:style-name="T6">ao realizar ação correta;</text:span></text:p>
                      </text:list-item>
                      <text:list-item>
                        <text:p text:style-name="P22"><text:span text:style-name="T6">Recebe </text:span><text:span text:style-name="T5">punição</text:span><text:span text:style-name="T6"> ao realizar ação incorreta;</text:span></text:p>
                      </text:list-item>
                      <text:list-item>
                        <text:p text:style-name="P22"><text:span text:style-name="T6">Objetivo: </text:span><text:span text:style-name="T5">maximizar as recompensas</text:span><text:span text:style-name="T6">.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Constrói seu dataset durante o processo de análise dos estados do ambiente;</text:span></text:p>
              </text:list-item>
            </text:list>
            <text:list text:style-name="L29">
              <text:list-item>
                <text:p text:style-name="P22"><text:span text:style-name="T10">Semelhante a</text:span><text:span text:style-name="T20">:</text:span></text:p>
                <text:list>
                  <text:list-item>
                    <text:p text:style-name="P20"><text:span text:style-name="T6">Um ser humano: uma criança aprende várias coisas por experiências no seu dia-a-dia;</text:span></text:p>
                  </text:list-item>
                  <text:list-item>
                    <text:p text:style-name="P20"><text:span text:style-name="T6">Um jogo, onde a cada ação correta o jogador avança e obtém mais pontos. A cada ação errada é punido de alguma forma.</text:span></text:p>
                  </text:list-item>
                </text:list>
              </text:list-item>
            </text:list>
          </draw:text-box>
        </draw:frame>
        <draw:frame draw:name="Google Shape;241;g24e6d6317cb_0_6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36;g24e6d6317cb_0_6:notes" draw:style-name="gr1" draw:layer="layout" svg:width="13.147cm" svg:height="10.66cm" svg:x="3.287cm" svg:y="2.132cm" draw:page-number="16" presentation:class="page"/>
          <draw:frame draw:name="Google Shape;237;g24e6d6317cb_0_6:notes" presentation:style-name="pr20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gem por reforço" draw:style-name="dp1" draw:master-page-name="OBJECT" presentation:presentation-page-layout-name="AL1T11">
        <draw:frame draw:name="Google Shape;246;g24e6d6317cb_0_1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gem por reforço</text:span></text:p>
          </draw:text-box>
        </draw:frame>
        <draw:frame draw:name="Google Shape;247;g24e6d6317cb_0_1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Exempl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Ensinar uma máquina a jogar um jogo de tabuleiro atribuindo pontuações a cada movimento </text:span><text:span text:style-name="T5">com base no resultado e no estado atual do tabuleiro</text:span><text:span text:style-name="T6">. 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18"><text:span text:style-name="T6">Cada vez que você atribui uma nota a uma ação para minimizar as punições e/ou maximizar as recompensas, você está analisando um problema que pode ser potencialmente tratado com aprendizado por reforço;</text:span></text:p>
                      </text:list-item>
                    </text:list>
                  </text:list-item>
                  <text:list-item>
                    <text:p text:style-name="P18"><text:span text:style-name="T6">Carros autônomos (</text:span><text:span text:style-name="T21">driveless cars</text:span><text:span text:style-name="T6">);</text:span></text:p>
                  </text:list-item>
                </text:list>
              </text:list-item>
            </text:list>
          </draw:text-box>
        </draw:frame>
        <draw:frame draw:name="Google Shape;248;g24e6d6317cb_0_13" draw:style-name="gr18" draw:text-style-name="P9" draw:layer="layout" svg:width="11.596cm" svg:height="4.588cm" svg:x="7.419cm" svg:y="12.64cm">
          <draw:image xlink:href="Pictures/1000020100000500000002D068F4CFD153363EEF.png" xlink:type="simple" xlink:show="embed" xlink:actuate="onLoad">
            <text:p/>
          </draw:image>
        </draw:frame>
        <draw:custom-shape draw:name="Google Shape;249;g24e6d6317cb_0_13" draw:style-name="gr3" draw:text-style-name="P11" draw:layer="layout" svg:width="19.42cm" svg:height="1.016cm" svg:x="3.473cm" svg:y="17.274cm">
          <text:p text:style-name="P10"><text:span text:style-name="T14">https://www.mathworks.com/discovery/reinforcement-learning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g24e6d6317cb_0_13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43;g24e6d6317cb_0_13:notes" draw:style-name="gr1" draw:layer="layout" svg:width="13.147cm" svg:height="10.66cm" svg:x="3.287cm" svg:y="2.132cm" draw:page-number="17" presentation:class="page"/>
          <draw:frame draw:name="Google Shape;244;g24e6d6317cb_0_13:notes" presentation:style-name="pr21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do de máquina" draw:style-name="dp1" draw:master-page-name="OBJECT" presentation:presentation-page-layout-name="AL1T11">
        <draw:frame draw:name="Google Shape;255;g24e6d6317cb_0_2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do de máquina</text:span></text:p>
          </draw:text-box>
        </draw:frame>
        <draw:frame draw:name="Google Shape;256;g24e6d6317cb_0_22" draw:style-name="gr7" draw:text-style-name="P9" draw:layer="layout" svg:width="19.27cm" svg:height="14.264cm" svg:x="3.844cm" svg:y="4.612cm">
          <draw:image xlink:href="Pictures/10000000000003340000025FDED515C74095C4DF.png" xlink:type="simple" xlink:show="embed" xlink:actuate="onLoad">
            <text:p/>
          </draw:image>
        </draw:frame>
        <draw:custom-shape draw:name="Google Shape;257;g24e6d6317cb_0_22" draw:style-name="gr8" draw:text-style-name="P11" draw:layer="layout" svg:width="2.097cm" svg:height="1.964cm" svg:x="18.508cm" svg:y="9.39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58;g24e6d6317cb_0_22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52;g24e6d6317cb_0_22:notes" draw:style-name="gr1" draw:layer="layout" svg:width="13.147cm" svg:height="10.66cm" svg:x="3.287cm" svg:y="2.132cm" draw:page-number="18" presentation:class="page"/>
          <draw:frame draw:name="Google Shape;253;g24e6d6317cb_0_22:notes" presentation:style-name="pr22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Regressão linear" draw:style-name="dp1" draw:master-page-name="OBJECT" presentation:presentation-page-layout-name="AL1T11">
        <draw:frame draw:name="Google Shape;263;g39d6e08ff8c_0_6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gressão linear</text:span></text:p>
          </draw:text-box>
        </draw:frame>
        <draw:frame draw:name="Google Shape;264;g39d6e08ff8c_0_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Regressão Linear é um método de ML usado para prever um valor numérico;</text:span></text:p>
              </text:list-item>
              <text:list-item>
                <text:p text:style-name="P23"><text:span text:style-name="T10">Funciona encontrando a relação mais simples possível entre duas coisa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6">A informação que você tem (ex: horas de estudo de um aluno).</text:span></text:p>
                  </text:list-item>
                  <text:list-item>
                    <text:p text:style-name="P23"><text:span text:style-name="T6">A informação que você quer prever (ex: a nota final desse aluno).</text:span></text:p>
                  </text:list-item>
                </text:list>
              </text:list-item>
              <text:list-item>
                <text:p text:style-name="P23"><text:span text:style-name="T10">O algoritmo “aprende” analisando vários exemplos passados (vários alunos com suas horas de estudo e notas) e desenha a “linha de tendência” que melhor representa essa relação.</text:span></text:p>
                <text:list>
                  <text:list-item>
                    <text:p text:style-name="P23"><text:span text:style-name="T6">Depois, quando um novo aluno chega e você só sabe as horas que ele estudou, você usa essa linha para prever qual será a nota dele.</text:span></text:p>
                  </text:list-item>
                </text:list>
              </text:list-item>
            </text:list>
          </draw:text-box>
        </draw:frame>
        <draw:frame draw:name="Google Shape;265;g39d6e08ff8c_0_6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60;g39d6e08ff8c_0_6:notes" draw:style-name="gr1" draw:layer="layout" svg:width="13.147cm" svg:height="10.66cm" svg:x="3.287cm" svg:y="2.132cm" draw:page-number="19" presentation:class="page"/>
          <draw:frame draw:name="Google Shape;261;g39d6e08ff8c_0_6:notes" presentation:style-name="pr23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Regressão linear: exemplo" draw:style-name="dp1" draw:master-page-name="OBJECT" presentation:presentation-page-layout-name="AL1T11">
        <draw:frame draw:name="Google Shape;270;g39d6e08ff8c_0_1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gressão linear: exemplo</text:span></text:p>
          </draw:text-box>
        </draw:frame>
        <draw:frame draw:name="Google Shape;271;g39d6e08ff8c_0_1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Previsão de preços de imóvei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Ele “aprende” a regra que os dados estão mostrando;</text:span></text:p>
                  </text:list-item>
                  <text:list-item>
                    <text:p text:style-name="P18"><text:span text:style-name="T6">A cada 1 m² a mais, o preço da casa tende a subir R$ 3.900,00.</text:span></text:p>
                  </text:list-item>
                  <text:list-item>
                    <text:p text:style-name="P18"><text:span text:style-name="T6">Qual o valor de um imóvel de 90m</text:span><text:span text:style-name="T22">2</text:span><text:span text:style-name="T6">?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18"><text:span text:style-name="T6">Com regressão linear estima-se que custe cerca de R$ 360 mi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72;g39d6e08ff8c_0_13" draw:style-name="standard" draw:layer="layout" svg:width="10.783cm" svg:height="5.29cm" svg:x="0.853cm" svg:y="9.727cm">
          <table:table>
            <table:table-column table:style-name="co6"/>
            <table:table-column table:style-name="co7"/>
            <table:table-column table:style-name="co8"/>
            <table:table-row table:style-name="ro5" table:default-cell-style-name="ce3">
              <table:table-cell>
                <text:p text:style-name="P24"><text:span text:style-name="T23">Imóvel</text:span></text:p>
              </table:table-cell>
              <table:table-cell>
                <text:p text:style-name="P24"><text:span text:style-name="T23">Tamanho</text:span></text:p>
              </table:table-cell>
              <table:table-cell table:style-name="ce4">
                <text:p text:style-name="P24"><text:span text:style-name="T23">Preço (em Mil R$)</text:span></text:p>
              </table:table-cell>
            </table:table-row>
            <table:table-row table:style-name="ro5" table:default-cell-style-name="ce3">
              <table:table-cell>
                <text:p text:style-name="P24"><text:span text:style-name="T23">A</text:span></text:p>
              </table:table-cell>
              <table:table-cell>
                <text:p text:style-name="P24"><text:span text:style-name="T23">50 m²</text:span></text:p>
              </table:table-cell>
              <table:table-cell>
                <text:p text:style-name="P19"><text:span text:style-name="T23">200</text:span></text:p>
              </table:table-cell>
            </table:table-row>
            <table:table-row table:style-name="ro5" table:default-cell-style-name="ce3">
              <table:table-cell>
                <text:p text:style-name="P24"><text:span text:style-name="T23">B</text:span></text:p>
              </table:table-cell>
              <table:table-cell>
                <text:p text:style-name="P24"><text:span text:style-name="T23">70 m²</text:span></text:p>
              </table:table-cell>
              <table:table-cell>
                <text:p text:style-name="P19"><text:span text:style-name="T23">280</text:span></text:p>
              </table:table-cell>
            </table:table-row>
            <table:table-row table:style-name="ro5" table:default-cell-style-name="ce3">
              <table:table-cell>
                <text:p text:style-name="P24"><text:span text:style-name="T23">C</text:span></text:p>
              </table:table-cell>
              <table:table-cell>
                <text:p text:style-name="P24"><text:span text:style-name="T23">100 m²</text:span></text:p>
              </table:table-cell>
              <table:table-cell>
                <text:p text:style-name="P19"><text:span text:style-name="T23">410</text:span></text:p>
              </table:table-cell>
            </table:table-row>
            <table:table-row table:style-name="ro6" table:default-cell-style-name="ce3">
              <table:table-cell>
                <text:p text:style-name="P24"><text:span text:style-name="T23">D</text:span></text:p>
              </table:table-cell>
              <table:table-cell>
                <text:p text:style-name="P24"><text:span text:style-name="T23">120 m²</text:span></text:p>
              </table:table-cell>
              <table:table-cell>
                <text:p text:style-name="P19"><text:span text:style-name="T23">47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73;g39d6e08ff8c_0_13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274;g39d6e08ff8c_0_13" draw:style-name="gr3" draw:text-style-name="P11" xml:id="id10" draw:id="id10" draw:layer="layout" svg:width="11.121cm" svg:height="6.438cm" svg:x="13.367cm" svg:y="9.727cm">
          <text:p text:style-name="P1"><text:span text:style-name="T6">1000 imóveis conhecidos</text:span></text:p>
          <text:p text:style-name="P1"><text:span text:style-name="T6">↓</text:span></text:p>
          <text:p text:style-name="P1"><text:span text:style-name="T6">Treinar modelo</text:span></text:p>
          <text:p text:style-name="P1"><text:span text:style-name="T6">↓</text:span></text:p>
          <text:p text:style-name="P1"><text:span text:style-name="T6">Modelo aprende padrões</text:span></text:p>
          <text:p text:style-name="P1"><text:span text:style-name="T6">↓</text:span></text:p>
          <text:p text:style-name="P1"><text:span text:style-name="T6">Estimar valor de novo imó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7;g39d6e08ff8c_0_13:notes" draw:style-name="gr1" draw:layer="layout" svg:width="13.147cm" svg:height="10.66cm" svg:x="3.287cm" svg:y="2.132cm" draw:page-number="20" presentation:class="page"/>
          <draw:frame draw:name="Google Shape;268;g39d6e08ff8c_0_13:notes" presentation:style-name="pr24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do de máquina" draw:style-name="dp1" draw:master-page-name="OBJECT" presentation:presentation-page-layout-name="AL1T11">
        <draw:frame draw:name="Google Shape;279;g39d6e08ff8c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do de máquina</text:span></text:p>
          </draw:text-box>
        </draw:frame>
        <draw:frame draw:name="Google Shape;280;g39d6e08ff8c_0_0" draw:style-name="gr7" draw:text-style-name="P9" draw:layer="layout" svg:width="19.27cm" svg:height="14.264cm" svg:x="3.844cm" svg:y="4.612cm">
          <draw:image xlink:href="Pictures/10000000000003340000025FDED515C74095C4DF.png" xlink:type="simple" xlink:show="embed" xlink:actuate="onLoad">
            <text:p/>
          </draw:image>
        </draw:frame>
        <draw:custom-shape draw:name="Google Shape;281;g39d6e08ff8c_0_0" draw:style-name="gr8" draw:text-style-name="P11" draw:layer="layout" svg:width="2.097cm" svg:height="1.964cm" svg:x="16.926cm" svg:y="4.981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82;g39d6e08ff8c_0_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76;g39d6e08ff8c_0_0:notes" draw:style-name="gr1" draw:layer="layout" svg:width="13.147cm" svg:height="10.66cm" svg:x="3.287cm" svg:y="2.132cm" draw:page-number="21" presentation:class="page"/>
          <draw:frame draw:name="Google Shape;277;g39d6e08ff8c_0_0:notes" presentation:style-name="pr25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lassificação" draw:style-name="dp1" draw:master-page-name="OBJECT" presentation:presentation-page-layout-name="AL1T11">
        <draw:frame draw:name="Google Shape;287;g24e6d6317cb_0_2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assificação</text:span></text:p>
          </draw:text-box>
        </draw:frame>
        <draw:frame draw:name="Google Shape;288;g24e6d6317cb_0_28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Conjunto de algoritmos para classificação de dados categorizados;</text:span></text:p>
              </text:list-item>
              <text:list-item>
                <text:p text:style-name="P18"><text:span text:style-name="T10">A partir de perguntas com respostas pré definidas (sim/não, macho/fêmea, sol/chuva/nublado/úmido), classifica-se um conjunto de dados;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Perguntas são aplicadas aos atributos dos registros do dataset.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0">
              <text:list-item>
                <text:p text:style-name="P15"><text:span text:style-name="T10">Alguns algoritmos: </text:span></text:p>
                <text:list>
                  <text:list-item>
                    <text:p text:style-name="P10"><text:span text:style-name="T6">Árvores de decisão;</text:span></text:p>
                  </text:list-item>
                  <text:list-item>
                    <text:p text:style-name="P10"><text:span text:style-name="T21">Random forests;</text:span></text:p>
                  </text:list-item>
                  <text:list-item>
                    <text:p text:style-name="P10"><text:span text:style-name="T21">Support Vector Machine. </text:span></text:p>
                  </text:list-item>
                </text:list>
              </text:list-item>
            </text:list>
          </draw:text-box>
        </draw:frame>
        <draw:frame draw:name="Google Shape;289;g24e6d6317cb_0_28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84;g24e6d6317cb_0_28:notes" draw:style-name="gr1" draw:layer="layout" svg:width="13.147cm" svg:height="10.66cm" svg:x="3.287cm" svg:y="2.132cm" draw:page-number="22" presentation:class="page"/>
          <draw:frame draw:name="Google Shape;285;g24e6d6317cb_0_28:notes" presentation:style-name="pr26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lassificação: exemplo" draw:style-name="dp1" draw:master-page-name="OBJECT" presentation:presentation-page-layout-name="AL1T11">
        <draw:frame draw:name="Google Shape;294;g24e6d6317cb_0_3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assificação: exemplo</text:span></text:p>
          </draw:text-box>
        </draw:frame>
        <draw:frame draw:name="Google Shape;295;g24e6d6317cb_0_35" presentation:style-name="pr2" draw:text-style-name="P5" draw:layer="layout" svg:width="22.859cm" svg:height="3.63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Árvore de decisão: utiliza análise de métricas estatísticas (entropia, </text:span><text:span text:style-name="T24">gini impurity</text:span><text:span text:style-name="T10"> e </text:span><text:span text:style-name="T24">information gain)</text:span><text:span text:style-name="T10"> para encontrar a(s) pergunta(s) mais adequadas durante o processo de classificação. </text:span></text:p>
              </text:list-item>
            </text:list>
          </draw:text-box>
        </draw:frame>
        <draw:frame draw:name="Google Shape;296;g24e6d6317cb_0_35" draw:style-name="gr7" draw:text-style-name="P9" draw:layer="layout" svg:width="8.658cm" svg:height="8.102cm" svg:x="0.423cm" svg:y="8.994cm">
          <draw:image xlink:href="Pictures/10000000000002300000020CC88E431426493EE8.png" xlink:type="simple" xlink:show="embed" xlink:actuate="onLoad">
            <text:p/>
          </draw:image>
        </draw:frame>
        <draw:frame draw:name="Google Shape;297;g24e6d6317cb_0_35" draw:style-name="gr7" draw:text-style-name="P9" draw:layer="layout" svg:width="15.47cm" svg:height="6.631cm" svg:x="9.467cm" svg:y="9.078cm">
          <draw:image xlink:href="Pictures/1000000000000493000001F6A758242A0E81A19B.png" xlink:type="simple" xlink:show="embed" xlink:actuate="onLoad">
            <text:p/>
          </draw:image>
        </draw:frame>
        <draw:custom-shape draw:name="Google Shape;298;g24e6d6317cb_0_35" draw:style-name="gr10" draw:text-style-name="P11" draw:layer="layout" svg:width="2.358cm" svg:height="8.532cm" svg:x="6.448cm" svg:y="8.807cm"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g24e6d6317cb_0_35" draw:style-name="gr3" draw:text-style-name="P11" draw:layer="layout" svg:width="2.198cm" svg:height="1.101cm" svg:x="6.608cm" svg:y="7.985cm">
          <text:p text:style-name="P10"><text:span text:style-name="T7">Rótu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g24e6d6317cb_0_35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91;g24e6d6317cb_0_35:notes" draw:style-name="gr1" draw:layer="layout" svg:width="13.147cm" svg:height="10.66cm" svg:x="3.287cm" svg:y="2.132cm" draw:page-number="23" presentation:class="page"/>
          <draw:frame draw:name="Google Shape;292;g24e6d6317cb_0_35:notes" presentation:style-name="pr2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ndizado de máquina" draw:style-name="dp1" draw:master-page-name="OBJECT" presentation:presentation-page-layout-name="AL1T11">
        <draw:frame draw:name="Google Shape;305;g24e6d6317cb_0_5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ndizado de máquina</text:span></text:p>
          </draw:text-box>
        </draw:frame>
        <draw:frame draw:name="Google Shape;306;g24e6d6317cb_0_51" draw:style-name="gr7" draw:text-style-name="P9" draw:layer="layout" svg:width="19.27cm" svg:height="14.264cm" svg:x="3.844cm" svg:y="4.612cm">
          <draw:image xlink:href="Pictures/10000000000003340000025FDED515C74095C4DF.png" xlink:type="simple" xlink:show="embed" xlink:actuate="onLoad">
            <text:p/>
          </draw:image>
        </draw:frame>
        <draw:custom-shape draw:name="Google Shape;307;g24e6d6317cb_0_51" draw:style-name="gr8" draw:text-style-name="P11" draw:layer="layout" svg:width="2.097cm" svg:height="1.964cm" svg:x="5.64cm" svg:y="5.649cm">
          <text:p text:style-name="P10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08;g24e6d6317cb_0_51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302;g24e6d6317cb_0_51:notes" draw:style-name="gr1" draw:layer="layout" svg:width="13.147cm" svg:height="10.66cm" svg:x="3.287cm" svg:y="2.132cm" draw:page-number="24" presentation:class="page"/>
          <draw:frame draw:name="Google Shape;303;g24e6d6317cb_0_51:notes" presentation:style-name="pr28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lusterização" draw:style-name="dp1" draw:master-page-name="OBJECT" presentation:presentation-page-layout-name="AL1T11">
        <draw:frame draw:name="Google Shape;313;g24e6d6317cb_0_5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usterização</text:span></text:p>
          </draw:text-box>
        </draw:frame>
        <draw:frame draw:name="Google Shape;314;g24e6d6317cb_0_57" presentation:style-name="pr2" draw:text-style-name="P5" draw:layer="layout" svg:width="23.657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0">Processo de agrupar indivíduos de acordo com suas similaridades;</text:span></text:p>
              </text:list-item>
              <text:list-item>
                <text:p text:style-name="P18"><text:span text:style-name="T10">A definição sobre em qual cluster adicionar um indivíduo pode ser feita a partir da análise de suas diferenças com as características dos demais;</text:span></text:p>
              </text:list-item>
              <text:list-item>
                <text:p text:style-name="P18"><text:span text:style-name="T10">A criação dos clusters é feita a partir da busca por padrões em dados não rotulados (forma, tamanho, comportamento, etc.);</text:span></text:p>
              </text:list-item>
              <text:list-item>
                <text:p text:style-name="P18"><text:span text:style-name="T10">Exempl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Seções de produtos em supermercados ou lojas;</text:span></text:p>
                  </text:list-item>
                  <text:list-item>
                    <text:p text:style-name="P18"><text:span text:style-name="T6">Agrupamento de documentos de acordo com tópicos;</text:span></text:p>
                  </text:list-item>
                  <text:list-item>
                    <text:p text:style-name="P18"><text:span text:style-name="T6">Outros: análises estatísticas, segmentação de imagens, detecção de anomalias, sistemas de recomendação (e-commerce, streaming)...</text:span></text:p>
                  </text:list-item>
                </text:list>
              </text:list-item>
            </text:list>
          </draw:text-box>
        </draw:frame>
        <draw:frame draw:name="Google Shape;315;g24e6d6317cb_0_57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310;g24e6d6317cb_0_57:notes" draw:style-name="gr1" draw:layer="layout" svg:width="13.147cm" svg:height="10.66cm" svg:x="3.287cm" svg:y="2.132cm" draw:page-number="25" presentation:class="page"/>
          <draw:frame draw:name="Google Shape;311;g24e6d6317cb_0_57:notes" presentation:style-name="pr29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lusterização" draw:style-name="dp1" draw:master-page-name="OBJECT" presentation:presentation-page-layout-name="AL1T11">
        <draw:frame draw:name="Google Shape;320;g24e6d6317cb_0_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usterização</text:span></text:p>
          </draw:text-box>
        </draw:frame>
        <draw:frame draw:name="Google Shape;321;g24e6d6317cb_0_6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24">Hard clustering</text:span><text:span text:style-name="T10">: indivíduos podem pertencer a apenas um grupo;</text:span></text:p>
              </text:list-item>
              <text:list-item>
                <text:p text:style-name="P18"><text:span text:style-name="T24">Soft clustering:</text:span><text:span text:style-name="T10"> indivíduos podem pertencer a um ou mais grupos;</text:span></text:p>
              </text:list-item>
              <text:list-item>
                <text:p text:style-name="P18"><text:span text:style-name="T10">Algoritmo </text:span><text:span text:style-name="T24">K-means clustering:</text:span><text:span text:style-name="T10"> 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Dataset é dividido em k grupos, referentes ao total de clusters;</text:span></text:p>
                  </text:list-item>
                  <text:list-item>
                    <text:p text:style-name="P18"><text:span text:style-name="T6">Define-se o centro de cada cluster (centróide), onde sua distância para os indivíduos que o compõem deve ser mínima quando comparada a outro centróide.</text:span></text:p>
                  </text:list-item>
                </text:list>
              </text:list-item>
            </text:list>
          </draw:text-box>
        </draw:frame>
        <draw:frame draw:name="Google Shape;322;g24e6d6317cb_0_63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317;g24e6d6317cb_0_63:notes" draw:style-name="gr1" draw:layer="layout" svg:width="13.147cm" svg:height="10.66cm" svg:x="3.287cm" svg:y="2.132cm" draw:page-number="26" presentation:class="page"/>
          <draw:frame draw:name="Google Shape;318;g24e6d6317cb_0_63:notes" presentation:style-name="pr30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lusterização" draw:style-name="dp1" draw:master-page-name="OBJECT" presentation:presentation-page-layout-name="AL1T11">
        <draw:frame draw:name="Google Shape;327;g24e6d6317cb_0_7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usterização</text:span></text:p>
          </draw:text-box>
        </draw:frame>
        <draw:g draw:name="Google Shape;328;g24e6d6317cb_0_78">
          <draw:g draw:name="Google Shape;329;g24e6d6317cb_0_78">
            <draw:frame draw:name="Google Shape;330;g24e6d6317cb_0_78" draw:style-name="gr19" draw:text-style-name="P9" draw:layer="layout" svg:width="23.997cm" svg:height="8.818cm" svg:x="0.91cm" svg:y="6.075cm">
              <draw:image xlink:href="Pictures/100002010000034D00000163BEB318FD9F4148C6.png" xlink:type="simple" xlink:show="embed" xlink:actuate="onLoad">
                <text:p/>
              </draw:image>
            </draw:frame>
            <draw:frame draw:name="Google Shape;331;g24e6d6317cb_0_78" draw:style-name="gr7" draw:text-style-name="P9" draw:layer="layout" svg:width="6.645cm" svg:height="6.611cm" svg:x="9.643cm" svg:y="7.461cm">
              <draw:image xlink:href="Pictures/10000201000004DA0000046ADE4A01FB135C2E5C.png" xlink:type="simple" xlink:show="embed" xlink:actuate="onLoad">
                <text:p/>
              </draw:image>
            </draw:frame>
            <draw:g draw:name="Google Shape;332;g24e6d6317cb_0_78">
              <draw:frame draw:name="Google Shape;333;g24e6d6317cb_0_78" draw:style-name="gr7" draw:text-style-name="P9" draw:layer="layout" svg:width="1.76cm" svg:height="1.95cm" svg:x="18.51cm" svg:y="9.828cm">
                <draw:image xlink:href="Pictures/10000201000000BF000000C2A6AC07F27BF8270E.png" xlink:type="simple" xlink:show="embed" xlink:actuate="onLoad">
                  <text:p/>
                </draw:image>
              </draw:frame>
              <draw:custom-shape draw:name="Google Shape;334;g24e6d6317cb_0_78" draw:style-name="gr20" draw:text-style-name="P11" draw:layer="layout" svg:width="1.76cm" svg:height="1.95cm" svg:x="18.51cm" svg:y="9.828cm">
                <text:p text:style-name="P10"><text:span text:style-name="T19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335;g24e6d6317cb_0_78">
            <draw:custom-shape draw:name="Google Shape;336;g24e6d6317cb_0_78" draw:style-name="gr3" draw:text-style-name="P11" draw:layer="layout" svg:width="4.112cm" svg:height="1.271cm" svg:x="15.514cm" svg:y="5.239cm">
              <text:p text:style-name="P10"><text:span text:style-name="T3">Centróid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7;g24e6d6317cb_0_78" draw:style-name="gr15" draw:text-style-name="P9" draw:layer="layout" svg:width="3.948cm" svg:height="3.29cm" draw:transform="rotate (-3.14159265358979) translate (15.514cm 9.171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38;g24e6d6317cb_0_78" draw:style-name="gr15" draw:text-style-name="P9" draw:layer="layout" svg:width="3.678cm" svg:height="6.021cm" draw:transform="rotate (-3.14159265358979) translate (15.514cm 11.902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39;g24e6d6317cb_0_78" draw:style-name="gr15" draw:text-style-name="P9" draw:layer="layout" svg:width="1.251cm" svg:height="3.526cm" draw:transform="rotate (-3.14159265358979) translate (15.512cm 9.407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40;g24e6d6317cb_0_78" draw:style-name="gr15" draw:text-style-name="P9" draw:layer="layout" svg:width="1.15cm" svg:height="6.492cm" draw:transform="rotate (-3.14159265358979) translate (15.514cm 12.374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draw:custom-shape draw:name="Google Shape;341;g24e6d6317cb_0_78" draw:style-name="gr3" draw:text-style-name="P11" draw:layer="layout" svg:width="6.877cm" svg:height="1.693cm" svg:x="1.27cm" svg:y="14.682cm">
          <text:p text:style-name="P1"><text:span text:style-name="T7">Tentando definir público apropriado para o produ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g24e6d6317cb_0_78" draw:style-name="gr3" draw:text-style-name="P11" draw:layer="layout" svg:width="6.877cm" svg:height="1.693cm" svg:x="9.47cm" svg:y="14.411cm">
          <text:p text:style-name="P1"><text:span text:style-name="T7">Usando clusterização na base de cli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g24e6d6317cb_0_78" draw:style-name="gr3" draw:text-style-name="P11" draw:layer="layout" svg:width="6.877cm" svg:height="1.693cm" svg:x="17.84cm" svg:y="14.84cm">
          <text:p text:style-name="P1"><text:span text:style-name="T7">Vendendo o produto para o público al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g24e6d6317cb_0_78" draw:style-name="gr3" draw:text-style-name="P11" draw:layer="layout" svg:width="23.096cm" svg:height="1.523cm" svg:x="1.281cm" svg:y="17.465cm">
          <text:p text:style-name="P10"><text:span text:style-name="T25">Adaptado de https://developers.google.com/machine-learning/clustering/clustering-algorithms?hl=pt-br e https://www.datacamp.com/blog/clustering-in-machine-learning-5-essential-clustering-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g24e6d6317cb_0_78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324;g24e6d6317cb_0_78:notes" draw:style-name="gr1" draw:layer="layout" svg:width="13.147cm" svg:height="10.66cm" svg:x="3.287cm" svg:y="2.132cm" draw:page-number="27" presentation:class="page"/>
          <draw:frame draw:name="Google Shape;325;g24e6d6317cb_0_78:notes" presentation:style-name="pr31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mo escolher o modelo adequado?" draw:style-name="dp1" draw:master-page-name="OBJECT" presentation:presentation-page-layout-name="AL1T11">
        <draw:frame draw:name="Google Shape;350;g3e5e236e45b_0_8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1">Como escolher o modelo adequado?</text:span></text:p>
          </draw:text-box>
        </draw:frame>
        <draw:frame draw:name="Google Shape;351;g3e5e236e45b_0_80" presentation:style-name="pr2" draw:text-style-name="P5" draw:layer="layout" svg:width="22.859cm" svg:height="4.5cm" svg:x="1.27cm" svg:y="12.517cm" presentation:class="outline" presentation:user-transformed="true">
          <draw:text-box>
            <text:list text:style-name="L20">
              <text:list-item>
                <text:p text:style-name="P25"><text:span text:style-name="T10">Tenho uma loja virtual e quero descobrir grupos de clientes semelhantes. Qual técnica uso?</text:span></text:p>
              </text:list-item>
              <text:list-item>
                <text:p text:style-name="P26"><text:span text:style-name="T10">Quero prever o faturamento do próximo mês. Qual técnica uso?</text:span></text:p>
              </text:list-item>
            </text:list>
          </draw:text-box>
        </draw:frame>
        <draw:frame draw:name="Google Shape;352;g3e5e236e45b_0_80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353;g3e5e236e45b_0_80" draw:style-name="standard" draw:layer="layout" svg:width="16.566cm" svg:height="5.824cm" svg:x="3.785cm" svg:y="4.808cm">
          <table:table>
            <table:table-column table:style-name="co9"/>
            <table:table-column table:style-name="co10"/>
            <table:table-row table:style-name="ro1" table:default-cell-style-name="ce5">
              <table:table-cell>
                <text:p text:style-name="P24"><text:span text:style-name="T13">Problema</text:span></text:p>
              </table:table-cell>
              <table:table-cell>
                <text:p text:style-name="P24"><text:span text:style-name="T13">Técnica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3">Prever preço de imóvel</text:span></text:p>
              </table:table-cell>
              <table:table-cell>
                <text:p text:style-name="P10"><text:span text:style-name="T3">Regressão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3">Aprovar crédito</text:span></text:p>
              </table:table-cell>
              <table:table-cell>
                <text:p text:style-name="P10"><text:span text:style-name="T3">Classificação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3">Agrupar clientes</text:span></text:p>
              </table:table-cell>
              <table:table-cell>
                <text:p text:style-name="P10"><text:span text:style-name="T3">Clusterização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3">Treinar robô para jogar</text:span></text:p>
              </table:table-cell>
              <table:table-cell>
                <text:p text:style-name="P10"><text:span text:style-name="T3">Reforç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47;g3e5e236e45b_0_80:notes" draw:style-name="gr1" draw:layer="layout" svg:width="13.147cm" svg:height="10.66cm" svg:x="3.287cm" svg:y="2.132cm" draw:page-number="28" presentation:class="page"/>
          <draw:frame draw:name="Google Shape;348;g3e5e236e45b_0_80:notes" presentation:style-name="pr32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14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3;p14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14;p14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14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14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14" draw:style-name="Mgr3" draw:text-style-name="MP7" draw:layer="backgroundobjects" svg:width="22.1cm" svg:height="0.001cm" svg:x="0cm" svg:y="4.3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14" draw:style-name="Mgr4" draw:text-style-name="MP7" draw:layer="backgroundobjects" svg:width="5.469cm" svg:height="4.005cm" svg:x="19.93cm" svg:y="0.521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18T12:44:31</meta:creation-date>
    <meta:initial-creator>Leandro</meta:initial-creator>
    <meta:document-statistic meta:object-count="239"/>
    <meta:generator>LibreOfficeDev/6.0.5.2$Linux_X86_64 LibreOffice_project/</meta:generator>
  </office:meta>
</office:document-meta>
</file>