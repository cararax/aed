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E6CCAF417DBDE503B6.png" manifest:media-type="image/png"/>
  <manifest:file-entry manifest:full-path="Pictures/10000201000004B0000002E6A8B8E3B1892525F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6D9000001B6E5AD318FFD3C1298.png" manifest:media-type="image/png"/>
  <manifest:file-entry manifest:full-path="Pictures/10000201000001DA0000015B5D9DBE45C88A5E6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5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7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8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24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25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pr26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7cm" fo:padding-bottom="0.27cm" fo:padding-left="0.27cm" fo:padding-right="0.27cm" fo:wrap-option="wrap"/>
    </style:style>
    <style:style style:name="co1" style:family="table-column">
      <style:table-column-properties style:column-width="3.134cm" style:use-optimal-column-width="false"/>
    </style:style>
    <style:style style:name="co2" style:family="table-column">
      <style:table-column-properties style:column-width="3.357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5.145cm" style:use-optimal-column-width="false"/>
    </style:style>
    <style:style style:name="co5" style:family="table-column">
      <style:table-column-properties style:column-width="5.512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21" style:family="paragraph">
      <style:paragraph-properties fo:margin-left="0.953cm" fo:margin-right="0cm" fo:margin-top="0.226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9pt" fo:letter-spacing="normal" fo:font-style="normal" style:text-underline-style="none" fo:font-weight="normal" style:font-name-asian="Calibri" style:font-size-asian="29pt" style:font-style-asian="normal" style:font-weight-asian="normal" style:font-name-complex="Calibri" style:font-size-complex="29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43cm" text:min-label-width="0.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43cm" text:min-label-width="0.81cm"/>
        <style:text-properties style:font-name="Arial" fo:color="#000000" fo:font-size="100%"/>
      </text:list-level-style-bullet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43cm" text:min-label-width="0.81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•">
        <style:list-level-properties text:space-before="2.753cm" text:min-label-width="1.05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•">
        <style:list-level-properties text:space-before="2.753cm" text:min-label-width="1.05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276cm" text:min-label-width="0.99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308cm" text:min-label-width="0.96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suffix="." style:num-format="1">
        <style:list-level-properties text:space-before="0.143cm" text:min-label-width="0.81cm"/>
        <style:text-properties fo:color="#000000" fo:font-size="100%"/>
      </text:list-level-style-number>
      <text:list-level-style-number text:level="2" style:num-suffix="." style:num-format="a">
        <style:list-level-properties text:space-before="1.483cm" text:min-label-width="1.05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suffix="." style:num-format="1">
        <style:list-level-properties text:space-before="0.143cm" text:min-label-width="0.81cm"/>
        <style:text-properties fo:color="#000000" fo:font-size="100%"/>
      </text:list-level-style-number>
      <text:list-level-style-number text:level="2" style:num-suffix="." style:num-format="a">
        <style:list-level-properties text:space-before="1.553cm" text:min-label-width="0.98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Exploratória de Dados (AED)" draw:style-name="dp1" draw:master-page-name="OBJECT" presentation:presentation-page-layout-name="AL1T11">
        <draw:frame draw:name="Google Shape;86;p1" presentation:style-name="pr1" draw:text-style-name="P2" draw:layer="layout" svg:width="22.859cm" svg:height="3.174cm" svg:x="1.27cm" svg:y="7.536cm" presentation:class="title" presentation:user-transformed="true">
          <draw:text-box>
            <text:p text:style-name="P1"><text:span text:style-name="T1">Análise Exploratória de Dados (AED)</text:span></text:p>
          </draw:text-box>
        </draw:frame>
        <draw:frame draw:name="Google Shape;87;p1" presentation:style-name="pr2" draw:text-style-name="P5" draw:layer="layout" svg:width="22.859cm" svg:height="2.521cm" svg:x="1.472cm" svg:y="15.148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draw:custom-shape draw:name="Google Shape;88;p1" draw:style-name="gr1" draw:text-style-name="P6" draw:layer="layout" svg:width="19.973cm" svg:height="3.175cm" svg:x="1.27cm" svg:y="0.763cm">
          <text:p text:style-name="P1"><text:span text:style-name="T1">Análise de dados e extração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3;p1:notes" presentation:style-name="pr3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84;p1:notes" draw:style-name="gr2" draw:layer="layout" svg:width="13.147cm" svg:height="10.66cm" svg:x="3.287cm" svg:y="2.132cm" draw:page-number="1" presentation:class="page"/>
        </presentation:notes>
      </draw:page>
      <draw:page draw:name="O que é Análise de Dados?" draw:style-name="dp1" draw:master-page-name="OBJECT" presentation:presentation-page-layout-name="AL1T11">
        <draw:frame draw:name="Google Shape;93;g35782da8aef_2_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 que é Análise de Dados?</text:span></text:p>
          </draw:text-box>
        </draw:frame>
        <draw:frame draw:name="Google Shape;94;g35782da8aef_2_7" presentation:style-name="pr2" draw:text-style-name="P5" draw:layer="layout" svg:width="22.859cm" svg:height="14.604cm" svg:x="1.27cm" svg:y="4.445cm" presentation:class="outline" presentation:user-transformed="true">
          <draw:text-box>
            <text:list text:style-name="L5">
              <text:list-item>
                <text:p text:style-name="P8"><text:span text:style-name="T3">Processo de explorar e interpretar dados para extrair informações úteis;</text:span></text:p>
              </text:list-item>
              <text:list-item>
                <text:p text:style-name="P9"><text:span text:style-name="T3">Ajuda na tomada de decisão baseada em evidências;</text:span></text:p>
              </text:list-item>
              <text:list-item>
                <text:p text:style-name="P9"><text:span text:style-name="T3">Na web, é usada para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Entender comportamentos de usuários, tendências de mercado e padrões de consumo;</text:span></text:p>
                  </text:list-item>
                  <text:list-item>
                    <text:p text:style-name="P9"><text:span text:style-name="T4">Criação de sistemas inteligentes de recomendação, publicidade, entre outros.</text:span></text:p>
                  </text:list-item>
                </text:list>
              </text:list-item>
            </text:list>
            <text:p text:style-name="P10"><text:span text:style-name="T3"/></text:p>
            <text:list text:continue-numbering="true" text:style-name="L6">
              <text:list-item>
                <text:p text:style-name="P11"><text:span text:style-name="T3">Ciclo de vida: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4">Coleta de dados (scraping, APIs);</text:span></text:p>
                  </text:list-item>
                  <text:list-item>
                    <text:p text:style-name="P11"><text:span text:style-name="T4">Limpeza e preparação;</text:span></text:p>
                  </text:list-item>
                  <text:list-item>
                    <text:p text:style-name="P11"><text:span text:style-name="T4">Exploração e visualização;</text:span></text:p>
                  </text:list-item>
                  <text:list-item>
                    <text:p text:style-name="P11"><text:span text:style-name="T4">Comunicação de resultados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90;g35782da8aef_2_7:notes" presentation:style-name="pr4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91;g35782da8aef_2_7:notes" draw:style-name="gr2" draw:layer="layout" svg:width="13.147cm" svg:height="10.66cm" svg:x="3.287cm" svg:y="2.132cm" draw:page-number="2" presentation:class="page"/>
        </presentation:notes>
      </draw:page>
      <draw:page draw:name="O que é Análise Exploratória de Dados (AED)?" draw:style-name="dp1" draw:master-page-name="OBJECT" presentation:presentation-page-layout-name="AL1T11">
        <draw:frame draw:name="Google Shape;99;g38607d45ca2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5">O que é Análise Exploratória de Dados (AED)?</text:span></text:p>
          </draw:text-box>
        </draw:frame>
        <draw:frame draw:name="Google Shape;100;g38607d45ca2_0_0" presentation:style-name="pr2" draw:text-style-name="P5" draw:layer="layout" svg:width="22.859cm" svg:height="14.05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Abordagem para </text:span><text:span text:style-name="T6">analisar</text:span><text:span text:style-name="T3"> conjuntos de dados, </text:span><text:span text:style-name="T6">resumir suas principais características</text:span><text:span text:style-name="T3">, </text:span><text:span text:style-name="T6">encontrar tendências</text:span><text:span text:style-name="T3"> e </text:span><text:span text:style-name="T6">extrair </text:span><text:span text:style-name="T7">insights</text:span><text:span text:style-name="T3">, muitas vezes utilizando métodos visuais;</text:span></text:p>
              </text:list-item>
              <text:list-item>
                <text:p text:style-name="P13"><text:span text:style-name="T3">AED busca: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4">Descobrir padrões e anomalias (outliers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Testar hipóteses e suposições iniciais;</text:span></text:p>
                  </text:list-item>
                  <text:list-item>
                    <text:p text:style-name="P8"><text:span text:style-name="T4">Resumir as principais características estatísticas;</text:span></text:p>
                  </text:list-item>
                  <text:list-item>
                    <text:p text:style-name="P8"><text:span text:style-name="T4">Determinar as próximas etapas de análise e a adequação de modelos estatísticos.</text:span></text:p>
                  </text:list-item>
                </text:list>
              </text:list-item>
              <text:list-item>
                <text:p text:style-name="P13"><text:span text:style-name="T3">AED permite entender o significado dos dados, encontrar tendências e extrair informações;</text:span></text:p>
              </text:list-item>
            </text:list>
            <text:p text:style-name="P14"><text:span text:style-name="T3"/></text:p>
            <text:list text:continue-numbering="true" text:style-name="L11">
              <text:list-item>
                <text:p text:style-name="P14"><text:span text:style-name="T3">Em resumo, a AED responde à pergunta: </text:span></text:p>
                <text:list>
                  <text:list-item>
                    <text:p text:style-name="P12"><text:span text:style-name="T4">“</text:span><text:span text:style-name="T4">O que meus dados têm a dizer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6;g38607d45ca2_0_0:notes" draw:style-name="gr2" draw:layer="layout" svg:width="13.147cm" svg:height="10.66cm" svg:x="3.287cm" svg:y="2.132cm" draw:page-number="3" presentation:class="page"/>
          <draw:frame draw:name="Google Shape;97;g38607d45ca2_0_0:notes" presentation:style-name="pr5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Exemplos de Aplicação" draw:style-name="dp1" draw:master-page-name="OBJECT" presentation:presentation-page-layout-name="AL1T11">
        <draw:frame draw:name="Google Shape;105;g35782da8aef_2_1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s de Aplicação</text:span></text:p>
          </draw:text-box>
        </draw:frame>
        <draw:frame draw:name="Google Shape;106;g35782da8aef_2_12" presentation:style-name="pr2" draw:text-style-name="P5" draw:layer="layout" svg:width="24.328cm" svg:height="13.977cm" svg:x="0.612cm" svg:y="4.445cm" presentation:class="outline" presentation:user-transformed="true">
          <draw:text-box>
            <text:list text:style-name="L5">
              <text:list-item>
                <text:p text:style-name="P9"><text:span text:style-name="T3">Web analytics e otimização de sit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4">comportamento de users, performance de páginas;</text:span></text:p>
                  </text:list-item>
                </text:list>
              </text:list-item>
              <text:list-item>
                <text:p text:style-name="P9"><text:span text:style-name="T3">Marketing digital:</text:span></text:p>
                <text:list>
                  <text:list-item>
                    <text:p text:style-name="P9"><text:span text:style-name="T4">recomendação de produtos e campanhas, segmentação de público alvo;</text:span></text:p>
                  </text:list-item>
                </text:list>
              </text:list-item>
              <text:list-item>
                <text:p text:style-name="P9"><text:span text:style-name="T3">Redes sociais:</text:span></text:p>
                <text:list>
                  <text:list-item>
                    <text:p text:style-name="P9"><text:span text:style-name="T4">análise de engajamento e sentimento, identificação de influenciadores;</text:span></text:p>
                  </text:list-item>
                </text:list>
              </text:list-item>
              <text:list-item>
                <text:p text:style-name="P9"><text:span text:style-name="T3">Segurança: </text:span></text:p>
                <text:list>
                  <text:list-item>
                    <text:p text:style-name="P9"><text:span text:style-name="T4">análise de logs, detecção de fraudes;</text:span></text:p>
                  </text:list-item>
                </text:list>
              </text:list-item>
              <text:list-item>
                <text:p text:style-name="P9"><text:span text:style-name="T3">Criação e atualização de produtos: </text:span></text:p>
                <text:list>
                  <text:list-item>
                    <text:p text:style-name="P9"><text:span text:style-name="T4">análise de uso de recursos, testes A/B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02;g35782da8aef_2_12:notes" presentation:style-name="pr6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103;g35782da8aef_2_12:notes" draw:style-name="gr2" draw:layer="layout" svg:width="13.147cm" svg:height="10.66cm" svg:x="3.287cm" svg:y="2.132cm" draw:page-number="4" presentation:class="page"/>
        </presentation:notes>
      </draw:page>
      <draw:page draw:name="Dados da web" draw:style-name="dp1" draw:master-page-name="OBJECT" presentation:presentation-page-layout-name="AL1T11">
        <draw:frame draw:name="Google Shape;111;g35782da8aef_2_2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dos da web</text:span></text:p>
          </draw:text-box>
        </draw:frame>
        <draw:frame draw:name="Google Shape;112;g35782da8aef_2_2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3">Tipos de estrutura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4">Estruturados: tabelas HTML, APIs JSON;</text:span></text:p>
                  </text:list-item>
                  <text:list-item>
                    <text:p text:style-name="P9"><text:span text:style-name="T4">Semi-estruturados: atributos HTML;</text:span></text:p>
                  </text:list-item>
                  <text:list-item>
                    <text:p text:style-name="P9"><text:span text:style-name="T4">Não estruturados: textos, comentários, artigos.</text:span></text:p>
                  </text:list-item>
                </text:list>
              </text:list-item>
            </text:list>
            <text:p text:style-name="P10"><text:span text:style-name="T3"/></text:p>
            <text:list text:style-name="L11">
              <text:list-item>
                <text:p text:style-name="P11"><text:span text:style-name="T3">Desafios:</text:span></text:p>
                <text:list>
                  <text:list-item>
                    <text:p text:style-name="P12"><text:span text:style-name="T4">Formatação inconsistente;</text:span></text:p>
                  </text:list-item>
                  <text:list-item>
                    <text:p text:style-name="P11"><text:span text:style-name="T4">Dados ausentes ou duplicados;</text:span></text:p>
                  </text:list-item>
                  <text:list-item>
                    <text:p text:style-name="P11"><text:span text:style-name="T4">Ruído e falta de padronização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08;g35782da8aef_2_22:notes" presentation:style-name="pr7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109;g35782da8aef_2_22:notes" draw:style-name="gr2" draw:layer="layout" svg:width="13.147cm" svg:height="10.66cm" svg:x="3.287cm" svg:y="2.132cm" draw:page-number="5" presentation:class="page"/>
        </presentation:notes>
      </draw:page>
      <draw:page draw:name="Análise Exploratória de Dados (AED)" draw:style-name="dp1" draw:master-page-name="OBJECT" presentation:presentation-page-layout-name="AL1T11">
        <draw:frame draw:name="Google Shape;117;g3e33959c9cb_0_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álise Exploratória de Dados (AED)</text:span></text:p>
          </draw:text-box>
        </draw:frame>
        <draw:frame draw:name="Google Shape;118;g3e33959c9cb_0_5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Análises estatísticas começam pelo estudo do conjunto de dados (como estão dispostos, o que cada campo representa, quantidade de amostra, nível de completude, etc.).</text:span></text:p>
              </text:list-item>
            </text:list>
          </draw:text-box>
        </draw:frame>
        <draw:custom-shape draw:name="Google Shape;119;g3e33959c9cb_0_5" draw:style-name="gr3" draw:text-style-name="P6" draw:layer="layout" svg:width="3.567cm" svg:height="1.525cm" svg:x="3.55cm" svg:y="8.616cm">
          <text:p text:style-name="P1"><text:span text:style-name="T3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g3e33959c9cb_0_5" draw:style-name="gr3" draw:text-style-name="P6" draw:layer="layout" svg:width="4.752cm" svg:height="1.525cm" svg:x="7.117cm" svg:y="11.073cm">
          <text:p text:style-name="P1"><text:span text:style-name="T3">Infor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g3e33959c9cb_0_5" draw:style-name="gr3" draw:text-style-name="P6" xml:id="id1" draw:id="id1" draw:layer="layout" svg:width="5.929cm" svg:height="1.525cm" svg:x="11.87cm" svg:y="13.521cm">
          <text:p text:style-name="P1"><text:span text:style-name="T3">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g3e33959c9cb_0_5" draw:style-name="gr3" draw:text-style-name="P6" xml:id="id4" draw:id="id4" draw:layer="layout" svg:width="5.929cm" svg:height="1.525cm" svg:x="17.8cm" svg:y="16.088cm">
          <text:p text:style-name="P1"><text:span text:style-name="T3">Sabedo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3e33959c9cb_0_5" draw:style-name="gr4" draw:text-style-name="P15" draw:layer="layout" svg:width="1.687cm" svg:height="1.783cm" draw:transform="rotate (-1.5707963267949) translate (7.116cm 10.15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24;g3e33959c9cb_0_5" draw:style-name="gr4" draw:text-style-name="P15" xml:id="id2" draw:id="id2" draw:layer="layout" svg:width="1.677cm" svg:height="2.376cm" draw:transform="rotate (-1.5707963267949) translate (11.87cm 12.61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25;g3e33959c9cb_0_5" draw:style-name="gr4" draw:text-style-name="P15" xml:id="id3" draw:id="id3" draw:layer="layout" svg:width="1.797cm" svg:height="2.964cm" draw:transform="rotate (-1.5707963267949) translate (17.8cm 15.0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4;g3e33959c9cb_0_5:notes" draw:style-name="gr2" draw:layer="layout" svg:width="13.147cm" svg:height="10.66cm" svg:x="3.287cm" svg:y="2.132cm" draw:page-number="6" presentation:class="page"/>
          <draw:frame draw:name="Google Shape;115;g3e33959c9cb_0_5:notes" presentation:style-name="pr8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ED: Desafio inicial" draw:style-name="dp1" draw:master-page-name="OBJECT" presentation:presentation-page-layout-name="AL1T11">
        <draw:frame draw:name="Google Shape;130;g35da96bb78a_0_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ED: Desafio inicial</text:span></text:p>
          </draw:text-box>
        </draw:frame>
        <draw:frame draw:name="Google Shape;131;g35da96bb78a_0_8" presentation:style-name="pr2" draw:text-style-name="P5" draw:layer="layout" svg:width="22.859cm" svg:height="12.65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Padronizar dados após coleta.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Corrigir, alterar unidades ou tipos, complementar, eliminar ou adicionar valores.</text:span></text:p>
                  </text:list-item>
                </text:list>
              </text:list-item>
            </text:list>
            <text:p text:style-name="P16"><text:span text:style-name="T3"/></text:p>
            <text:list text:continue-numbering="true" text:style-name="L11">
              <text:list-item>
                <text:p text:style-name="P14"><text:span text:style-name="T3">AED:</text:span></text:p>
                <text:list>
                  <text:list-item>
                    <text:p text:style-name="P12"><text:span text:style-name="T4">Processo de organizar, sintetizar e aplicar técnicas para melhor visualização dos dados de um conjunto;</text:span></text:p>
                  </text:list-item>
                  <text:list-item>
                    <text:p text:style-name="P12"><text:span text:style-name="T4">Preparar os dados para análises estatísticas. Isso envolve: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4">Conhecer o significado dos dados e não apenas seus valores sem interpretação;</text:span></text:p>
                      </text:list-item>
                      <text:list-item>
                        <text:p text:style-name="P12"><text:span text:style-name="T4">Organizar de forma que façam sentido dentro de um contexto;</text:span></text:p>
                      </text:list-item>
                      <text:list-item>
                        <text:p text:style-name="P12"><text:span text:style-name="T4">Entender o que significam individualmente e suas relaçõ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132;g35da96bb78a_0_8" draw:style-name="gr5" draw:text-style-name="P6" draw:layer="layout" svg:width="16.909cm" svg:height="1.525cm" svg:x="3.63cm" svg:y="16.194cm">
          <text:p text:style-name="P1"><text:span text:style-name="T3">Problema → Dados → Análise →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35da96bb78a_0_8:notes" draw:style-name="gr2" draw:layer="layout" svg:width="13.147cm" svg:height="10.66cm" svg:x="3.287cm" svg:y="2.132cm" draw:page-number="7" presentation:class="page"/>
          <draw:frame draw:name="Google Shape;128;g35da96bb78a_0_8:notes" presentation:style-name="pr9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nálise Exploratória de Dados (AED)" draw:style-name="dp1" draw:master-page-name="OBJECT" presentation:presentation-page-layout-name="AL1T11">
        <draw:frame draw:name="Google Shape;137;g35da96bb78a_0_3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álise Exploratória de Dados (AED)</text:span></text:p>
          </draw:text-box>
        </draw:frame>
        <draw:frame draw:name="Google Shape;138;g35da96bb78a_0_3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Tipos de dados: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Quantitativos: valores numéricos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"><text:span text:style-name="T4">Discretos: inteiros (número de filhos, idade, etc);</text:span></text:p>
                      </text:list-item>
                      <text:list-item>
                        <text:p text:style-name="P8"><text:span text:style-name="T4">Contínuos: reais (altura, temperatura, tempo resposta de servidor).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3"/></text:p>
            <text:list text:style-name="L16">
              <text:list-item>
                <text:list>
                  <text:list-item>
                    <text:p text:style-name="P17"><text:span text:style-name="T4">Qualitativos: valores não numéricos.</text:span></text:p>
                    <text:list>
                      <text:list-item>
                        <text:p text:style-name="P12"><text:span text:style-name="T4">Nominais: não seguem uma ordem natural (gênero, país, etc);</text:span></text:p>
                      </text:list-item>
                      <text:list-item>
                        <text:p text:style-name="P12"><text:span text:style-name="T4">Ordinais: valores categorizados (nível de escolaridade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4;g35da96bb78a_0_33:notes" draw:style-name="gr2" draw:layer="layout" svg:width="13.147cm" svg:height="10.66cm" svg:x="3.287cm" svg:y="2.132cm" draw:page-number="8" presentation:class="page"/>
          <draw:frame draw:name="Google Shape;135;g35da96bb78a_0_33:notes" presentation:style-name="pr10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Etapas da AED" draw:style-name="dp1" draw:master-page-name="OBJECT" presentation:presentation-page-layout-name="AL1T11">
        <draw:frame draw:name="Google Shape;143;g35b73413691_0_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tapas da AED</text:span></text:p>
          </draw:text-box>
        </draw:frame>
        <draw:frame draw:name="Google Shape;144;g35b73413691_0_5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Amostra: lista de valores que faz parte de um conjunto maior de dados;</text:span></text:p>
              </text:list-item>
              <text:list-item>
                <text:p text:style-name="P8"><text:span text:style-name="T3">Medidas estatísticas permitem destacar características da amostra: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Média amostral: onde os dados estão centralizados;</text:span></text:p>
                  </text:list-item>
                  <text:list-item>
                    <text:p text:style-name="P8"><text:span text:style-name="T4">Desvio padrão: indicam o quão dispersos estão os dados.</text:span></text:p>
                  </text:list-item>
                </text:list>
              </text:list-item>
              <text:list-item>
                <text:p text:style-name="P8"><text:span text:style-name="T3">Estatística descritiva: está diretamente ligada a AED.</text:span></text:p>
                <text:list>
                  <text:list-item>
                    <text:p text:style-name="P8"><text:span text:style-name="T4">Interpretação dos dados → visualização → relacionar variáveis</text:span></text:p>
                  </text:list-item>
                </text:list>
              </text:list-item>
            </text:list>
            <text:p text:style-name="P16"><text:span text:style-name="T3"/></text:p>
          </draw:text-box>
        </draw:frame>
        <draw:frame draw:name="Google Shape;145;g35b73413691_0_5" draw:style-name="gr6" draw:text-style-name="P15" draw:layer="layout" svg:width="19.783cm" svg:height="4.942cm" svg:x="2.808cm" svg:y="12.442cm">
          <draw:image xlink:href="Pictures/10000000000006D9000001B6E5AD318FFD3C1298.png" xlink:type="simple" xlink:show="embed" xlink:actuate="onLoad">
            <text:p/>
          </draw:image>
        </draw:frame>
        <draw:custom-shape draw:name="Google Shape;146;g35b73413691_0_5" draw:style-name="gr5" draw:text-style-name="P6" draw:layer="layout" svg:width="19.783cm" svg:height="1.523cm" svg:x="2.808cm" svg:y="17.658cm">
          <text:p text:style-name="P12"><text:span text:style-name="T8">Adaptado de: Ferreira, Rafael G., C. et al. </text:span><text:span text:style-name="T9">Preparação e Análise Exploratória de Dados</text:span><text:span text:style-name="T8">. Disponível em: Minha Biblioteca, Grupo A, 202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35b73413691_0_5:notes" draw:style-name="gr2" draw:layer="layout" svg:width="13.147cm" svg:height="10.66cm" svg:x="3.287cm" svg:y="2.132cm" draw:page-number="9" presentation:class="page"/>
          <draw:frame draw:name="Google Shape;141;g35b73413691_0_5:notes" presentation:style-name="pr11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leta e organização" draw:style-name="dp1" draw:master-page-name="OBJECT" presentation:presentation-page-layout-name="AL1T11">
        <draw:frame draw:name="Google Shape;151;g35b73413691_0_1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leta e organização</text:span></text:p>
          </draw:text-box>
        </draw:frame>
        <draw:frame draw:name="Google Shape;152;g35b73413691_0_1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Coleta: ter acesso ao conjunto de dados (</text:span><text:span text:style-name="T10">dataset</text:span><text:span text:style-name="T3">) que será usado como base da análise.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Deve-se traçar os objetivos de pesquisa e a partir disso definir os métodos de coleta (scraping, API, etc);</text:span></text:p>
                  </text:list-item>
                </text:list>
              </text:list-item>
            </text:list>
            <text:p text:style-name="P16"><text:span text:style-name="T3"/></text:p>
            <text:list text:continue-numbering="true" text:style-name="L11">
              <text:list-item>
                <text:p text:style-name="P14"><text:span text:style-name="T3">Organização: dispor os dados de forma que seja possível extrair o máximo de informações ao realizar a análise.</text:span></text:p>
                <text:list>
                  <text:list-item>
                    <text:p text:style-name="P12"><text:span text:style-name="T4">Deve-se considerar a natureza dos dados e ajustá-los conforme necessidade.</text:span></text:p>
                  </text:list-item>
                  <text:list-item>
                    <text:p text:style-name="P12"><text:span text:style-name="T4">Exemplo: data de nascimento separada em colunas no BD (dia, mês, ano) deve ser unificad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8;g35b73413691_0_13:notes" draw:style-name="gr2" draw:layer="layout" svg:width="13.147cm" svg:height="10.66cm" svg:x="3.287cm" svg:y="2.132cm" draw:page-number="10" presentation:class="page"/>
          <draw:frame draw:name="Google Shape;149;g35b73413691_0_13:notes" presentation:style-name="pr12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Tratamento de dados" draw:style-name="dp1" draw:master-page-name="OBJECT" presentation:presentation-page-layout-name="AL1T11">
        <draw:frame draw:name="Google Shape;157;g35b73413691_0_1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tamento de dados</text:span></text:p>
          </draw:text-box>
        </draw:frame>
        <draw:frame draw:name="Google Shape;158;g35b73413691_0_18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Visa adequar ou melhorar o </text:span><text:span text:style-name="T10">dataset.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Exemplo: se o dados são resultantes de uma pesquisa, é bastante provável que algumas perguntas não sejam respondidas (orientação sexual, religião, renda familiar, etc.). Deve-se decidir como tratar dados faltantes.</text:span></text:p>
                  </text:list-item>
                </text:list>
              </text:list-item>
            </text:list>
            <text:p text:style-name="P18"><text:span text:style-name="T3"/></text:p>
            <text:list text:continue-numbering="true" text:style-name="L11">
              <text:list-item>
                <text:p text:style-name="P14"><text:span text:style-name="T3">Remoção do indivíduo (linha): </text:span></text:p>
                <text:list>
                  <text:list-item>
                    <text:p text:style-name="P12"><text:span text:style-name="T4">Nesse caso ignora-se a linha com dados faltantes, uma vez que podem comprometer o resultado.</text:span></text:p>
                  </text:list-item>
                </text:list>
              </text:list-item>
            </text:list>
            <text:p text:style-name="P18"><text:span text:style-name="T3"/></text:p>
            <text:list text:continue-numbering="true" text:style-name="L11">
              <text:list-item>
                <text:p text:style-name="P14"><text:span text:style-name="T3">Imputação de dados: </text:span></text:p>
                <text:list>
                  <text:list-item>
                    <text:p text:style-name="P12"><text:span text:style-name="T4">Preencher o campo em falta com outro valor (média das demais linhas ou repetir a linha anterio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g35b73413691_0_18:notes" draw:style-name="gr2" draw:layer="layout" svg:width="13.147cm" svg:height="10.66cm" svg:x="3.287cm" svg:y="2.132cm" draw:page-number="11" presentation:class="page"/>
          <draw:frame draw:name="Google Shape;155;g35b73413691_0_18:notes" presentation:style-name="pr13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Tratamento de dados" draw:style-name="dp1" draw:master-page-name="OBJECT" presentation:presentation-page-layout-name="AL1T11">
        <draw:frame draw:name="Google Shape;163;g38d36d0013c_0_3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tamento de dados</text:span></text:p>
          </draw:text-box>
        </draw:frame>
        <draw:frame draw:name="Google Shape;164;g38d36d0013c_0_30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Um projeto de ML usa um conjunto de dados que representam algum universo (valores).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A escala desses valores entre os indivíduos deve estar padronizada para evitar interpretações equivocadas e comprometer o processo de aprendizado.</text:span></text:p>
                  </text:list-item>
                </text:list>
              </text:list-item>
            </text:list>
            <text:p text:style-name="P18"><text:span text:style-name="T3"/></text:p>
            <text:list text:continue-numbering="true" text:style-name="L11">
              <text:list-item>
                <text:p text:style-name="P14"><text:span text:style-name="T3">Técnicas existentes:</text:span></text:p>
                <text:list>
                  <text:list-item>
                    <text:p text:style-name="P12"><text:span text:style-name="T11">Reescalonar</text:span><text:span text:style-name="T4">: alterar as unidades de medida. Exemplo: ml para L;</text:span></text:p>
                  </text:list-item>
                  <text:list-item>
                    <text:p text:style-name="P12"><text:span text:style-name="T11">Normalizar</text:span><text:span text:style-name="T4">: transformar os valores para deixá-los dentro da faixa entre 0 e 1;</text:span></text:p>
                  </text:list-item>
                  <text:list-item>
                    <text:p text:style-name="P12"><text:span text:style-name="T11">Padronização</text:span><text:span text:style-name="T4">: aproximá-los o máximo possível dos valores aceitáveis através de algum cálculo matemático. Pode-se usar como base valores de média e desvio padr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0;g38d36d0013c_0_30:notes" draw:style-name="gr2" draw:layer="layout" svg:width="13.147cm" svg:height="10.66cm" svg:x="3.287cm" svg:y="2.132cm" draw:page-number="12" presentation:class="page"/>
          <draw:frame draw:name="Google Shape;161;g38d36d0013c_0_30:notes" presentation:style-name="pr14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Tratamento de dados" draw:style-name="dp1" draw:master-page-name="OBJECT" presentation:presentation-page-layout-name="AL1T11">
        <draw:frame draw:name="Google Shape;169;g38d36d0013c_0_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tamento de dados</text:span></text:p>
          </draw:text-box>
        </draw:frame>
        <draw:frame draw:name="Google Shape;170;g38d36d0013c_0_25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Outliers: </text:span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4">Outlier é um valor que foge da normalidade e pode afetar diretamente os resultados de um processo de ML;</text:span></text:p>
                  </text:list-item>
                  <text:list-item>
                    <text:p text:style-name="P19"><text:span text:style-name="T4">Refere-se a dados muito dispersos dos demais indivíduos. Pode ser considerada uma entrada errada (nem sempre é o caso);</text:span></text:p>
                  </text:list-item>
                  <text:list-item>
                    <text:p text:style-name="P19"><text:span text:style-name="T4">Exemplos: idade com três dígitos ou valores creditados em conta corrente muito diferentes do habitual;</text:span></text:p>
                  </text:list-item>
                  <text:list-item>
                    <text:p text:style-name="P19"><text:span text:style-name="T4">Deve-se analisar caso a caso pois terão impacto na análise. </text:span></text:p>
                  </text:list-item>
                  <text:list-item>
                    <text:p text:style-name="P20"><text:span text:style-name="T4">Sugestão: remoção ou transforma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38d36d0013c_0_25:notes" draw:style-name="gr2" draw:layer="layout" svg:width="13.147cm" svg:height="10.66cm" svg:x="3.287cm" svg:y="2.132cm" draw:page-number="13" presentation:class="page"/>
          <draw:frame draw:name="Google Shape;167;g38d36d0013c_0_25:notes" presentation:style-name="pr15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nálise dos dados" draw:style-name="dp1" draw:master-page-name="OBJECT" presentation:presentation-page-layout-name="AL1T11">
        <draw:frame draw:name="Google Shape;175;g35b73413691_0_2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álise dos dados</text:span></text:p>
          </draw:text-box>
        </draw:frame>
        <draw:frame draw:name="Google Shape;176;g35b73413691_0_28" presentation:style-name="pr2" draw:text-style-name="P5" draw:layer="layout" svg:width="24.167cm" svg:height="14.13cm" svg:x="0.794cm" svg:y="4.445cm" presentation:class="outline" presentation:user-transformed="true">
          <draw:text-box>
            <text:list text:style-name="L9">
              <text:list-item>
                <text:p text:style-name="P13"><text:span text:style-name="T3">Univariada: análise de variáveis (colunas) isoladas. Usada para conhecer seu comportamento;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4">Exemplo: analisar a ocorrência de valores onde o resultado será a frequência dos mesmos: variável idade: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Dados de entrada: 18, 19, 19, 21, 21, 18, 45</text:span></text:p>
                          </text:list-item>
                          <text:list-item>
                            <text:p text:style-name="P8"><text:span text:style-name="T4">Após análise: 18 (2 ocorrências), 19 (2), 21 (2), 45 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span text:style-name="T3"/></text:p>
            <text:list text:continue-numbering="true" text:style-name="L18">
              <text:list-item>
                <text:p text:style-name="P14"><text:span text:style-name="T3">Multivariada: estabelece relações entre variáveis. </text:span></text:p>
                <text:list>
                  <text:list-item>
                    <text:p text:style-name="P12"><text:span text:style-name="T4">Exemplo: altura, mediante sexo e idade.</text:span></text:p>
                  </text:list-item>
                  <text:list-item>
                    <text:p text:style-name="P12"><text:span text:style-name="T4">Correlações: Verificada quando dois eventos não necessariamente são causalidades, mas acontecem de forma sincronizada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2"><text:span text:style-name="T4">Economia: inflação alta e aumento do desemprego;</text:span></text:p>
                      </text:list-item>
                      <text:list-item>
                        <text:p text:style-name="P12"><text:span text:style-name="T4">Restaurante: frequência semanal e satisfação com a comid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2;g35b73413691_0_28:notes" draw:style-name="gr2" draw:layer="layout" svg:width="13.147cm" svg:height="10.66cm" svg:x="3.287cm" svg:y="2.132cm" draw:page-number="14" presentation:class="page"/>
          <draw:frame draw:name="Google Shape;173;g35b73413691_0_28:notes" presentation:style-name="pr16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presentação dos dados" draw:style-name="dp1" draw:master-page-name="OBJECT" presentation:presentation-page-layout-name="AL1T11">
        <draw:frame draw:name="Google Shape;181;g35b73413691_0_3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resentação dos dados</text:span></text:p>
          </draw:text-box>
        </draw:frame>
        <draw:frame draw:name="Google Shape;182;g35b73413691_0_38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Tomadas de decisão são baseadas na análise de um conjunto de dados. Estes podem ser dispostos à gestores de diversas formas: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4">Apresentação tabular: 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3"><text:span text:style-name="T4">Forma tradicional de tabela com colunas representando os atributos (variáveis) e linhas representando os indivíduos (amostras ou registros);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3"/></text:p>
            <text:list text:style-name="L22">
              <text:list-item>
                <text:list>
                  <text:list-item>
                    <text:p text:style-name="P14"><text:span text:style-name="T4">Apresentação gráfica: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12"><text:span text:style-name="T4">Utiliza gráficos para apresentar dados ou resultados estatísticos;</text:span></text:p>
                      </text:list-item>
                      <text:list-item>
                        <text:p text:style-name="P12"><text:span text:style-name="T4">Devem ser claros e autoexplicativos;</text:span></text:p>
                      </text:list-item>
                      <text:list-item>
                        <text:p text:style-name="P12"><text:span text:style-name="T4">Escolha adequada do tipo de gráfic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8;g35b73413691_0_38:notes" draw:style-name="gr2" draw:layer="layout" svg:width="13.147cm" svg:height="10.66cm" svg:x="3.287cm" svg:y="2.132cm" draw:page-number="15" presentation:class="page"/>
          <draw:frame draw:name="Google Shape;179;g35b73413691_0_38:notes" presentation:style-name="pr17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Visualização de dados com tabelas" draw:style-name="dp1" draw:master-page-name="OBJECT" presentation:presentation-page-layout-name="AL1T11">
        <draw:frame draw:name="Google Shape;187;g38d36d0013c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ualização de dados com tabelas</text:span></text:p>
          </draw:text-box>
        </draw:frame>
        <draw:frame draw:name="Google Shape;188;g38d36d0013c_0_0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24">
              <text:list-item>
                <text:p text:style-name="P8"><text:span text:style-name="T3">Tabelas: maior precisão. Condensam mais informação em menor espaço. Pode ser difícil procurar por algo específico.</text:span></text:p>
              </text:list-item>
            </text:list>
          </draw:text-box>
        </draw:frame>
        <draw:frame draw:name="Google Shape;189;g38d36d0013c_0_0" draw:style-name="standard" draw:layer="layout" svg:width="9.816cm" svg:height="6.926cm" svg:x="1.509cm" svg:y="9.07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2">App</text:span></text:p>
              </table:table-cell>
              <table:table-cell>
                <text:p text:style-name="P12"><text:span text:style-name="T12">Avaliação média (1-5)</text:span></text:p>
              </table:table-cell>
              <table:table-cell>
                <text:p text:style-name="P12"><text:span text:style-name="T12">Downloads (milhões)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WhatsApp</text:span></text:p>
              </table:table-cell>
              <table:table-cell>
                <text:p text:style-name="P1"><text:span text:style-name="T12">4.5</text:span></text:p>
              </table:table-cell>
              <table:table-cell>
                <text:p text:style-name="P1"><text:span text:style-name="T12">5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Instagram</text:span></text:p>
              </table:table-cell>
              <table:table-cell>
                <text:p text:style-name="P1"><text:span text:style-name="T12">4.2</text:span></text:p>
              </table:table-cell>
              <table:table-cell>
                <text:p text:style-name="P1"><text:span text:style-name="T12">4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TikTok</text:span></text:p>
              </table:table-cell>
              <table:table-cell>
                <text:p text:style-name="P1"><text:span text:style-name="T12">4.7</text:span></text:p>
              </table:table-cell>
              <table:table-cell>
                <text:p text:style-name="P1"><text:span text:style-name="T12">6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Spotify</text:span></text:p>
              </table:table-cell>
              <table:table-cell>
                <text:p text:style-name="P1"><text:span text:style-name="T12">4.3</text:span></text:p>
              </table:table-cell>
              <table:table-cell>
                <text:p text:style-name="P1"><text:span text:style-name="T12">25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Netflix</text:span></text:p>
              </table:table-cell>
              <table:table-cell>
                <text:p text:style-name="P1"><text:span text:style-name="T12">4.0</text:span></text:p>
              </table:table-cell>
              <table:table-cell>
                <text:p text:style-name="P1"><text:span text:style-name="T12">3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90;g38d36d0013c_0_0" draw:style-name="standard" draw:layer="layout" svg:width="10.656cm" svg:height="6.371cm" svg:x="13.605cm" svg:y="9.078cm">
          <table:table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12"><text:span text:style-name="T12">Categoria</text:span></text:p>
              </table:table-cell>
              <table:table-cell>
                <text:p text:style-name="P12"><text:span text:style-name="T12">Vendas mensais (R$)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Eletrônicos</text:span></text:p>
              </table:table-cell>
              <table:table-cell>
                <text:p text:style-name="P1"><text:span text:style-name="T12">12.0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Vestuário</text:span></text:p>
              </table:table-cell>
              <table:table-cell>
                <text:p text:style-name="P1"><text:span text:style-name="T12">8.5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Livros</text:span></text:p>
              </table:table-cell>
              <table:table-cell>
                <text:p text:style-name="P1"><text:span text:style-name="T12">4.0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Alimentos</text:span></text:p>
              </table:table-cell>
              <table:table-cell>
                <text:p text:style-name="P1"><text:span text:style-name="T12">7.00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Casa/ Dec</text:span></text:p>
              </table:table-cell>
              <table:table-cell>
                <text:p text:style-name="P1"><text:span text:style-name="T12">9.5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84;g38d36d0013c_0_0:notes" draw:style-name="gr2" draw:layer="layout" svg:width="13.147cm" svg:height="10.66cm" svg:x="3.287cm" svg:y="2.132cm" draw:page-number="16" presentation:class="page"/>
          <draw:frame draw:name="Google Shape;185;g38d36d0013c_0_0:notes" presentation:style-name="pr18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Visualização de dados com gráficos" draw:style-name="dp1" draw:master-page-name="OBJECT" presentation:presentation-page-layout-name="AL1T11">
        <draw:frame draw:name="Google Shape;195;g38d36d0013c_0_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ualização de dados com gráficos</text:span></text:p>
          </draw:text-box>
        </draw:frame>
        <draw:frame draw:name="Google Shape;196;g38d36d0013c_0_7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Gráficos: usados para representar informações quantitativas. Devem ser intuitivos (simples, diretos e autoexplicativos).</text:span></text:p>
              </text:list-item>
            </text:list>
          </draw:text-box>
        </draw:frame>
        <draw:frame draw:name="Google Shape;197;g38d36d0013c_0_7" draw:style-name="gr6" draw:text-style-name="P15" draw:layer="layout" svg:width="18.521cm" svg:height="11.452cm" svg:x="4.696cm" svg:y="7.068cm">
          <draw:image xlink:href="Pictures/10000201000004B0000002E6CCAF417DBDE503B6.png" xlink:type="simple" xlink:show="embed" xlink:actuate="onLoad">
            <text:p/>
          </draw:image>
        </draw:frame>
        <presentation:notes draw:style-name="dp2">
          <draw:page-thumbnail draw:name="Google Shape;192;g38d36d0013c_0_7:notes" draw:style-name="gr2" draw:layer="layout" svg:width="13.147cm" svg:height="10.66cm" svg:x="3.287cm" svg:y="2.132cm" draw:page-number="17" presentation:class="page"/>
          <draw:frame draw:name="Google Shape;193;g38d36d0013c_0_7:notes" presentation:style-name="pr19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Visualização de dados com gráficos" draw:style-name="dp1" draw:master-page-name="OBJECT" presentation:presentation-page-layout-name="AL1T11">
        <draw:frame draw:name="Google Shape;202;g38d36d0013c_0_1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ualização de dados com gráficos</text:span></text:p>
          </draw:text-box>
        </draw:frame>
        <draw:frame draw:name="Google Shape;203;g38d36d0013c_0_1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Gráficos</text:span></text:p>
              </text:list-item>
            </text:list>
          </draw:text-box>
        </draw:frame>
        <draw:frame draw:name="Google Shape;204;g38d36d0013c_0_13" draw:style-name="gr6" draw:text-style-name="P15" draw:layer="layout" svg:width="21.133cm" svg:height="13.067cm" svg:x="2.328cm" svg:y="5.567cm">
          <draw:image xlink:href="Pictures/10000201000004B0000002E6A8B8E3B1892525F2.png" xlink:type="simple" xlink:show="embed" xlink:actuate="onLoad">
            <text:p/>
          </draw:image>
        </draw:frame>
        <presentation:notes draw:style-name="dp2">
          <draw:page-thumbnail draw:name="Google Shape;199;g38d36d0013c_0_13:notes" draw:style-name="gr2" draw:layer="layout" svg:width="13.147cm" svg:height="10.66cm" svg:x="3.287cm" svg:y="2.132cm" draw:page-number="18" presentation:class="page"/>
          <draw:frame draw:name="Google Shape;200;g38d36d0013c_0_13:notes" presentation:style-name="pr20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erpretação dos dados" draw:style-name="dp1" draw:master-page-name="OBJECT" presentation:presentation-page-layout-name="AL1T11">
        <draw:frame draw:name="Google Shape;209;g35b73413691_0_4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erpretação dos dados</text:span></text:p>
          </draw:text-box>
        </draw:frame>
        <draw:frame draw:name="Google Shape;210;g35b73413691_0_43" presentation:style-name="pr2" draw:text-style-name="P5" draw:layer="layout" svg:width="22.859cm" svg:height="13.64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A partir da apresentação, a etapa de interpretação permite definir o modelo mais adequado para ser aplicado ao problema;</text:span></text:p>
              </text:list-item>
            </text:list>
            <text:p text:style-name="P16"><text:span text:style-name="T3"/></text:p>
            <text:list text:continue-numbering="true" text:style-name="L9">
              <text:list-item>
                <text:p text:style-name="P14"><text:span text:style-name="T3">Essas etapas devem ser seguidas para evitar </text:span><text:span text:style-name="T10">datasets</text:span><text:span text:style-name="T3"> com dados mal coletados ou dispostos sem critério, que podem resultar em distorções em aplicações de </text:span><text:span text:style-name="T10">machine learning</text:span><text:span text:style-name="T3">;</text:span></text:p>
              </text:list-item>
            </text:list>
            <text:p text:style-name="P16"><text:span text:style-name="T3"/></text:p>
            <text:list text:continue-numbering="true" text:style-name="L9">
              <text:list-item>
                <text:p text:style-name="P14"><text:span text:style-name="T3">Exemplo: modelos de classificação de dados (KNN ou DT):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4">Algoritmos de classificação baseado nas características dos indivíduos;</text:span></text:p>
                  </text:list-item>
                  <text:list-item>
                    <text:p text:style-name="P12"><text:span text:style-name="T4">Para registros com atributo ‘sexo’ com valores ‘F’, ‘M’ e ‘10’, não encontrará boa relação entre os dados. Logo, o resultado do treino será rui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6;g35b73413691_0_43:notes" draw:style-name="gr2" draw:layer="layout" svg:width="13.147cm" svg:height="10.66cm" svg:x="3.287cm" svg:y="2.132cm" draw:page-number="19" presentation:class="page"/>
          <draw:frame draw:name="Google Shape;207;g35b73413691_0_43:notes" presentation:style-name="pr21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Portanto…" draw:style-name="dp1" draw:master-page-name="OBJECT" presentation:presentation-page-layout-name="AL1T11">
        <draw:frame draw:name="Google Shape;215;g35b73413691_0_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rtanto…</text:span></text:p>
          </draw:text-box>
        </draw:frame>
        <draw:frame draw:name="Google Shape;216;g35b73413691_0_6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9">
              <text:list-item>
                <text:p text:style-name="P13"><text:span text:style-name="T3">A eficiência de algoritmos de ML está diretamente relacionada à qualidade dos dados do conjunto de entrada;</text:span></text:p>
              </text:list-item>
            </text:list>
            <text:p text:style-name="P16"><text:span text:style-name="T3"/></text:p>
            <text:list text:continue-numbering="true" text:style-name="L9">
              <text:list-item>
                <text:p text:style-name="P14"><text:span text:style-name="T3">A AED torna-se um processo de extrema importância para garantir tal qualidade e evitar o uso de dados com campos faltantes, fora de contexto ou muito discrepantes, que possam comprometer o aprendizado.</text:span></text:p>
              </text:list-item>
            </text:list>
          </draw:text-box>
        </draw:frame>
        <presentation:notes draw:style-name="dp2">
          <draw:page-thumbnail draw:name="Google Shape;212;g35b73413691_0_63:notes" draw:style-name="gr2" draw:layer="layout" svg:width="13.147cm" svg:height="10.66cm" svg:x="3.287cm" svg:y="2.132cm" draw:page-number="20" presentation:class="page"/>
          <draw:frame draw:name="Google Shape;213;g35b73413691_0_63:notes" presentation:style-name="pr22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Ferramentas para AED" draw:style-name="dp1" draw:master-page-name="OBJECT" presentation:presentation-page-layout-name="AL1T11">
        <draw:frame draw:name="Google Shape;221;g35782da8aef_2_3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rramentas para AED</text:span></text:p>
          </draw:text-box>
        </draw:frame>
        <draw:frame draw:name="Google Shape;222;g35782da8aef_2_32" presentation:style-name="pr2" draw:text-style-name="P5" draw:layer="layout" svg:width="22.859cm" svg:height="5.348cm" svg:x="1.27cm" svg:y="4.445cm" presentation:class="outline" presentation:user-transformed="true">
          <draw:text-box>
            <text:list text:style-name="L5">
              <text:list-item>
                <text:p text:style-name="P8"><text:span text:style-name="T3">Notebook para edição de código (Google Colab, Jupyter, etc.)</text:span></text:p>
              </text:list-item>
              <text:list-item>
                <text:p text:style-name="P19"><text:span text:style-name="T3">pandas, seaborn, numpy, matplotlib, etc..</text:span></text:p>
              </text:list-item>
            </text:list>
            <text:p text:style-name="P21"><text:span text:style-name="T3"/></text:p>
            <text:list text:continue-numbering="true" text:style-name="L5">
              <text:list-item>
                <text:p text:style-name="P11"><text:span text:style-name="T3">Exemplo:</text:span></text:p>
              </text:list-item>
            </text:list>
            <text:p text:style-name="P10"><text:span text:style-name="T3"/></text:p>
          </draw:text-box>
        </draw:frame>
        <draw:custom-shape draw:name="Google Shape;223;g35782da8aef_2_32" draw:style-name="gr5" draw:text-style-name="P6" draw:layer="layout" svg:width="19.386cm" svg:height="6.721cm" svg:x="3.007cm" svg:y="8.751cm">
          <text:p text:style-name="P10"><text:span text:style-name="T13">import pandas as pd</text:span></text:p>
          <text:p text:style-name="P10"><text:span text:style-name="T13"/></text:p>
          <text:p text:style-name="P10"><text:span text:style-name="T13">df = pd.read_csv("dadosE-commerce.csv")</text:span></text:p>
          <text:p text:style-name="P10"><text:span text:style-name="T13">df.head()</text:span></text:p>
          <text:p text:style-name="P10"><text:span text:style-name="T13">df.describe()</text:span></text:p>
          <text:p text:style-name="P10"><text:span text:style-name="T13">df.isnull().sum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g35782da8aef_2_32:notes" presentation:style-name="pr23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219;g35782da8aef_2_32:notes" draw:style-name="gr2" draw:layer="layout" svg:width="13.147cm" svg:height="10.66cm" svg:x="3.287cm" svg:y="2.132cm" draw:page-number="21" presentation:class="page"/>
        </presentation:notes>
      </draw:page>
      <draw:page draw:name="Técnicas de Análise Exploratória" draw:style-name="dp1" draw:master-page-name="OBJECT" presentation:presentation-page-layout-name="AL1T11">
        <draw:frame draw:name="Google Shape;228;g35782da8aef_2_3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écnicas de Análise Exploratória</text:span></text:p>
          </draw:text-box>
        </draw:frame>
        <draw:frame draw:name="Google Shape;229;g35782da8aef_2_37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3">Agrupamento com groupby</text:span></text:p>
              </text:list-item>
              <text:list-item>
                <text:p text:style-name="P9"><text:span text:style-name="T3">Filtros condicionais e seleção de colunas</text:span></text:p>
              </text:list-item>
              <text:list-item>
                <text:p text:style-name="P9"><text:span text:style-name="T3">Ordenação de dados</text:span></text:p>
              </text:list-item>
              <text:list-item>
                <text:p text:style-name="P9"><text:span text:style-name="T3">Contagem de categorias</text:span></text:p>
              </text:list-item>
            </text:list>
          </draw:text-box>
        </draw:frame>
        <presentation:notes draw:style-name="dp2">
          <draw:frame draw:name="Google Shape;225;g35782da8aef_2_37:notes" presentation:style-name="pr24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226;g35782da8aef_2_37:notes" draw:style-name="gr2" draw:layer="layout" svg:width="13.147cm" svg:height="10.66cm" svg:x="3.287cm" svg:y="2.132cm" draw:page-number="22" presentation:class="page"/>
        </presentation:notes>
      </draw:page>
      <draw:page draw:name="Visualização de Dados" draw:style-name="dp1" draw:master-page-name="OBJECT" presentation:presentation-page-layout-name="AL1T11">
        <draw:frame draw:name="Google Shape;234;g35782da8aef_2_4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ualização de Dados</text:span></text:p>
          </draw:text-box>
        </draw:frame>
        <draw:frame draw:name="Google Shape;235;g35782da8aef_2_4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3">Bibliotecas: matplotlib, seaborn</text:span></text:p>
              </text:list-item>
              <text:list-item>
                <text:p text:style-name="P9"><text:span text:style-name="T3">Tipos de gráfico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4">Histogramas</text:span></text:p>
                  </text:list-item>
                  <text:list-item>
                    <text:p text:style-name="P9"><text:span text:style-name="T4">Gráficos de barras</text:span></text:p>
                  </text:list-item>
                  <text:list-item>
                    <text:p text:style-name="P9"><text:span text:style-name="T4">Boxplots</text:span></text:p>
                  </text:list-item>
                </text:list>
              </text:list-item>
            </text:list>
          </draw:text-box>
        </draw:frame>
        <draw:frame draw:name="Google Shape;236;g35782da8aef_2_42" presentation:style-name="pr2" draw:text-style-name="P5" draw:layer="layout" svg:width="15.398cm" svg:height="7.022cm" svg:x="8.222cm" svg:y="9.673cm" presentation:class="outline" presentation:user-transformed="true">
          <draw:text-box>
            <text:p text:style-name="P22"><text:span text:style-name="T13">import seaborn as sns</text:span></text:p>
            <text:p text:style-name="P10"><text:span text:style-name="T13">import matplotlib.pyplot as plt</text:span></text:p>
            <text:p text:style-name="P21"><text:span text:style-name="T13"/></text:p>
            <text:p text:style-name="P10"><text:span text:style-name="T13">sns.histplot(df['idade'], bins=10)</text:span></text:p>
            <text:p text:style-name="P10"><text:span text:style-name="T13">plt.title("Distribuição de idade")</text:span></text:p>
            <text:p text:style-name="P10"><text:span text:style-name="T13">plt.show()</text:span></text:p>
          </draw:text-box>
        </draw:frame>
        <presentation:notes draw:style-name="dp2">
          <draw:frame draw:name="Google Shape;231;g35782da8aef_2_42:notes" presentation:style-name="pr25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232;g35782da8aef_2_42:notes" draw:style-name="gr2" draw:layer="layout" svg:width="13.147cm" svg:height="10.66cm" svg:x="3.287cm" svg:y="2.132cm" draw:page-number="23" presentation:class="page"/>
        </presentation:notes>
      </draw:page>
      <draw:page draw:name="Algumas funções" draw:style-name="dp1" draw:master-page-name="OBJECT" presentation:presentation-page-layout-name="AL1T11">
        <draw:frame draw:name="Google Shape;241;g35c779ee927_0_0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lgumas funções</text:span></text:p>
          </draw:text-box>
        </draw:frame>
        <draw:frame draw:name="Google Shape;242;g35c779ee927_0_0" presentation:style-name="pr2" draw:text-style-name="P5" draw:layer="layout" svg:width="23.568cm" svg:height="14.2cm" svg:x="1.27cm" svg:y="4.445cm" presentation:class="outline" presentation:user-transformed="true">
          <draw:text-box>
            <text:list text:style-name="L32">
              <text:list-item>
                <text:p text:style-name="P13"><text:span text:style-name="T14">import pandas as pd</text:span><text:span text:style-name="T3">: para trabalhar com dados tabulares (DataFrames);</text:span></text:p>
              </text:list-item>
              <text:list-item>
                <text:p text:style-name="P19"><text:span text:style-name="T14">import io</text:span><text:span text:style-name="T3">: para trabalhar com fluxos de dados (</text:span><text:span text:style-name="T10">streams</text:span><text:span text:style-name="T3">) como se fossem arquivos;</text:span></text:p>
              </text:list-item>
              <text:list-item>
                <text:p text:style-name="P19"><text:span text:style-name="T14">pd.read_csv(‘arquivo’)</text:span><text:span text:style-name="T3">: lê e carrega o dataset para um DataFrame;</text:span></text:p>
              </text:list-item>
              <text:list-item>
                <text:p text:style-name="P19"><text:span text:style-name="T14">df.head()</text:span><text:span text:style-name="T3">: exibe 5 primeiras linhas do df. Ideal para ter ideia da estrutura dos dados;</text:span></text:p>
              </text:list-item>
              <text:list-item>
                <text:p text:style-name="P19"><text:span text:style-name="T14">df.info():</text:span><text:span text:style-name="T3"> resumo do df. Permite verificar se há dados ausentes e se os tipos estão corretos;</text:span></text:p>
              </text:list-item>
              <text:list-item>
                <text:p text:style-name="P19"><text:span text:style-name="T14">df.describe()</text:span><text:span text:style-name="T3">: para estatísticas descritivas(média, desvio padrão, quartis, etc.). Serve para entender a distribuição e centralidade dos dados;</text:span></text:p>
              </text:list-item>
              <text:list-item>
                <text:p text:style-name="P19"><text:span text:style-name="T14">df.shape</text:span><text:span text:style-name="T3">: total de linhas e colunas;</text:span></text:p>
              </text:list-item>
              <text:list-item>
                <text:p text:style-name="P19"><text:span text:style-name="T14">df[‘coluna’].value_counts()</text:span><text:span text:style-name="T3">: conta a frequência de cada valor único em uma coluna (categóricas). Verificar as mais comuns;</text:span></text:p>
              </text:list-item>
              <text:list-item>
                <text:p text:style-name="P20"><text:span text:style-name="T14">.plot(kind=‘bar’):</text:span><text:span text:style-name="T3"> gera gráfico tipo barra. Ver outros tipos disponíveis;</text:span></text:p>
              </text:list-item>
            </text:list>
          </draw:text-box>
        </draw:frame>
        <presentation:notes draw:style-name="dp2">
          <draw:page-thumbnail draw:name="Google Shape;238;g35c779ee927_0_0:notes" draw:style-name="gr2" draw:layer="layout" svg:width="13.147cm" svg:height="10.66cm" svg:x="3.287cm" svg:y="2.132cm" draw:page-number="24" presentation:class="page"/>
          <draw:frame draw:name="Google Shape;239;g35c779ee927_0_0:notes" presentation:style-name="pr26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Mais algumas funções" draw:style-name="dp1" draw:master-page-name="OBJECT" presentation:presentation-page-layout-name="AL1T11">
        <draw:frame draw:name="Google Shape;247;g35c779ee927_0_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s algumas funções</text:span></text:p>
          </draw:text-box>
        </draw:frame>
        <draw:frame draw:name="Google Shape;248;g35c779ee927_0_5" presentation:style-name="pr2" draw:text-style-name="P5" draw:layer="layout" svg:width="22.859cm" svg:height="14.134cm" svg:x="1.27cm" svg:y="4.445cm" presentation:class="outline" presentation:user-transformed="true">
          <draw:text-box>
            <text:list text:style-name="L33">
              <text:list-item>
                <text:p text:style-name="P13"><text:span text:style-name="T14">import matplotlib.pyplot as plt</text:span><text:span text:style-name="T3">: para criação de gráficos;</text:span></text:p>
              </text:list-item>
              <text:list-item>
                <text:p text:style-name="P19"><text:span text:style-name="T14">plt.show()</text:span><text:span text:style-name="T3">: exibe gráfico;</text:span></text:p>
              </text:list-item>
              <text:list-item>
                <text:p text:style-name="P19"><text:span text:style-name="T14">plt.title</text:span><text:span text:style-name="T3">: define título para gráfico;</text:span></text:p>
              </text:list-item>
              <text:list-item>
                <text:p text:style-name="P19"><text:span text:style-name="T14">plt.xlabel(‘rotulo eixo X’)</text:span><text:span text:style-name="T3">: define label para eixo X (fazer o mesmo para ylabel);</text:span></text:p>
              </text:list-item>
              <text:list-item>
                <text:p text:style-name="P19"><text:span text:style-name="T14">df[‘coluna’] = pd.to_datetime(df[‘coluna’])</text:span><text:span text:style-name="T3">: conversão de dados de texto para coluna. Para cálculos baseados em tempo;</text:span></text:p>
              </text:list-item>
              <text:list-item>
                <text:p text:style-name="P19"><text:span text:style-name="T14">df.groupby(‘coluna’_categorica)[‘coluna_numérica’].mean()</text:span><text:span text:style-name="T3">: agrupa o DataFrame por valores únicos em uma coluna categórica e, para cada grupo, calcula a média de outra coluna numérica;</text:span></text:p>
              </text:list-item>
              <text:list-item>
                <text:p text:style-name="P19"><text:span text:style-name="T14">plt.scatter(df['coluna_x'], df['coluna_y']</text:span><text:span text:style-name="T3">): cria um gráfico de dispersão (scatter plot), com a relação entre duas variáveis numéricas;</text:span></text:p>
              </text:list-item>
              <text:list-item>
                <text:p text:style-name="P19"><text:span text:style-name="T14">import seaborn as sns</text:span><text:span text:style-name="T3">: construída sobre o Matplotlib e fornece uma interface de alto nível para criar gráficos estatísticos atraentes.</text:span></text:p>
              </text:list-item>
              <text:list-item>
                <text:p text:style-name="P20"><text:span text:style-name="T14">sns.boxplot(y=df['Nome_da_Coluna'])</text:span><text:span text:style-name="T3">: cria um box plot (diagrama de caixa), excelente para visualizar a distribuição de uma variável numérica, identificar a mediana, quartis e, principalmente, detectar outliers.</text:span></text:p>
              </text:list-item>
            </text:list>
          </draw:text-box>
        </draw:frame>
        <presentation:notes draw:style-name="dp2">
          <draw:page-thumbnail draw:name="Google Shape;244;g35c779ee927_0_5:notes" draw:style-name="gr2" draw:layer="layout" svg:width="13.147cm" svg:height="10.66cm" svg:x="3.287cm" svg:y="2.132cm" draw:page-number="25" presentation:class="page"/>
          <draw:frame draw:name="Google Shape;245;g35c779ee927_0_5:notes" presentation:style-name="pr27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tividade Prática" draw:style-name="dp1" draw:master-page-name="OBJECT" presentation:presentation-page-layout-name="AL1T11">
        <draw:frame draw:name="Google Shape;253;g35782da8aef_2_5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tividade Prática</text:span></text:p>
          </draw:text-box>
        </draw:frame>
        <draw:frame draw:name="Google Shape;254;g35782da8aef_2_52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34">
              <text:list-item>
                <text:p text:style-name="P8"><text:span text:style-name="T3">Carregar e explorar o dataset disponível no moodle (Feedback e performance);</text:span></text:p>
              </text:list-item>
              <text:list-item>
                <text:p text:style-name="P9"><text:span text:style-name="T3">Aplicar funções listadas nos slides anteriores</text:span></text:p>
              </text:list-item>
              <text:list-item>
                <text:p text:style-name="P9"><text:span text:style-name="T3">Gerar visualizações:</text:span></text:p>
              </text:list-item>
            </text:list>
            <text:list text:style-name="L35">
              <text:list-item>
                <text:list>
                  <text:list-item>
                    <text:p text:style-name="P9"><text:span text:style-name="T3">Histograma</text:span></text:p>
                  </text:list-item>
                  <text:list-item>
                    <text:p text:style-name="P9"><text:span text:style-name="T3">Boxplot por categoria</text:span></text:p>
                  </text:list-item>
                </text:list>
              </text:list-item>
              <text:list-item>
                <text:p text:style-name="P9"><text:span text:style-name="T3">Produzir insights com base nos gráficos</text:span></text:p>
              </text:list-item>
              <text:list-item>
                <text:p text:style-name="P9"><text:span text:style-name="T3">Responda as perguntas:</text:span></text:p>
              </text:list-item>
            </text:list>
            <text:list text:style-name="L36">
              <text:list-item>
                <text:list>
                  <text:list-item>
                    <text:p text:style-name="P9"><text:span text:style-name="T4">Qual seria sua prioridade para otimizar o site?</text:span></text:p>
                  </text:list-item>
                  <text:list-item>
                    <text:p text:style-name="P9"><text:span text:style-name="T4">Existe alguma categoria que exija mais atenção?</text:span></text:p>
                  </text:list-item>
                  <text:list-item>
                    <text:p text:style-name="P9"><text:span text:style-name="T4">O que significa a correlação entre Tempo_Carregamento_Segundos e Avaliação_Usuário?</text:span></text:p>
                  </text:list-item>
                  <text:list-item>
                    <text:p text:style-name="P9"><text:span text:style-name="T4">Como a AED ajudou a chegar a essas conclusões?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50;g35782da8aef_2_52:notes" presentation:style-name="pr28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251;g35782da8aef_2_52:notes" draw:style-name="gr2" draw:layer="layout" svg:width="13.147cm" svg:height="10.66cm" svg:x="3.287cm" svg:y="2.132cm" draw:page-number="2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14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3;p14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14;p14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14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14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14" draw:style-name="Mgr3" draw:text-style-name="MP7" draw:layer="backgroundobjects" svg:width="22.1cm" svg:height="0.001cm" svg:x="0cm" svg:y="4.3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14" draw:style-name="Mgr4" draw:text-style-name="MP7" draw:layer="backgroundobjects" svg:width="5.469cm" svg:height="4.005cm" svg:x="19.93cm" svg:y="0.521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18T12:44:31</meta:creation-date>
    <meta:initial-creator>Leandro</meta:initial-creator>
    <meta:document-statistic meta:object-count="144"/>
    <meta:generator>LibreOfficeDev/6.0.5.2$Linux_X86_64 LibreOffice_project/</meta:generator>
  </office:meta>
</office:document-meta>
</file>