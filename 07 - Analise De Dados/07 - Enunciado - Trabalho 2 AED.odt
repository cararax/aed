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0930000006C14CCAA46E89F8D5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text-properties style:font-name="Calibri" style:font-name-asian="Calibri1" style:font-name-complex="Calibri1"/>
    </style:style>
    <style:style style:name="P2" style:family="paragraph" style:parent-style-name="Standard">
      <style:paragraph-properties fo:margin-top="0.1665in" fo:margin-bottom="0.1665in" loext:contextual-spacing="false" fo:line-height="100%" fo:text-align="justify" style:justify-single-word="false" fo:orphans="0" fo:widows="0"/>
    </style:style>
    <style:style style:name="P3" style:family="paragraph" style:parent-style-name="Standard" style:master-page-name="Standard">
      <style:paragraph-properties fo:margin-top="0.1665in" fo:margin-bottom="0.1665in" loext:contextual-spacing="false" fo:line-height="100%" fo:text-align="justify" style:justify-single-word="false" fo:orphans="0" fo:widows="0" style:page-number="1"/>
    </style:style>
    <style:style style:name="P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14" style:family="paragraph" style:parent-style-name="Standard" style:list-style-name="WWNum5">
      <style:paragraph-properties fo:margin-left="1in" fo:margin-right="0in" fo:margin-top="0in" fo:margin-bottom="0in" loext:contextual-spacing="false" fo:line-height="100%" fo:orphans="0" fo:widows="0" fo:text-indent="-0.25in" style:auto-text-indent="false"/>
    </style:style>
    <style:style style:name="P15" style:family="paragraph" style:parent-style-name="Standard" style:list-style-name="WWNum2">
      <style:paragraph-properties fo:margin-left="1in" fo:margin-right="0in" fo:margin-top="0in" fo:margin-bottom="0in" loext:contextual-spacing="false" fo:line-height="100%" fo:orphans="0" fo:widows="0" fo:text-indent="-0.25in" style:auto-text-indent="false"/>
    </style:style>
    <style:style style:name="P16" style:family="paragraph" style:parent-style-name="Standard" style:list-style-name="WWNum6">
      <style:paragraph-properties fo:margin-left="1in" fo:margin-right="0in" fo:margin-top="0in" fo:margin-bottom="0in" loext:contextual-spacing="false" fo:line-height="100%" fo:orphans="0" fo:widows="0" fo:text-indent="-0.25in" style:auto-text-indent="false"/>
    </style:style>
    <style:style style:name="P17" style:family="paragraph" style:parent-style-name="Standard" style:list-style-name="WWNum3">
      <style:paragraph-properties fo:margin-left="1in" fo:margin-right="0in" fo:margin-top="0in" fo:margin-bottom="0in" loext:contextual-spacing="false" fo:line-height="100%" fo:orphans="0" fo:widows="0" fo:text-indent="-0.25in" style:auto-text-indent="false"/>
    </style:style>
    <style:style style:name="P18" style:family="paragraph" style:parent-style-name="Standard" style:list-style-name="WWNum5">
      <style:paragraph-properties fo:margin-left="1in" fo:margin-right="0in" fo:margin-top="0in" fo:margin-bottom="0.1665in" loext:contextual-spacing="false" fo:line-height="100%" fo:orphans="0" fo:widows="0" fo:text-indent="-0.25in" style:auto-text-indent="false"/>
    </style:style>
    <style:style style:name="P19" style:family="paragraph" style:parent-style-name="Standard" style:list-style-name="WWNum2">
      <style:paragraph-properties fo:margin-left="1in" fo:margin-right="0in" fo:margin-top="0in" fo:margin-bottom="0.1665in" loext:contextual-spacing="false" fo:line-height="100%" fo:orphans="0" fo:widows="0" fo:text-indent="-0.25in" style:auto-text-indent="false"/>
    </style:style>
    <style:style style:name="P20" style:family="paragraph" style:parent-style-name="Standard" style:list-style-name="WWNum6">
      <style:paragraph-properties fo:margin-left="1in" fo:margin-right="0in" fo:margin-top="0in" fo:margin-bottom="0.1665in" loext:contextual-spacing="false" fo:line-height="100%" fo:orphans="0" fo:widows="0" fo:text-indent="-0.25in" style:auto-text-indent="false"/>
    </style:style>
    <style:style style:name="P21" style:family="paragraph" style:parent-style-name="Standard" style:list-style-name="WWNum3">
      <style:paragraph-properties fo:margin-left="1in" fo:margin-right="0in" fo:margin-top="0in" fo:margin-bottom="0.1665in" loext:contextual-spacing="false" fo:line-height="100%" fo:orphans="0" fo:widows="0" fo:text-indent="-0.25in" style:auto-text-indent="false"/>
    </style:style>
    <style:style style:name="P22" style:family="paragraph" style:parent-style-name="Standard">
      <style:paragraph-properties fo:margin-left="0.2953in" fo:margin-right="-0.0236in" fo:margin-top="0.1665in" fo:margin-bottom="0.1665in" loext:contextual-spacing="false" fo:line-height="100%" fo:text-align="justify" style:justify-single-word="false" fo:orphans="0" fo:widows="0" fo:text-indent="0in" style:auto-text-indent="false"/>
    </style:style>
    <style:style style:name="P23" style:family="paragraph" style:parent-style-name="Standard">
      <style:paragraph-properties fo:margin-left="0.2953in" fo:margin-right="-0.0236in" fo:margin-top="0.1665in" fo:margin-bottom="0.166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1">
      <style:paragraph-properties fo:margin-left="0.5in" fo:margin-right="-0.0236in" fo:margin-top="0.1665in" fo:margin-bottom="0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5" style:family="paragraph" style:parent-style-name="Standard" style:list-style-name="WWNum1">
      <style:paragraph-properties fo:margin-left="0.5in" fo:margin-right="-0.0236in" fo:margin-top="0in" fo:margin-bottom="0.1665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T1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style:font-name="Calibri" style:text-underline-style="none" style:font-name-asian="Calibri1" style:font-name-complex="Calibri1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ntexto:</text:span><text:span text:style-name="T2"> Você foi contratado(a) como analista de dados por uma rede de restaurantes. Sua primeira tarefa é analisar um conjunto de dados históricos de gorjetas para entender os fatores que influenciam o valor que os clientes deixam para os garçons. O seu objetivo é limpar, inspecionar, visualizar os dados e interpretar os padrões encontrados.</text:span></text:p>
      <text:p text:style-name="P2"><text:span text:style-name="T1">Instruções Gerais:</text:span></text:p>
      <text:list xml:id="list187356207" text:style-name="WWNum4">
        <text:list-item>
          <text:p text:style-name="P4"><text:span text:style-name="T2">Utilize um Notebook Python (Jupyter ou Google Colab);</text:span></text:p>
        </text:list-item>
        <text:list-item>
          <text:p text:style-name="P9"><text:span text:style-name="T2">Use células de texto para explicar os códigos;</text:span></text:p>
        </text:list-item>
        <text:list-item>
          <text:p text:style-name="P9"><text:span text:style-name="T2">Responda às questões marcadas com “Pergunta Analítica” com base nos resultados e gráficos gerados. Use células de texto para responder essas questões.</text:span></text:p>
        </text:list-item>
        <text:list-item>
          <text:p text:style-name="P13"><text:span text:style-name="T2">Entregar o arquivo .ipynb via Moodle.</text:span></text:p>
        </text:list-item>
      </text:list>
      <text:p text:style-name="P2"><text:span text:style-name="T1">Etapas da Atividade</text:span></text:p>
      <text:p text:style-name="P2"><text:span text:style-name="T1">Parte 1: Carregamento e Inspeção dos Dados:</text:span><text:span text:style-name="T2"> o primeiro passo em qualquer análise é entender o formato dos seus dados.</text:span></text:p>
      <text:list xml:id="list3417047527" text:style-name="WWNum5">
        <text:list-item>
          <text:p text:style-name="P5"><text:span text:style-name="T1">Carregamento e Inspeção:</text:span></text:p>
          <text:list>
            <text:list-item>
              <text:p text:style-name="P14"><text:span text:style-name="T2">Importe as bibliotecas (pandas, seaborn, matplotlib.pyplot);</text:span></text:p>
            </text:list-item>
            <text:list-item>
              <text:p text:style-name="P14"><text:span text:style-name="T2">Carregue o dataset "tips" (disponível em: sns.load_dataset('tips')) ou utilize o CSV fornecido pelo professor e armazene-o em um DataFrame;</text:span></text:p>
            </text:list-item>
            <text:list-item>
              <text:p text:style-name="P14"><text:span text:style-name="T2">Exiba as 10 primeiras linhas do dataset.</text:span></text:p>
            </text:list-item>
          </text:list>
        </text:list-item>
        <text:list-item>
          <text:p text:style-name="P10"><text:span text:style-name="T1">Estrutura dos Dados:</text:span></text:p>
          <text:list>
            <text:list-item>
              <text:p text:style-name="P14"><text:span text:style-name="T2">Use o método .info() para verificar os tipos de dados de cada coluna e a existência de valores nulos (missing values);</text:span></text:p>
            </text:list-item>
            <text:list-item>
              <text:p text:style-name="P18"><text:span text:style-name="T2">Use o método .describe() para obter um resumo estatístico das colunas numéricas (total_bill, tip, size).</text:span></text:p>
            </text:list-item>
          </text:list>
        </text:list-item>
      </text:list>
      <text:p text:style-name="P22"><text:span text:style-name="T1">Pergunta Analítica (Parte 1):</text:span><text:span text:style-name="T2"> Ao analisar a saída do .info(), os tipos de dados de todas as colunas parecem adequados para análise? Observando o .describe(), compare a média (mean) e a mediana (50%) do total_bill. O que elas sugerem sobre a distribuição dos valores das contas?</text:span></text:p>
      <text:p text:style-name="P2"><text:span text:style-name="T1">Parte 2: Análise Univariada e Criação de Variável:</text:span><text:span text:style-name="T2"> analisar as variáveis individualmente para entender suas distribuições.</text:span></text:p>
      <text:list xml:id="list3169609032" text:style-name="WWNum2">
        <text:list-item>
          <text:p text:style-name="P6"><text:span text:style-name="T1">Criação de Variável (Feature Engineering):</text:span></text:p>
          <text:list>
            <text:list-item>
              <text:p text:style-name="P15"><text:span text:style-name="T2">Para entender a generosidade do cliente, precisamos da proporção da gorjeta. Crie uma nova coluna no DataFrame chamada tip_pct (porcentagem da gorjeta), calculada pela divisão da coluna tip pela coluna total_bill.</text:span></text:p>
            </text:list-item>
          </text:list>
        </text:list-item>
        <text:list-item>
          <text:p text:style-name="P11"><text:span text:style-name="T1">Variáveis Categóricas:</text:span></text:p>
          <text:list>
            <text:list-item>
              <text:p text:style-name="P15"><text:span text:style-name="T1">Pandas:</text:span><text:span text:style-name="T2"> Use .value_counts() para verificar a frequência de clientes fumantes (smoker) e não fumantes;</text:span></text:p>
            </text:list-item>
            <text:list-item>
              <text:p text:style-name="P15"><text:span text:style-name="T1">Seaborn:</text:span><text:span text:style-name="T2"> Crie um gráfico de contagem (sns.countplot()) para a variável day.</text:span></text:p>
            </text:list-item>
          </text:list>
        </text:list-item>
        <text:list-item>
          <text:p text:style-name="P11"><text:span text:style-name="T1">Variáveis Numéricas:</text:span></text:p>
          <text:list>
            <text:list-item>
              <text:p text:style-name="P15"><text:span text:style-name="T1">Seaborn:</text:span><text:span text:style-name="T2"> Crie um histograma com curva de densidade (sns.histplot(kde=True)) para a variável total_bill (valor total da conta);</text:span></text:p>
            </text:list-item>
            <text:list-item>
              <text:p text:style-name="P15"><text:span text:style-name="T1">Pandas:</text:span><text:span text:style-name="T2"> Ordene o DataFrame pelos 10 maiores valores de conta (total_bill) e exiba essa pequena tabela.</text:span></text:p>
            </text:list-item>
          </text:list>
        </text:list-item>
        <text:list-item>
          <text:p text:style-name="P11"><text:span text:style-name="T1">Identificação de Valores Atípicos (Outliers):</text:span></text:p>
          <text:list>
            <text:list-item>
              <text:p text:style-name="P19"><text:span text:style-name="T1">Pandas:</text:span><text:span text:style-name="T2"> Na área de restaurantes, uma gorjeta acima de 30% é considerada muito incomum. Filtre o seu DataFrame para exibir apenas as mesas que deixaram uma gorjeta proporcional (tip_pct) superior a 30% (0.30).</text:span></text:p>
            </text:list-item>
          </text:list>
        </text:list-item>
      </text:list>
      <text:p text:style-name="P23"><text:span text:style-name="T1">Perguntas Analíticas (Parte 2): </text:span></text:p>
      <text:list xml:id="list1702238873" text:style-name="WWNum1">
        <text:list-item>
          <text:p text:style-name="P24"><text:span text:style-name="T2">Observando a tabela com as 10 maiores contas do restaurante, os clientes que gastaram mais também foram os que deixaram as maiores gorjetas proporcionais (tip_pct)?</text:span></text:p>
        </text:list-item>
        <text:list-item>
          <text:p text:style-name="P25"><text:span text:style-name="T2">Quantas mesas deixaram gorjetas proporcionalmente consideradas "atípicas" (acima de 30%)? Observando as informações apenas dessas linhas filtradas, você nota algum padrão que justifique essa generosidade (ex: são mesas pequenas, ocorreram em um dia específico) ou parecem ser casos isolados? </text:span></text:p>
        </text:list-item>
      </text:list>
      <text:p text:style-name="P2"><text:span text:style-name="T1">Parte 3: Análise Bivariada (Relações): </text:span><text:span text:style-name="T2">cruzar as variáveis para encontrar padrões.</text:span></text:p>
      <text:list xml:id="list1855580301" text:style-name="WWNum6">
        <text:list-item>
          <text:p text:style-name="P7"><text:span text:style-name="T1">Relação Numérica x Numérica:</text:span></text:p>
          <text:list>
            <text:list-item>
              <text:p text:style-name="P16"><text:span text:style-name="T1">Seaborn:</text:span><text:span text:style-name="T2"> Crie um gráfico de dispersão (sns.scatterplot()) para analisar a relação entre total_bill (eixo x) e tip (eixo y).</text:span></text:p>
            </text:list-item>
          </text:list>
        </text:list-item>
        <text:list-item>
          <text:p text:style-name="P12"><text:span text:style-name="T1">Relação Categórica x Numérica:</text:span></text:p>
          <text:list>
            <text:list-item>
              <text:p text:style-name="P16"><text:span text:style-name="T1">Seaborn:</text:span><text:span text:style-name="T2"> Crie um gráfico de barras (sns.barplot()) comparando a gorjeta proporcional média (tip_pct no eixo y) entre os sexos (sex no eixo x);</text:span></text:p>
            </text:list-item>
            <text:list-item>
              <text:p text:style-name="P20"><text:span text:style-name="T1">Pandas:</text:span><text:span text:style-name="T2"> Use o .groupby() para calcular a média da gorjeta absoluta (tip) para cada dia da semana (day). Ordene os resultados.</text:span></text:p>
            </text:list-item>
          </text:list>
        </text:list-item>
      </text:list>
      <text:p text:style-name="P23"><text:span text:style-name="T1">Pergunta Analítica (Parte 3): </text:span><text:span text:style-name="T2">Analisando o gráfico de dispersão (scatterplot): Você diria que existe uma relação forte, fraca ou inexistente entre o valor total da conta e o valor absoluto da gorjeta? Justifique sua resposta observando o padrão dos pontos. Observando a altura das barras, existe uma diferença significativa na proporção de gorjeta deixada entre homens e mulheres?</text:span></text:p>
      <text:p text:style-name="P2"><text:span text:style-name="T1">Parte 4: Análise Multivariada e Síntese:</text:span></text:p>
      <text:list xml:id="list302124471" text:style-name="WWNum3">
        <text:list-item>
          <text:p text:style-name="P8"><text:span text:style-name="T1">Adicionando uma Dimensão:</text:span></text:p>
          <text:list>
            <text:list-item>
              <text:p text:style-name="P17"><text:span text:style-name="T1">Seaborn:</text:span><text:span text:style-name="T2"> Recrie o gráfico de dispersão (sns.scatterplot()) de total_bill (x) vs tip (y), mas agora adicione a variável smoker (fumante) como cor (parâmetro hue).</text:span></text:p>
            </text:list-item>
            <text:list-item>
              <text:p text:style-name="P21"><text:span text:style-name="T1">Seaborn:</text:span><text:span text:style-name="T2"> Crie um gráfico de barras (sns.barplot()) para mostrar o valor médio da gorjeta absoluta (tip no eixo y) por dia (day no eixo x), mas segmentando (usando hue) pelo horário (time - Almoço/Jantar).</text:span></text:p>
            </text:list-item>
          </text:list>
        </text:list-item>
      </text:list>
      <text:p text:style-name="P23"><text:span text:style-name="T1">Pergunta Analítica (Parte 4):</text:span><text:span text:style-name="T2"> Com base em todas as análises: Se você fosse o gerente do restaurante e quisesse maximizar o faturamento com gorjetas para reter seus funcionários, em quais dias e horários você escalaria seus melhores garçons? Existe algum perfil de cliente (fumante/não fumante) ou padrão de consumo que parece ser mais lucrativo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style:text-underline-style="none"/>
    </style:style>
    <style:style style:name="ListLabel_20_11" style:display-name="ListLabel 11" style:family="text">
      <style:text-properties style:font-name="Calibri" fo:font-family="Calibri" style:font-family-generic="roman" style:font-pitch="variable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style:text-underline-style="none"/>
    </style:style>
    <style:style style:name="ListLabel_20_20" style:display-name="ListLabel 20" style:family="text">
      <style:text-properties style:font-name="Calibri" fo:font-family="Calibri" style:font-family-generic="roman" style:font-pitch="variable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style:text-underline-style="none"/>
    </style:style>
    <style:style style:name="ListLabel_20_38" style:display-name="ListLabel 38" style:family="text">
      <style:text-properties style:font-name="Calibri" fo:font-family="Calibri" style:font-family-generic="roman" style:font-pitch="variable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style:text-underline-style="none"/>
    </style:style>
    <style:style style:name="ListLabel_20_47" style:display-name="ListLabel 47" style:family="text">
      <style:text-properties style:font-name="Calibri" fo:font-family="Calibri" style:font-family-generic="roman" style:font-pitch="variable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font-name="Calibri" style:font-name-asian="Calibri1" style:font-name-complex="Calibri1"/>
    </style:style>
    <style:style style:name="MT1" style:family="text">
      <style:text-properties style:font-name="Calibri" style:font-name-asian="Calibri1" style:font-name-complex="Calibri1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29in" fo:margin-bottom="0.5in" fo:margin-left="1in" fo:margin-right="1in" style:writing-mode="lr-tb" style:layout-grid-color="#c0c0c0" style:layout-grid-lines="227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7in" style:dynamic-spacing="true"/>
      </style:header-style>
      <style:footer-style>
        <style:header-footer-properties fo:min-height="0.8661in" fo:margin-left="0in" fo:margin-right="0in" fo:margin-top="0.82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Colégio Politécnico da UFSM</text:span><draw:frame draw:style-name="Mfr1" draw:name="image1.png" text:anchor-type="char" svg:x="4.6583in" svg:y="-0.2291in" svg:width="1.5311in" svg:height="1.1252in" draw:z-index="0"><draw:image xlink:href="Pictures/10000201000000930000006C14CCAA46E89F8D59.png" xlink:type="simple" xlink:show="embed" xlink:actuate="onLoad" loext:mime-type="image/png"/></draw:frame></text:p>
        <text:p text:style-name="Standard"><text:span text:style-name="MT1">Sistemas para Internet</text:span></text:p>
        <text:p text:style-name="Standard"><text:span text:style-name="MT1">Disciplina: Análise de dados e extração de conhecimento</text:span></text:p>
        <text:p text:style-name="Standard"><text:span text:style-name="MT1">Professor: Leandro Freitas</text:span></text:p>
        <text:p text:style-name="MP1"/>
        <text:p text:style-name="Standard"><text:span text:style-name="MT1">Atividade avaliativa: Análise Exploratória de Dados</text:span></text:p>
      </style:header>
      <style:header-left>
        <text:p text:style-name="Standard"/>
      </style:header-left>
      <style:footer>
        <text:p text:style-name="Footer"/>
      </style:footer>
      <style:footer-left>
        <text:p text:style-name="Standard"/>
      </style:footer-left>
    </style:master-page>
    <style:master-page style:name="First_20_Page" style:display-name="First Page" style:page-layout-name="Mpm2" style:next-style-name="Standard">
      <style:header>
        <text:p text:style-name="Standard"><text:span text:style-name="MT1">Colégio Politécnico da UFSM</text:span><draw:frame draw:style-name="Mfr1" draw:name="Image1" text:anchor-type="char" svg:x="4.6583in" svg:y="-0.2291in" svg:width="1.5311in" svg:height="1.1252in" draw:z-index="0"><draw:image xlink:href="Pictures/10000201000000930000006C14CCAA46E89F8D59.png" xlink:type="simple" xlink:show="embed" xlink:actuate="onLoad" loext:mime-type="image/png"/></draw:frame></text:p>
        <text:p text:style-name="Standard"><text:span text:style-name="MT1">Sistemas para Internet</text:span></text:p>
        <text:p text:style-name="Standard"><text:span text:style-name="MT1">Disciplina: Análise de dados e extração de conhecimento</text:span></text:p>
        <text:p text:style-name="Standard"><text:span text:style-name="MT1">Professor: Leandro Freitas</text:span></text:p>
        <text:p text:style-name="MP1"/>
        <text:p text:style-name="Standard"><text:span text:style-name="MT1">Nome: _________________________________________________________ Data: 02/10/2025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52" meta:word-count="801" meta:character-count="5240" meta:non-whitespace-character-count="4520"/>
    <meta:generator>LibreOfficeDev/6.0.5.2$Linux_X86_64 LibreOffice_project/</meta:generator>
  </office:meta>
</office:document-meta>
</file>