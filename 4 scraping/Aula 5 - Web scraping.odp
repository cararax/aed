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8000001F4E3E118CBF43BA298.png" manifest:media-type="image/png"/>
  <manifest:file-entry manifest:full-path="Pictures/10000201000001E10000019BE013A7E2E05F7A93.png" manifest:media-type="image/png"/>
  <manifest:file-entry manifest:full-path="Pictures/100002010000025800000258255D76E2125C05E9.png" manifest:media-type="image/png"/>
  <manifest:file-entry manifest:full-path="Pictures/10000201000001BF000001F48087D8F36F777715.png" manifest:media-type="image/png"/>
  <manifest:file-entry manifest:full-path="Pictures/10000201000001DA0000015B5D9DBE45C88A5E6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1f497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14cm" svg:stroke-color="#1f497d" draw:stroke-linejoin="round" draw:fill="none" draw:textarea-vertical-align="middle" draw:auto-grow-height="false" draw:fit-to-size="false" style:shrink-to-fit="false" fo:min-height="0cm" fo:min-width="0cm" fo:padding-top="0.132cm" fo:padding-bottom="0.132cm" fo:padding-left="0.132cm" fo:padding-right="0.132cm" fo:wrap-option="wrap"/>
    </style:style>
    <style:style style:name="gr8" style:family="graphic" style:parent-style-name="standard">
      <style:graphic-properties draw:stroke="solid" svg:stroke-width="0.014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5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4"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169cm" fo:margin-bottom="0cm" fo:line-height="100%" fo:text-align="start" fo:text-indent="0cm" style:writing-mode="lr-tb"/>
    </style:style>
    <style:style style:name="P15" style:family="paragraph">
      <style:paragraph-properties fo:margin-left="1.27cm" fo:margin-right="0cm" fo:margin-top="0.169cm" fo:margin-bottom="0cm" fo:line-height="100%" fo:text-align="start" fo:text-indent="0cm" style:writing-mode="lr-tb">
        <style:tab-stops>
          <style:tab-stop style:position="0cm"/>
        </style:tab-stops>
      </style:paragraph-properties>
    </style:style>
    <style:style style:name="P16" style:family="paragraph">
      <style:paragraph-properties fo:margin-left="2.54cm" fo:margin-right="0cm" fo:margin-top="0.169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19" style:family="paragraph">
      <style:paragraph-properties fo:margin-left="3.81cm" fo:margin-right="0cm" fo:margin-top="0.169cm" fo:margin-bottom="0cm" fo:line-height="100%" fo:text-align="start" fo:text-indent="0cm" style:writing-mode="lr-tb">
        <style:tab-stops>
          <style:tab-stop style:position="0cm"/>
        </style:tab-stops>
      </style:paragraph-properties>
    </style:style>
    <style:style style:name="P20" style:family="paragraph">
      <style:paragraph-properties fo:margin-left="1.27cm" fo:margin-right="0cm" fo:margin-top="0.169cm" fo:margin-bottom="0cm" fo:line-height="100%" fo:text-align="start" fo:text-indent="1.27cm" style:writing-mode="lr-tb">
        <style:tab-stops>
          <style:tab-stop style:position="0cm"/>
        </style:tab-stops>
      </style:paragraph-properties>
    </style:style>
    <style:style style:name="P2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353cm" fo:margin-bottom="0cm" fo:line-height="100%" fo:text-align="start" fo:text-indent="0cm" style:writing-mode="lr-tb"/>
    </style:style>
    <style:style style:name="P25" style:family="paragraph">
      <style:paragraph-properties fo:margin-left="0cm" fo:margin-right="0cm" fo:margin-top="0.353cm" fo:margin-bottom="0.353cm" fo:line-height="100%" fo:text-align="start" fo:text-indent="0cm" style:writing-mode="lr-tb"/>
    </style:style>
    <style:style style:name="P26" style:family="paragraph">
      <style:paragraph-properties fo:margin-left="0cm" fo:margin-right="0cm" fo:margin-top="0.169cm" fo:margin-bottom="0cm" fo:line-height="100%" fo:text-align="start" fo:text-indent="1.27cm" style:writing-mode="lr-tb">
        <style:tab-stops>
          <style:tab-stop style:position="0cm"/>
        </style:tab-stops>
      </style:paragraph-properties>
    </style:style>
    <style:style style:name="P27" style:family="paragraph">
      <style:paragraph-properties fo:margin-left="0cm" fo:margin-right="0cm" fo:margin-top="0.169cm" fo:margin-bottom="0cm" fo:line-height="90%" fo:text-align="start" fo:text-indent="0cm" style:writing-mode="lr-tb"/>
    </style:style>
    <style:style style:name="P28" style:family="paragraph">
      <style:paragraph-properties fo:margin-left="1.27cm" fo:margin-right="0cm" fo:margin-top="0.169cm" fo:margin-bottom="0cm" fo:line-height="90%" fo:text-align="start" fo:text-indent="0cm" style:writing-mode="lr-tb">
        <style:tab-stops>
          <style:tab-stop style:position="0cm"/>
        </style:tab-stops>
      </style:paragraph-properties>
    </style:style>
    <style:style style:name="P29" style:family="paragraph">
      <style:paragraph-properties fo:margin-left="0cm" fo:margin-right="0cm" fo:margin-top="0.169cm" fo:margin-bottom="0cm" fo:line-height="90%"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1" style:family="paragraph">
      <style:paragraph-properties fo:margin-left="2.54cm" fo:margin-right="0cm" fo:margin-top="0.169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7"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14"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7.30000019073486pt" fo:letter-spacing="normal" fo:font-style="normal" style:text-underline-style="none" fo:font-weight="normal" style:font-name-asian="Arial" style:font-size-asian="7.30000019073486pt" style:font-style-asian="normal" style:font-weight-asian="normal" style:font-name-complex="Arial" style:font-size-complex="7.3000001907348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0pt" fo:letter-spacing="normal" fo:font-style="normal" style:text-underline-style="solid" style:text-underline-width="auto" style:text-underline-color="font-color" fo:font-weight="normal" style:font-name-asian="Calibri" style:font-size-asian="20pt" style:font-style-asian="normal" style:font-weight-asian="normal" style:font-name-complex="Calibri"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bold" style:font-name-asian="Calibri" style:font-size-asian="20pt" style:font-style-asian="italic" style:font-weight-asian="bold" style:font-name-complex="Calibri" style:font-size-complex="20pt" style:font-style-complex="italic" style:font-weight-complex="bold"/>
    </style:style>
    <style:style style:name="T1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alibri" fo:font-size="20pt" fo:letter-spacing="normal" fo:font-style="normal" style:text-underline-style="solid" style:text-underline-width="auto" style:text-underline-color="font-color" fo:font-weight="normal" style:font-name-asian="Calibri" style:font-size-asian="20pt" style:font-style-asian="normal" style:font-weight-asian="normal" style:font-name-complex="Calibri"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nsolas" fo:font-size="17pt" fo:letter-spacing="normal" fo:font-style="normal" style:text-underline-style="none" fo:font-weight="normal" style:font-name-asian="Consolas" style:font-size-asian="17pt" style:font-style-asian="normal" style:font-weight-asian="normal" style:font-name-complex="Consolas" style:font-size-complex="17pt" style:font-style-complex="normal" style:font-weight-complex="normal"/>
    </style:style>
    <style:style style:name="T27" style:family="text">
      <style:text-properties fo:font-variant="normal" fo:text-transform="none" fo:color="#008000"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style:style style:name="T28" style:family="text">
      <style:text-properties fo:font-variant="normal" fo:text-transform="none" fo:color="#000080"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style:style style:name="T29" style:family="text">
      <style:text-properties fo:font-variant="normal" fo:text-transform="none" fo:color="#000080" style:text-line-through-style="none" style:text-line-through-type="none" style:text-position="0% 100%" style:font-name="Consolas" fo:font-size="17pt" fo:letter-spacing="normal" fo:font-style="normal" style:text-underline-style="none" fo:font-weight="normal" style:font-name-asian="Consolas" style:font-size-asian="17pt" style:font-style-asian="normal" style:font-weight-asian="normal" style:font-name-complex="Consolas" style:font-size-complex="1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31" style:family="text">
      <style:text-properties fo:font-variant="normal" fo:text-transform="none" fo:color="#ff0000"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32" style:family="text">
      <style:text-properties fo:font-variant="normal" fo:text-transform="none" fo:color="#4f81bd"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35"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6" style:family="text">
      <style:text-properties fo:font-variant="normal" fo:text-transform="none" fo:color="#ff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8" style:family="text">
      <style:text-properties fo:font-variant="normal" fo:text-transform="none" fo:color="#ff99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41" style:family="text">
      <style:text-properties fo:font-variant="normal" fo:text-transform="none" fo:color="#ff99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bold" style:font-name-asian="Calibri" style:font-size-asian="17pt" style:font-style-asian="normal" style:font-weight-asian="bold" style:font-name-complex="Calibri" style:font-size-complex="17pt" style:font-style-complex="normal" style:font-weight-complex="bold"/>
    </style:style>
    <style:style style:name="T44"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alibri" fo:font-size="17pt" fo:letter-spacing="normal" fo:font-style="normal" style:text-underline-style="solid" style:text-underline-width="auto" style:text-underline-color="font-color" fo:font-weight="normal" style:font-name-asian="Calibri" style:font-size-asian="17pt" style:font-style-asian="normal" style:font-weight-asian="normal" style:font-name-complex="Calibri" style:font-size-complex="17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Arial" fo:color="#000000" fo:font-size="100%"/>
      </text:list-level-style-bullet>
      <text:list-level-style-number text:level="2" style:num-suffix="." style:num-format="a">
        <style:list-level-properties text:space-before="1.553cm" text:min-label-width="0.987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71cm" text:min-label-width="0.969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71cm" text:min-label-width="0.969cm"/>
        <style:text-properties style:font-name="Arial" fo:color="#000000" fo:font-size="100%"/>
      </text:list-level-style-bullet>
      <text:list-level-style-bullet text:level="3" text:bullet-char="■">
        <style:list-level-properties text:space-before="2.841cm" text:min-label-width="0.969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71cm" text:min-label-width="0.969cm"/>
        <style:text-properties style:font-name="Arial" fo:color="#000000" fo:font-size="100%"/>
      </text:list-level-style-bullet>
      <text:list-level-style-bullet text:level="3" text:bullet-char="■">
        <style:list-level-properties text:space-before="2.841cm" text:min-label-width="0.969cm"/>
        <style:text-properties style:font-name="Arial" fo:color="#000000" fo:font-size="100%"/>
      </text:list-level-style-bullet>
      <text:list-level-style-bullet text:level="4" text:bullet-char="●">
        <style:list-level-properties text:space-before="4.093cm" text:min-label-width="0.987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1.553cm" text:min-label-width="0.98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1.553cm" text:min-label-width="0.987cm"/>
        <style:text-properties style:font-name="Arial" fo:color="#000000" fo:font-size="100%"/>
      </text:list-level-style-bullet>
      <text:list-level-style-bullet text:level="2" text:bullet-char="–">
        <style:list-level-properties text:space-before="2.82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1.553cm" text:min-label-width="0.987cm"/>
        <style:text-properties fo:color="#000000" fo:font-size="100%"/>
      </text:list-level-style-number>
      <text:list-level-style-bullet text:level="2" text:bullet-char="–">
        <style:list-level-properties text:space-before="2.82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58cm" text:min-label-width="0.952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58cm" text:min-label-width="0.952cm"/>
        <style:text-properties style:font-name="Arial" fo:color="#000000" fo:font-size="100%"/>
      </text:list-level-style-bullet>
      <text:list-level-style-bullet text:level="4" text:bullet-char="–">
        <style:list-level-properties text:space-before="4.128cm" text:min-label-width="0.952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244cm" text:min-label-width="1.026cm"/>
        <style:text-properties fo:color="#000000" fo:font-size="100%"/>
      </text:list-level-style-number>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483cm" text:min-label-width="1.05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483cm" text:min-label-width="1.05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142cm" text:min-label-width="1.1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142cm" text:min-label-width="1.128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space-before="0.142cm" text:min-label-width="1.128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276cm" text:min-label-width="0.99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276cm" text:min-label-width="0.99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276cm" text:min-label-width="0.994cm"/>
        <style:text-properties style:font-name="Arial" fo:color="#000000" fo:font-size="100%"/>
      </text:list-level-style-bullet>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276cm" text:min-label-width="0.994cm"/>
        <style:text-properties fo:color="#000000" fo:font-size="100%"/>
      </text:list-level-style-number>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213cm" text:min-label-width="1.057cm"/>
        <style:text-properties style:font-name="Arial" fo:color="#4f81bd"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58cm" text:min-label-width="0.952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12cm" text:min-label-width="0.96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12cm" text:min-label-width="0.96cm"/>
        <style:text-properties style:font-name="Arial" fo:color="#000000" fo:font-size="100%"/>
      </text:list-level-style-bullet>
      <text:list-level-style-bullet text:level="5" text:bullet-char="»">
        <style:list-level-properties text:space-before="5.39cm" text:min-label-width="0.96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12cm" text:min-label-width="0.96cm"/>
        <style:text-properties style:font-name="Arial" fo:color="#000000" fo:font-size="100%"/>
      </text:list-level-style-bullet>
      <text:list-level-style-bullet text:level="5" text:bullet-char="»">
        <style:list-level-properties text:space-before="5.39cm" text:min-label-width="0.96cm"/>
        <style:text-properties style:font-name="Arial" fo:color="#000000" fo:font-size="100%"/>
      </text:list-level-style-bullet>
      <text:list-level-style-bullet text:level="6" text:bullet-char="•">
        <style:list-level-properties text:space-before="6.692cm" text:min-label-width="0.928cm"/>
        <style:text-properties style:font-name="Arial" fo:color="#000000" fo:font-size="9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12cm" text:min-label-width="0.96cm"/>
        <style:text-properties style:font-name="Arial" fo:color="#000000" fo:font-size="100%"/>
      </text:list-level-style-bullet>
      <text:list-level-style-bullet text:level="5" text:bullet-char="»">
        <style:list-level-properties text:space-before="5.39cm" text:min-label-width="0.96cm"/>
        <style:text-properties style:font-name="Arial" fo:color="#000000" fo:font-size="100%"/>
      </text:list-level-style-bullet>
      <text:list-level-style-bullet text:level="6" text:bullet-char="•">
        <style:list-level-properties text:space-before="6.692cm" text:min-label-width="0.928cm"/>
        <style:text-properties style:font-name="Arial" fo:color="#000000" fo:font-size="90%"/>
      </text:list-level-style-bullet>
      <text:list-level-style-bullet text:level="7" text:bullet-char="•">
        <style:list-level-properties text:space-before="7.962cm" text:min-label-width="0.928cm"/>
        <style:text-properties style:font-name="Arial" fo:color="#000000" fo:font-size="9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244cm" text:min-label-width="1.026cm"/>
        <style:text-properties style:font-name="Arial" fo:color="#000000" fo:font-size="100%"/>
      </text:list-level-style-bullet>
      <text:list-level-style-bullet text:level="2" text:bullet-char="–">
        <style:list-level-properties text:space-before="1.58cm" text:min-label-width="0.96cm"/>
        <style:text-properties style:font-name="Arial" fo:color="#000000" fo:font-size="100%"/>
      </text:list-level-style-bullet>
      <text:list-level-style-bullet text:level="3" text:bullet-char="•">
        <style:list-level-properties text:space-before="2.85cm" text:min-label-width="0.96cm"/>
        <style:text-properties style:font-name="Arial" fo:color="#000000" fo:font-size="100%"/>
      </text:list-level-style-bullet>
      <text:list-level-style-bullet text:level="4" text:bullet-char="–">
        <style:list-level-properties text:space-before="4.12cm" text:min-label-width="0.96cm"/>
        <style:text-properties style:font-name="Arial" fo:color="#000000" fo:font-size="100%"/>
      </text:list-level-style-bullet>
      <text:list-level-style-bullet text:level="5" text:bullet-char="»">
        <style:list-level-properties text:space-before="5.39cm" text:min-label-width="0.96cm"/>
        <style:text-properties style:font-name="Arial" fo:color="#000000" fo:font-size="100%"/>
      </text:list-level-style-bullet>
      <text:list-level-style-bullet text:level="6" text:bullet-char="•">
        <style:list-level-properties text:space-before="6.692cm" text:min-label-width="0.928cm"/>
        <style:text-properties style:font-name="Arial" fo:color="#000000" fo:font-size="90%"/>
      </text:list-level-style-bullet>
      <text:list-level-style-bullet text:level="7" text:bullet-char="•">
        <style:list-level-properties text:space-before="7.962cm" text:min-label-width="0.928cm"/>
        <style:text-properties style:font-name="Arial" fo:color="#000000" fo:font-size="90%"/>
      </text:list-level-style-bullet>
      <text:list-level-style-bullet text:level="8" text:bullet-char="•">
        <style:list-level-properties text:space-before="9.232cm" text:min-label-width="0.928cm"/>
        <style:text-properties style:font-name="Arial" fo:color="#000000" fo:font-size="90%"/>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0.283cm" text:min-label-width="0.987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283cm" text:min-label-width="0.98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number text:level="1" style:num-suffix="." style:num-format="1">
        <style:list-level-properties text:space-before="0.336cm" text:min-label-width="0.9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eb scraping" draw:style-name="dp1" draw:master-page-name="OBJECT" presentation:presentation-page-layout-name="AL1T11">
        <draw:frame draw:name="Google Shape;88;p13" presentation:style-name="pr1" draw:text-style-name="P2" draw:layer="layout" svg:width="22.859cm" svg:height="3.175cm" svg:x="0.972cm" svg:y="7.937cm" presentation:class="title" presentation:user-transformed="true">
          <draw:text-box>
            <text:p text:style-name="P1"><text:span text:style-name="T1">Web scraping</text:span></text:p>
          </draw:text-box>
        </draw:frame>
        <draw:frame draw:name="Google Shape;89;p13" presentation:style-name="pr2" draw:text-style-name="P5" draw:layer="layout" svg:width="14.857cm" svg:height="2.757cm" svg:x="1.27cm" svg:y="14.26cm" presentation:class="outline" presentation:user-transformed="true">
          <draw:text-box>
            <text:p text:style-name="P3"><text:span text:style-name="T2">Professor Leandro O. Freitas</text:span></text:p>
            <text:p text:style-name="P4"><text:span text:style-name="T2">leandro@politecnico.ufsm.br</text:span></text:p>
          </draw:text-box>
        </draw:frame>
        <draw:custom-shape draw:name="Google Shape;90;p13" draw:style-name="gr1" draw:text-style-name="P6" draw:layer="layout" svg:width="18.463cm" svg:height="3.399cm" svg:x="1.407cm" svg:y="0.289cm">
          <text:p text:style-name="P1"><text:span text:style-name="T1">Análise de dados e extração de conhec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3"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frame draw:name="Google Shape;85;g1dfd216856c_0_0:notes" presentation:style-name="pr4" draw:text-style-name="P9" draw:layer="layout" svg:width="15.239cm" svg:height="11.429cm" svg:x="1.905cm" svg:y="12.065cm" presentation:class="notes" presentation:placeholder="true" presentation:user-transformed="true">
            <draw:text-box/>
          </draw:frame>
          <draw:page-thumbnail draw:name="Google Shape;86;g1dfd216856c_0_0:notes" draw:style-name="gr2" draw:layer="layout" svg:width="12.7cm" svg:height="9.524cm" svg:x="3.176cm" svg:y="1.905cm" draw:page-number="1" presentation:class="page"/>
        </presentation:notes>
      </draw:page>
      <draw:page draw:name="Web scraping" draw:style-name="dp1" draw:master-page-name="OBJECT" presentation:presentation-page-layout-name="AL1T11">
        <draw:frame draw:name="Google Shape;96;p14" presentation:style-name="pr1" draw:text-style-name="P2" draw:layer="layout" svg:width="22.859cm" svg:height="3.175cm" svg:x="1.27cm" svg:y="0.763cm" presentation:class="title" presentation:user-transformed="true">
          <draw:text-box>
            <text:p text:style-name="P1"><text:span text:style-name="T1">Web scraping</text:span></text:p>
          </draw:text-box>
        </draw:frame>
        <draw:frame draw:name="Google Shape;97;p14" presentation:style-name="pr2" draw:text-style-name="P5" draw:layer="layout" svg:width="23.57cm" svg:height="12.572cm" svg:x="1.27cm" svg:y="4.445cm" presentation:class="outline" presentation:user-transformed="true">
          <draw:text-box>
            <text:list text:style-name="L5">
              <text:list-item>
                <text:p text:style-name="P10"><text:span text:style-name="T4">Permite coletar dados da Internet sem a utilização de um programa interagindo com uma API, sem utilizar um navegador web;</text:span></text:p>
              </text:list-item>
            </text:list>
            <text:list text:style-name="L6">
              <text:list-item>
                <text:list>
                  <text:list-item>
                    <text:p text:style-name="P10"><text:span text:style-name="T5">Script para coleta e </text:span><text:span text:style-name="T6">streaming </text:span><text:span text:style-name="T5">para um terminal ou armazenagem em banco de dados.</text:span></text:p>
                  </text:list-item>
                </text:list>
              </text:list-item>
            </text:list>
            <text:p text:style-name="P11"><text:span text:style-name="T4"/></text:p>
            <text:list text:continue-numbering="true" text:style-name="L6">
              <text:list-item>
                <text:p text:style-name="P12"><text:span text:style-name="T4">Pode envolver uma gama de técnicas de programação e tecnologias:</text:span></text:p>
                <text:list>
                  <text:list-item>
                    <text:p text:style-name="P12"><text:span text:style-name="T5">análise de dados, parsing de idiomas naturais, segurança, etc..</text:span></text:p>
                  </text:list-item>
                </text:list>
              </text:list-item>
            </text:list>
            <text:p text:style-name="P11"><text:span text:style-name="T4"/></text:p>
            <text:list text:continue-numbering="true" text:style-name="L6">
              <text:list-item>
                <text:p text:style-name="P12"><text:span text:style-name="T4">Questões:</text:span></text:p>
                <text:list>
                  <text:list-item>
                    <text:p text:style-name="P12"><text:span text:style-name="T5">Legal ou ilegal? </text:span><text:span text:style-name="T7">Legal!</text:span></text:p>
                  </text:list-item>
                  <text:list-item>
                    <text:p text:style-name="P12"><text:span text:style-name="T5">É possível lidar com JavaScript ou logins? </text:span><text:span text:style-name="T7">Sim.</text:span></text:p>
                  </text:list-item>
                  <text:list-item>
                    <text:p text:style-name="P12"><text:span text:style-name="T5">Web scraping é o mesmo que web crawling ou data mining? </text:span><text:span text:style-name="T7">Não.</text:span></text:p>
                  </text:list-item>
                </text:list>
              </text:list-item>
            </text:list>
          </draw:text-box>
        </draw:frame>
        <draw:frame draw:name="Google Shape;98;p14"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frame draw:name="Google Shape;93;g1dfd216856c_0_6:notes" presentation:style-name="pr5" draw:text-style-name="P9" draw:layer="layout" svg:width="15.239cm" svg:height="11.429cm" svg:x="1.905cm" svg:y="12.065cm" presentation:class="notes" presentation:placeholder="true" presentation:user-transformed="true">
            <draw:text-box/>
          </draw:frame>
          <draw:page-thumbnail draw:name="Google Shape;94;g1dfd216856c_0_6:notes" draw:style-name="gr2" draw:layer="layout" svg:width="12.7cm" svg:height="9.524cm" svg:x="3.176cm" svg:y="1.905cm" draw:page-number="2" presentation:class="page"/>
        </presentation:notes>
      </draw:page>
      <draw:page draw:name="Web scraping" draw:style-name="dp1" draw:master-page-name="OBJECT" presentation:presentation-page-layout-name="AL1T11">
        <draw:frame draw:name="Google Shape;103;p15" presentation:style-name="pr1" draw:text-style-name="P2" draw:layer="layout" svg:width="22.859cm" svg:height="3.175cm" svg:x="1.27cm" svg:y="0.763cm" presentation:class="title" presentation:user-transformed="true">
          <draw:text-box>
            <text:p text:style-name="P1"><text:span text:style-name="T1">Web scraping</text:span></text:p>
          </draw:text-box>
        </draw:frame>
        <draw:frame draw:name="Google Shape;104;p15" presentation:style-name="pr2" draw:text-style-name="P5" draw:layer="layout" svg:width="22.859cm" svg:height="12.572cm" svg:x="1.27cm" svg:y="4.364cm" presentation:class="outline" presentation:user-transformed="true">
          <draw:text-box>
            <text:list text:style-name="L5">
              <text:list-item>
                <text:p text:style-name="P10"><text:span text:style-name="T4">Envolve:</text:span></text:p>
              </text:list-item>
            </text:list>
            <text:list text:style-name="L8">
              <text:list-item>
                <text:list>
                  <text:list-item>
                    <text:p text:style-name="P10"><text:span text:style-name="T5">Construir programa automatizado para requisitar dados a um servidor web;</text:span></text:p>
                  </text:list-item>
                  <text:list-item>
                    <text:p text:style-name="P10"><text:span text:style-name="T5">Coletar um conjunto de dados estruturados (ou não!);</text:span></text:p>
                  </text:list-item>
                  <text:list-item>
                    <text:p text:style-name="P10"><text:span text:style-name="T5">Formatar e usar dados da forma adequada.</text:span></text:p>
                  </text:list-item>
                </text:list>
              </text:list-item>
            </text:list>
          </draw:text-box>
        </draw:frame>
        <draw:g draw:name="Google Shape;105;p15">
          <draw:custom-shape draw:name="Google Shape;106;p15" draw:style-name="gr3" draw:text-style-name="P6" draw:layer="layout" svg:width="2.597cm" svg:height="2.597cm" svg:x="5.816cm" svg:y="13.114cm">
            <text:p text:style-name="P1"><text:span text:style-name="T8">Script pyth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7;p15" draw:style-name="gr4" draw:text-style-name="P13" draw:layer="layout" svg:width="2.321cm" svg:height="2.597cm" svg:x="13.079cm" svg:y="14.787cm">
            <draw:image xlink:href="Pictures/10000201000001BF000001F48087D8F36F777715.png" xlink:type="simple" xlink:show="embed" xlink:actuate="onLoad">
              <text:p/>
            </draw:image>
          </draw:frame>
          <draw:frame draw:name="Google Shape;108;p15" draw:style-name="gr4" draw:text-style-name="P13" draw:layer="layout" svg:width="3.012cm" svg:height="3.012cm" svg:x="10.624cm" svg:y="9.525cm">
            <draw:image xlink:href="Pictures/100002010000025800000258255D76E2125C05E9.png" xlink:type="simple" xlink:show="embed" xlink:actuate="onLoad">
              <text:p/>
            </draw:image>
          </draw:frame>
          <draw:custom-shape draw:name="Google Shape;109;p15" draw:style-name="gr5" draw:text-style-name="P13" draw:layer="layout" svg:width="3.507cm" svg:height="2.082cm" draw:transform="rotate (-3.14159265358979) translate (10.621cm 13.114cm)">
            <text:p/>
            <draw:enhanced-geometry draw:mirror-horizontal="true" draw:mirror-vertical="false" svg:viewBox="0 0 21600 21600" draw:type="mso-spt32" draw:enhanced-path="M 0 0 L 21600 21600 N"/>
          </draw:custom-shape>
          <draw:custom-shape draw:name="Google Shape;110;p15" draw:style-name="gr5" draw:text-style-name="P13" draw:layer="layout" svg:width="2.353cm" svg:height="1.271cm" svg:x="8.557cm" svg:y="12.475cm">
            <text:p/>
            <draw:enhanced-geometry draw:mirror-horizontal="true" draw:mirror-vertical="false" svg:viewBox="0 0 21600 21600" draw:type="mso-spt32" draw:enhanced-path="M 0 0 L 21600 21600 N"/>
          </draw:custom-shape>
          <draw:custom-shape draw:name="Google Shape;111;p15" draw:style-name="gr5" draw:text-style-name="P13" draw:layer="layout" svg:width="4.665cm" svg:height="1.672cm" svg:x="8.414cm" svg:y="14.413cm">
            <text:p/>
            <draw:enhanced-geometry draw:mirror-horizontal="false" draw:mirror-vertical="false" svg:viewBox="0 0 21600 21600" draw:type="mso-spt32" draw:enhanced-path="M 0 0 L 21600 21600 N"/>
          </draw:custom-shape>
          <draw:custom-shape draw:name="Google Shape;112;p15" draw:style-name="gr6" draw:text-style-name="P6" draw:layer="layout" svg:width="5.772cm" svg:height="4.565cm" svg:x="8.17cm" svg:y="11.031cm">
            <text:p text:style-name="P12"><text:span text:style-name="T9">a</text:span></text:p>
            <text:p text:style-name="P12"><text:span text:style-name="T9"/></text:p>
            <text:p text:style-name="P12"><text:span text:style-name="T9"><text:s text:c="7"/></text:span><text:span text:style-name="T9">b</text:span></text:p>
            <text:p text:style-name="P12"><text:span text:style-name="T9"/></text:p>
            <text:p text:style-name="P12"><text:span text:style-name="T9"/></text:p>
            <text:p text:style-name="P12"><text:span text:style-name="T9"><text:tab/></text:span><text:span text:style-name="T9"><text:tab/></text:span><text:span text:style-name="T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3;p15"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00;g1e0084a393f_0_2:notes" draw:style-name="gr2" draw:layer="layout" svg:width="12.699cm" svg:height="9.524cm" svg:x="3.176cm" svg:y="1.905cm" draw:page-number="3" presentation:class="page"/>
          <draw:frame draw:name="Google Shape;101;g1e0084a393f_0_2:notes" presentation:style-name="pr6" draw:text-style-name="P9" draw:layer="layout" svg:width="15.239cm" svg:height="11.429cm" svg:x="1.905cm" svg:y="12.065cm" presentation:class="notes" presentation:placeholder="true" presentation:user-transformed="true">
            <draw:text-box/>
          </draw:frame>
        </presentation:notes>
      </draw:page>
      <draw:page draw:name="Web scraping" draw:style-name="dp1" draw:master-page-name="OBJECT" presentation:presentation-page-layout-name="AL1T11">
        <draw:frame draw:name="Google Shape;118;p16" presentation:style-name="pr1" draw:text-style-name="P2" draw:layer="layout" svg:width="22.859cm" svg:height="3.175cm" svg:x="1.27cm" svg:y="0.763cm" presentation:class="title" presentation:user-transformed="true">
          <draw:text-box>
            <text:p text:style-name="P1"><text:span text:style-name="T1">Web scraping</text:span></text:p>
          </draw:text-box>
        </draw:frame>
        <draw:frame draw:name="Google Shape;119;p16" presentation:style-name="pr2" draw:text-style-name="P5" draw:layer="layout" svg:width="22.859cm" svg:height="12.572cm" svg:x="1.27cm" svg:y="4.445cm" presentation:class="outline" presentation:user-transformed="true">
          <draw:text-box>
            <text:list text:style-name="L10">
              <text:list-item>
                <text:p text:style-name="P14"><text:span text:style-name="T4">Por que não usar uma API?</text:span></text:p>
              </text:list-item>
            </text:list>
            <text:list text:style-name="L11">
              <text:list-item>
                <text:list>
                  <text:list-item>
                    <text:p text:style-name="P10"><text:span text:style-name="T5">Inexistência de API para o conjunto de dados que estamos buscando:</text:span></text:p>
                  </text:list-item>
                </text:list>
              </text:list-item>
            </text:list>
            <text:list text:style-name="L12">
              <text:list-item>
                <text:list>
                  <text:list-item>
                    <text:list>
                      <text:list-item>
                        <text:p text:style-name="P10"><text:span text:style-name="T5">Pequenas ou poucas informações dentro de um conjunto grande de dados;</text:span></text:p>
                      </text:list-item>
                      <text:list-item>
                        <text:p text:style-name="P10"><text:span text:style-name="T5">Desenvolvedores de APIs não focaram no nosso problema (desinteresse, poucos dados ou incomuns);</text:span></text:p>
                      </text:list-item>
                      <text:list-item>
                        <text:p text:style-name="P10"><text:span text:style-name="T5">Falta de infraestrutura ou habilidade técnica dos fornecedores de dados;</text:span></text:p>
                      </text:list-item>
                    </text:list>
                  </text:list-item>
                  <text:list-item>
                    <text:p text:style-name="P10"><text:span text:style-name="T5">Dados protegidos que não podem ser amplamente disseminados.</text:span></text:p>
                  </text:list-item>
                </text:list>
              </text:list-item>
            </text:list>
            <text:p text:style-name="P15"><text:span text:style-name="T4"/></text:p>
          </draw:text-box>
        </draw:frame>
        <draw:frame draw:name="Google Shape;120;p16"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15;g1e0084a393f_0_22:notes" draw:style-name="gr2" draw:layer="layout" svg:width="12.699cm" svg:height="9.524cm" svg:x="3.176cm" svg:y="1.905cm" draw:page-number="4" presentation:class="page"/>
          <draw:frame draw:name="Google Shape;116;g1e0084a393f_0_22:notes" presentation:style-name="pr7" draw:text-style-name="P9" draw:layer="layout" svg:width="15.239cm" svg:height="11.429cm" svg:x="1.905cm" svg:y="12.065cm" presentation:class="notes" presentation:placeholder="true" presentation:user-transformed="true">
            <draw:text-box/>
          </draw:frame>
        </presentation:notes>
      </draw:page>
      <draw:page draw:name="Web scraping" draw:style-name="dp1" draw:master-page-name="OBJECT" presentation:presentation-page-layout-name="AL1T11">
        <draw:frame draw:name="Google Shape;125;p17" presentation:style-name="pr1" draw:text-style-name="P2" draw:layer="layout" svg:width="22.859cm" svg:height="3.175cm" svg:x="1.27cm" svg:y="0.763cm" presentation:class="title" presentation:user-transformed="true">
          <draw:text-box>
            <text:p text:style-name="P1"><text:span text:style-name="T1">Web scraping</text:span></text:p>
          </draw:text-box>
        </draw:frame>
        <draw:frame draw:name="Google Shape;126;p17" presentation:style-name="pr2" draw:text-style-name="P5" draw:layer="layout" svg:width="22.859cm" svg:height="12.572cm" svg:x="1.27cm" svg:y="4.445cm" presentation:class="outline" presentation:user-transformed="true">
          <draw:text-box>
            <text:list text:style-name="L10">
              <text:list-item>
                <text:p text:style-name="P14"><text:span text:style-name="T4">Por que utilizar?</text:span></text:p>
              </text:list-item>
            </text:list>
            <text:list text:style-name="L11">
              <text:list-item>
                <text:list>
                  <text:list-item>
                    <text:p text:style-name="P10"><text:span text:style-name="T5">Permite coletar e processar grandes volumes de dados rapidamente;</text:span></text:p>
                  </text:list-item>
                </text:list>
              </text:list-item>
            </text:list>
            <text:p text:style-name="P16"><text:span text:style-name="T4"/></text:p>
            <text:list text:style-name="L14">
              <text:list-item>
                <text:list>
                  <text:list-item>
                    <text:p text:style-name="P17"><text:span text:style-name="T5">Permite visualizar bancos de dados que se estendem por um grande conjunto de páginas de uma só vez, ao invés de visualizar uma página bem formatada por vez na janela do navegador;</text:span></text:p>
                  </text:list-item>
                </text:list>
              </text:list-item>
            </text:list>
            <text:p text:style-name="P16"><text:span text:style-name="T4"/></text:p>
            <text:list text:continue-numbering="true" text:style-name="L14">
              <text:list-item>
                <text:list>
                  <text:list-item>
                    <text:p text:style-name="P17"><text:span text:style-name="T5">Permite acessar conteúdo que ferramentas de pesquisa tradicionais não conseguem. Exemplo: preços de voos para SP:</text:span></text:p>
                  </text:list-item>
                </text:list>
              </text:list-item>
            </text:list>
            <text:list text:style-name="L13">
              <text:list-item>
                <text:list>
                  <text:list-item>
                    <text:list>
                      <text:list-item>
                        <text:p text:style-name="P12"><text:span text:style-name="T5">A busca tradicional traz muito “lixo”, conteúdo desnecessário, anúncios, etc.;</text:span></text:p>
                      </text:list-item>
                      <text:list-item>
                        <text:p text:style-name="P12"><text:span text:style-name="T5">Web scraping possibilita, por exemplo, a criação de um gráfico de preços ao longo de um período.</text:span></text:p>
                      </text:list-item>
                    </text:list>
                  </text:list-item>
                </text:list>
              </text:list-item>
            </text:list>
          </draw:text-box>
        </draw:frame>
        <draw:frame draw:name="Google Shape;127;p17"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22;g1e0084a393f_0_17:notes" draw:style-name="gr2" draw:layer="layout" svg:width="12.699cm" svg:height="9.524cm" svg:x="3.176cm" svg:y="1.905cm" draw:page-number="5" presentation:class="page"/>
          <draw:frame draw:name="Google Shape;123;g1e0084a393f_0_17:notes" presentation:style-name="pr8" draw:text-style-name="P9" draw:layer="layout" svg:width="15.239cm" svg:height="11.429cm" svg:x="1.905cm" svg:y="12.065cm" presentation:class="notes" presentation:placeholder="true" presentation:user-transformed="true">
            <draw:text-box/>
          </draw:frame>
        </presentation:notes>
      </draw:page>
      <draw:page draw:name="Web scraping" draw:style-name="dp1" draw:master-page-name="OBJECT" presentation:presentation-page-layout-name="AL1T11">
        <draw:frame draw:name="Google Shape;132;p18" presentation:style-name="pr1" draw:text-style-name="P2" draw:layer="layout" svg:width="22.859cm" svg:height="3.175cm" svg:x="1.27cm" svg:y="0.763cm" presentation:class="title" presentation:user-transformed="true">
          <draw:text-box>
            <text:p text:style-name="P1"><text:span text:style-name="T1">Web scraping</text:span></text:p>
          </draw:text-box>
        </draw:frame>
        <draw:frame draw:name="Google Shape;133;p18" presentation:style-name="pr2" draw:text-style-name="P5" draw:layer="layout" svg:width="23.787cm" svg:height="12.572cm" svg:x="1.27cm" svg:y="4.445cm" presentation:class="outline" presentation:user-transformed="true">
          <draw:text-box>
            <text:list text:style-name="L10">
              <text:list-item>
                <text:p text:style-name="P14"><text:span text:style-name="T4">Por que utilizar?</text:span></text:p>
              </text:list-item>
            </text:list>
            <text:list text:style-name="L15">
              <text:list-item>
                <text:list>
                  <text:list-item>
                    <text:p text:style-name="P10"><text:span text:style-name="T10">Se é possível </text:span><text:span text:style-name="T11">visualizar dados</text:span><text:span text:style-name="T10"> de um site via navegador, será possível </text:span><text:span text:style-name="T11">acessá-los </text:span><text:span text:style-name="T10">via script python;</text:span></text:p>
                  </text:list-item>
                </text:list>
              </text:list-item>
            </text:list>
            <text:list text:style-name="L16">
              <text:list-item>
                <text:list>
                  <text:list-item>
                    <text:list>
                      <text:list-item>
                        <text:p text:style-name="P10"><text:span text:style-name="T10">Se é possível </text:span><text:span text:style-name="T11">acessar via script</text:span><text:span text:style-name="T10">, é possível </text:span><text:span text:style-name="T11">armazenar</text:span><text:span text:style-name="T10"> em um banco de dados ou outra forma; </text:span></text:p>
                      </text:list-item>
                    </text:list>
                  </text:list-item>
                </text:list>
              </text:list-item>
            </text:list>
            <text:list text:style-name="L17">
              <text:list-item>
                <text:list>
                  <text:list-item>
                    <text:list>
                      <text:list-item>
                        <text:list>
                          <text:list-item>
                            <text:p text:style-name="P10"><text:span text:style-name="T10">Se é possível</text:span><text:span text:style-name="T11"> armazenar</text:span><text:span text:style-name="T10"> em um banco de dados, então pode-se fazer praticamente TUDO (dentro da legalidade, obviamente :) )!</text:span><text:span text:style-name="T5"> </text:span></text:p>
                          </text:list-item>
                        </text:list>
                      </text:list-item>
                    </text:list>
                  </text:list-item>
                </text:list>
              </text:list-item>
            </text:list>
          </draw:text-box>
        </draw:frame>
        <draw:custom-shape draw:name="Google Shape;134;p18" draw:style-name="gr6" draw:text-style-name="P6" draw:layer="layout" svg:width="12.717cm" svg:height="0.932cm" svg:x="10.31cm" svg:y="18.217cm">
          <text:p text:style-name="P12"><text:span text:style-name="T12">https://www.webharvy.com/articles/web-scraper-use-cases.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18" draw:style-name="gr4" draw:text-style-name="P13" draw:layer="layout" svg:width="8.514cm" svg:height="7.275cm" svg:x="11.215cm" svg:y="10.942cm">
          <draw:image xlink:href="Pictures/10000201000001E10000019BE013A7E2E05F7A93.png" xlink:type="simple" xlink:show="embed" xlink:actuate="onLoad">
            <text:p/>
          </draw:image>
        </draw:frame>
        <draw:frame draw:name="Google Shape;136;p18"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29;g1e0084a393f_0_27:notes" draw:style-name="gr2" draw:layer="layout" svg:width="12.699cm" svg:height="9.524cm" svg:x="3.176cm" svg:y="1.905cm" draw:page-number="6" presentation:class="page"/>
          <draw:frame draw:name="Google Shape;130;g1e0084a393f_0_27:notes" presentation:style-name="pr9" draw:text-style-name="P9" draw:layer="layout" svg:width="15.239cm" svg:height="11.429cm" svg:x="1.905cm" svg:y="12.065cm" presentation:class="notes" presentation:placeholder="true" presentation:user-transformed="true">
            <draw:text-box/>
          </draw:frame>
        </presentation:notes>
      </draw:page>
      <draw:page draw:name="Estrutura de web scraper" draw:style-name="dp1" draw:master-page-name="OBJECT" presentation:presentation-page-layout-name="AL1T11">
        <draw:frame draw:name="Google Shape;141;p19" presentation:style-name="pr1" draw:text-style-name="P2" draw:layer="layout" svg:width="22.859cm" svg:height="3.175cm" svg:x="1.27cm" svg:y="0.763cm" presentation:class="title" presentation:user-transformed="true">
          <draw:text-box>
            <text:p text:style-name="P1"><text:span text:style-name="T1">Estrutura de web scraper</text:span></text:p>
          </draw:text-box>
        </draw:frame>
        <draw:frame draw:name="Google Shape;142;p19" presentation:style-name="pr2" draw:text-style-name="P5" draw:layer="layout" svg:width="23.946cm" svg:height="13.87cm" svg:x="1.27cm" svg:y="4.445cm" presentation:class="outline" presentation:user-transformed="true">
          <draw:text-box>
            <text:list text:style-name="L5">
              <text:list-item>
                <text:p text:style-name="P14"><text:span text:style-name="T4">Obter dados HTML de um domínio;</text:span></text:p>
              </text:list-item>
              <text:list-item>
                <text:p text:style-name="P10"><text:span text:style-name="T4">Fazer </text:span><text:span text:style-name="T13">parse</text:span><text:span text:style-name="T4"> desses dados a procura de informações relevantes;</text:span></text:p>
              </text:list-item>
              <text:list-item>
                <text:p text:style-name="P10"><text:span text:style-name="T4">Armazenar essas informações;</text:span></text:p>
              </text:list-item>
              <text:list-item>
                <text:p text:style-name="P10"><text:span text:style-name="T4">Passar para outra página e repetir o processo (se necessário);</text:span></text:p>
              </text:list-item>
            </text:list>
            <text:p text:style-name="P15"><text:span text:style-name="T4"/></text:p>
            <text:list text:continue-numbering="true" text:style-name="L5">
              <text:list-item>
                <text:p text:style-name="P18"><text:span text:style-name="T4">Utilização da web sem a camada de formatação e estilização. </text:span><text:span text:style-name="T14">E sem navegador</text:span><text:span text:style-name="T4">;</text:span></text:p>
              </text:list-item>
            </text:list>
            <text:p text:style-name="P15"><text:span text:style-name="T4"/></text:p>
            <text:list text:continue-numbering="true" text:style-name="L5">
              <text:list-item>
                <text:p text:style-name="P18"><text:span text:style-name="T4">Criação de web scraper:</text:span></text:p>
              </text:list-item>
            </text:list>
            <text:list text:style-name="L6">
              <text:list-item>
                <text:list>
                  <text:list-item>
                    <text:p text:style-name="P12"><text:span text:style-name="T5">Enviar uma requisição para um servidor web;</text:span></text:p>
                  </text:list-item>
                  <text:list-item>
                    <text:p text:style-name="P12"><text:span text:style-name="T5">Ler a saída HTML dessa página;</text:span></text:p>
                  </text:list-item>
                  <text:list-item>
                    <text:p text:style-name="P12"><text:span text:style-name="T5">Fazer uma extração simples de dados para isolar o conteúdo desejado.</text:span></text:p>
                  </text:list-item>
                </text:list>
              </text:list-item>
            </text:list>
          </draw:text-box>
        </draw:frame>
        <draw:frame draw:name="Google Shape;143;p19"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draw:g draw:name="Google Shape;144;p19">
          <draw:custom-shape draw:name="Google Shape;145;p19" draw:style-name="gr7" draw:text-style-name="P6" draw:layer="layout" svg:width="1.349cm" svg:height="1.349cm" svg:x="19.02cm" svg:y="13.646cm">
            <text:p text:style-name="P1"><text:span text:style-name="T15">Script pyth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6;p19" draw:style-name="gr4" draw:text-style-name="P13" draw:layer="layout" svg:width="1.206cm" svg:height="1.349cm" svg:x="22.796cm" svg:y="14.516cm">
            <draw:image xlink:href="Pictures/10000201000001BF000001F48087D8F36F777715.png" xlink:type="simple" xlink:show="embed" xlink:actuate="onLoad">
              <text:p/>
            </draw:image>
          </draw:frame>
          <draw:frame draw:name="Google Shape;147;p19" draw:style-name="gr4" draw:text-style-name="P13" draw:layer="layout" svg:width="1.565cm" svg:height="1.565cm" svg:x="21.519cm" svg:y="11.78cm">
            <draw:image xlink:href="Pictures/100002010000025800000258255D76E2125C05E9.png" xlink:type="simple" xlink:show="embed" xlink:actuate="onLoad">
              <text:p/>
            </draw:image>
          </draw:frame>
          <draw:custom-shape draw:name="Google Shape;148;p19" draw:style-name="gr8" draw:text-style-name="P13" draw:layer="layout" svg:width="1.823cm" svg:height="1.082cm" draw:transform="rotate (-3.14159265358979) translate (21.517cm 13.646cm)">
            <text:p/>
            <draw:enhanced-geometry draw:mirror-horizontal="true" draw:mirror-vertical="false" svg:viewBox="0 0 21600 21600" draw:type="mso-spt32" draw:enhanced-path="M 0 0 L 21600 21600 N"/>
          </draw:custom-shape>
          <draw:custom-shape draw:name="Google Shape;149;p19" draw:style-name="gr8" draw:text-style-name="P13" draw:layer="layout" svg:width="1.223cm" svg:height="0.66cm" svg:x="20.444cm" svg:y="13.313cm">
            <text:p/>
            <draw:enhanced-geometry draw:mirror-horizontal="true" draw:mirror-vertical="false" svg:viewBox="0 0 21600 21600" draw:type="mso-spt32" draw:enhanced-path="M 0 0 L 21600 21600 N"/>
          </draw:custom-shape>
          <draw:custom-shape draw:name="Google Shape;150;p19" draw:style-name="gr8" draw:text-style-name="P13" draw:layer="layout" svg:width="2.425cm" svg:height="0.869cm" svg:x="20.371cm" svg:y="14.321cm">
            <text:p/>
            <draw:enhanced-geometry draw:mirror-horizontal="false" draw:mirror-vertical="false" svg:viewBox="0 0 21600 21600" draw:type="mso-spt32" draw:enhanced-path="M 0 0 L 21600 21600 N"/>
          </draw:custom-shape>
        </draw:g>
        <presentation:notes draw:style-name="dp2">
          <draw:page-thumbnail draw:name="Google Shape;138;g1e0b3e9e199_0_0:notes" draw:style-name="gr2" draw:layer="layout" svg:width="12.699cm" svg:height="9.524cm" svg:x="3.176cm" svg:y="1.905cm" draw:page-number="7" presentation:class="page"/>
          <draw:frame draw:name="Google Shape;139;g1e0b3e9e199_0_0:notes" presentation:style-name="pr10" draw:text-style-name="P9" draw:layer="layout" svg:width="15.239cm" svg:height="11.429cm" svg:x="1.905cm" svg:y="12.065cm" presentation:class="notes" presentation:placeholder="true" presentation:user-transformed="true">
            <draw:text-box/>
          </draw:frame>
        </presentation:notes>
      </draw:page>
      <draw:page draw:name="Conexão" draw:style-name="dp1" draw:master-page-name="OBJECT" presentation:presentation-page-layout-name="AL1T11">
        <draw:frame draw:name="Google Shape;155;p20" presentation:style-name="pr1" draw:text-style-name="P2" draw:layer="layout" svg:width="22.859cm" svg:height="3.175cm" svg:x="1.27cm" svg:y="0.763cm" presentation:class="title" presentation:user-transformed="true">
          <draw:text-box>
            <text:p text:style-name="P1"><text:span text:style-name="T1">Conexão</text:span></text:p>
          </draw:text-box>
        </draw:frame>
        <draw:frame draw:name="Google Shape;156;p20" presentation:style-name="pr2" draw:text-style-name="P5" draw:layer="layout" svg:width="23.338cm" svg:height="10.357cm" svg:x="1.27cm" svg:y="4.445cm" presentation:class="outline" presentation:user-transformed="true">
          <draw:text-box>
            <text:list text:style-name="L5">
              <text:list-item>
                <text:p text:style-name="P14"><text:span text:style-name="T4">Web scraping exige abrir mão da forma como o navegador de internet interpreta códigos HTML, CSS e JavaScript;</text:span></text:p>
              </text:list-item>
            </text:list>
            <text:p text:style-name="P15"><text:span text:style-name="T4"/></text:p>
            <text:list text:continue-numbering="true" text:style-name="L5">
              <text:list-item>
                <text:p text:style-name="P18"><text:span text:style-name="T4">Navegadores interpretam dados recebidos na forma de imagens, textos, vídeos e áudios;</text:span></text:p>
              </text:list-item>
            </text:list>
            <text:p text:style-name="P15"><text:span text:style-name="T4"/></text:p>
            <text:list text:continue-numbering="true" text:style-name="L5">
              <text:list-item>
                <text:p text:style-name="P18"><text:span text:style-name="T4">Navegadores solicitam ao SO o envio de dados para aplicações que tratam suas interfaces. MAS, também é possível fazer isso com 3 linhas de código:</text:span></text:p>
              </text:list-item>
            </text:list>
          </draw:text-box>
        </draw:frame>
        <draw:custom-shape draw:name="Google Shape;157;p20" draw:style-name="gr6" draw:text-style-name="P6" draw:layer="layout" svg:width="19.583cm" svg:height="2.877cm" svg:x="3.148cm" svg:y="14.536cm">
          <text:p text:style-name="P12"><text:span text:style-name="T16">from urllib.request import urlopen</text:span></text:p>
          <text:p text:style-name="P12"><text:span text:style-name="T16"/></text:p>
          <text:p text:style-name="P12"><text:span text:style-name="T16">html = urlopen(“http://pythonscraping.com/pages/page1.html”)</text:span></text:p>
          <text:p text:style-name="P12"><text:span text:style-name="T16">print(html.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8;p20"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52;g1e0b3e9e199_0_10:notes" draw:style-name="gr2" draw:layer="layout" svg:width="12.699cm" svg:height="9.524cm" svg:x="3.176cm" svg:y="1.905cm" draw:page-number="8" presentation:class="page"/>
          <draw:frame draw:name="Google Shape;153;g1e0b3e9e199_0_10:notes" presentation:style-name="pr11" draw:text-style-name="P9" draw:layer="layout" svg:width="15.239cm" svg:height="11.429cm" svg:x="1.905cm" svg:y="12.065cm" presentation:class="notes" presentation:placeholder="true" presentation:user-transformed="true">
            <draw:text-box/>
          </draw:frame>
        </presentation:notes>
      </draw:page>
      <draw:page draw:name="Conexão" draw:style-name="dp1" draw:master-page-name="OBJECT" presentation:presentation-page-layout-name="AL1T11">
        <draw:frame draw:name="Google Shape;163;p21" presentation:style-name="pr1" draw:text-style-name="P2" draw:layer="layout" svg:width="22.859cm" svg:height="3.175cm" svg:x="1.27cm" svg:y="0.763cm" presentation:class="title" presentation:user-transformed="true">
          <draw:text-box>
            <text:p text:style-name="P1"><text:span text:style-name="T1">Conexão</text:span></text:p>
          </draw:text-box>
        </draw:frame>
        <draw:frame draw:name="Google Shape;164;p21" presentation:style-name="pr2" draw:text-style-name="P5" draw:layer="layout" svg:width="22.859cm" svg:height="2.827cm" svg:x="1.27cm" svg:y="4.445cm" presentation:class="outline" presentation:user-transformed="true">
          <draw:text-box>
            <text:list text:style-name="L5">
              <text:list-item>
                <text:p text:style-name="P14"><text:span text:style-name="T4">O que será exibido?</text:span></text:p>
              </text:list-item>
            </text:list>
            <text:p text:style-name="P15"><text:span text:style-name="T4"/></text:p>
          </draw:text-box>
        </draw:frame>
        <draw:frame draw:name="Google Shape;165;p21" presentation:style-name="pr2" draw:text-style-name="P5" draw:layer="layout" svg:width="22.859cm" svg:height="10.562cm" svg:x="1.27cm" svg:y="5.758cm" presentation:class="outline" presentation:user-transformed="true">
          <draw:text-box>
            <text:list text:style-name="L19">
              <text:list-item>
                <text:p text:style-name="P14"><text:span text:style-name="T5">O </text:span><text:span text:style-name="T17">arquivo</text:span><text:span text:style-name="T5"> HTML </text:span><text:span text:style-name="T18">page1.html</text:span><text:span text:style-name="T5">, localizado no diretório </text:span><text:span text:style-name="T18">/pages</text:span><text:span text:style-name="T5"> no servidor do domínio </text:span><text:span text:style-name="T18">http://pythonscraping.com</text:span><text:span text:style-name="T6">;</text:span></text:p>
              </text:list-item>
              <text:list-item>
                <text:p text:style-name="P10"><text:span text:style-name="T5">Devemos pensar nos endereços como arquivos ao invés de páginas:</text:span></text:p>
              </text:list-item>
            </text:list>
            <text:list text:style-name="L20">
              <text:list-item>
                <text:list>
                  <text:list-item>
                    <text:p text:style-name="P10"><text:span text:style-name="T5">Uma página pode conter muitos arquivos associados a elas (imagens, JavaScript, CSS, etc.);</text:span></text:p>
                  </text:list-item>
                  <text:list-item>
                    <text:p text:style-name="P10"><text:span text:style-name="T5">Quando um navegador encontra uma tag de imagem ele sabe que deve fazer uma nova requisição ao servidor para obter dados referentes a ela. &lt;img src=”imagemAleatoria.jpg”&gt;</text:span></text:p>
                  </text:list-item>
                  <text:list-item>
                    <text:p text:style-name="P10"><text:span text:style-name="T5">urllib¹: biblioteca padrão, contém funções de requisição de dados, tratamento de cookies entre outras funcionalidades.</text:span></text:p>
                  </text:list-item>
                </text:list>
              </text:list-item>
            </text:list>
            <text:p text:style-name="P15"><text:span text:style-name="T4"/></text:p>
          </draw:text-box>
        </draw:frame>
        <draw:custom-shape draw:name="Google Shape;166;p21" draw:style-name="gr6" draw:text-style-name="P6" draw:layer="layout" svg:width="19.583cm" svg:height="2.877cm" svg:x="4.414cm" svg:y="14.763cm">
          <text:p text:style-name="P12"><text:span text:style-name="T16">from urllib.request import urlopen</text:span></text:p>
          <text:p text:style-name="P12"><text:span text:style-name="T16"/></text:p>
          <text:p text:style-name="P12"><text:span text:style-name="T16">html = urlopen(“http://pythonscraping.com/pages/page1.html”)</text:span></text:p>
          <text:p text:style-name="P12"><text:span text:style-name="T16">print(html.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1" draw:style-name="gr6" draw:text-style-name="P6" draw:layer="layout" svg:width="14.688cm" svg:height="1.016cm" svg:x="2.958cm" svg:y="17.925cm">
          <text:p text:style-name="P12"><text:span text:style-name="T19">¹ https://docs.python.org/3/library/urllib.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1"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60;g1e0ebf60e75_0_9:notes" draw:style-name="gr2" draw:layer="layout" svg:width="12.699cm" svg:height="9.524cm" svg:x="3.176cm" svg:y="1.905cm" draw:page-number="9" presentation:class="page"/>
          <draw:frame draw:name="Google Shape;161;g1e0ebf60e75_0_9:notes" presentation:style-name="pr12" draw:text-style-name="P9" draw:layer="layout" svg:width="15.239cm" svg:height="11.429cm" svg:x="1.905cm" svg:y="12.065cm" presentation:class="notes" presentation:placeholder="true" presentation:user-transformed="true">
            <draw:text-box/>
          </draw:frame>
        </presentation:notes>
      </draw:page>
      <draw:page draw:name="BeautifulSoup (BS4)" draw:style-name="dp1" draw:master-page-name="OBJECT" presentation:presentation-page-layout-name="AL1T11">
        <draw:frame draw:name="Google Shape;173;p22" presentation:style-name="pr1" draw:text-style-name="P2" draw:layer="layout" svg:width="22.859cm" svg:height="3.175cm" svg:x="1.27cm" svg:y="0.763cm" presentation:class="title" presentation:user-transformed="true">
          <draw:text-box>
            <text:p text:style-name="P1"><text:span text:style-name="T1">BeautifulSoup (BS4)</text:span></text:p>
          </draw:text-box>
        </draw:frame>
        <draw:frame draw:name="Google Shape;174;p22" presentation:style-name="pr2" draw:text-style-name="P5" draw:layer="layout" svg:width="22.859cm" svg:height="12.572cm" svg:x="1.27cm" svg:y="4.445cm" presentation:class="outline" presentation:user-transformed="true">
          <draw:text-box>
            <text:list text:style-name="L5">
              <text:list-item>
                <text:p text:style-name="P14"><text:span text:style-name="T4">Biblioteca para formatação e organização de páginas web;</text:span></text:p>
              </text:list-item>
              <text:list-item>
                <text:p text:style-name="P10"><text:span text:style-name="T4">Permite corrigir dados mal formatados e apresentar objetos python que podem ser percorridos;</text:span></text:p>
              </text:list-item>
            </text:list>
            <text:p text:style-name="P15"><text:span text:style-name="T4"/></text:p>
            <text:list text:continue-numbering="true" text:style-name="L5">
              <text:list-item>
                <text:p text:style-name="P18"><text:span text:style-name="T4">Não é uma biblioteca padrão, portanto, deve ser instalada;</text:span></text:p>
              </text:list-item>
            </text:list>
            <text:list text:style-name="L6">
              <text:list-item>
                <text:list>
                  <text:list-item>
                    <text:p text:style-name="P12"><text:span text:style-name="T5">Abrir o terminal do pycharm e inserir o comando:</text:span></text:p>
                  </text:list-item>
                </text:list>
              </text:list-item>
            </text:list>
            <text:list text:style-name="L22">
              <text:list-item>
                <text:list>
                  <text:list-item>
                    <text:list>
                      <text:list-item>
                        <text:p text:style-name="P12"><text:span text:style-name="T5">pip install </text:span><text:span text:style-name="T7">beatifulsoup4</text:span></text:p>
                      </text:list-item>
                      <text:list-item>
                        <text:p text:style-name="P12"><text:span text:style-name="T5">Dúvidas sobre instalação de bibliotecas? Clique </text:span><text:span text:style-name="T20"><text:a xlink:href="https://www.jetbrains.com/help/pycharm/installing-uninstalling-and-upgrading-packages.html#packages-tool-window" xlink:type="simple">aqui</text:a></text:span><text:span text:style-name="T5">;</text:span></text:p>
                      </text:list-item>
                      <text:list-item>
                        <text:p text:style-name="P12"><text:span text:style-name="T5">Criar ambientes virtuais para instalação de bibliotecas resolvem problemas de falta de permissão de administrador. Clique </text:span><text:span text:style-name="T20"><text:a xlink:href="https://www.jetbrains.com/help/pycharm/creating-virtual-environment.html" xlink:type="simple">aqui</text:a></text:span><text:span text:style-name="T5">.</text:span></text:p>
                      </text:list-item>
                    </text:list>
                  </text:list-item>
                </text:list>
              </text:list-item>
            </text:list>
            <text:p text:style-name="P16"><text:span text:style-name="T4"/></text:p>
            <text:list text:style-name="L23">
              <text:list-item>
                <text:list>
                  <text:list-item>
                    <text:p text:style-name="P17"><text:span text:style-name="T5">Ou….</text:span></text:p>
                  </text:list-item>
                </text:list>
              </text:list-item>
            </text:list>
          </draw:text-box>
        </draw:frame>
        <draw:frame draw:name="Google Shape;175;p22"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70;g1e15b4dcdba_0_5:notes" draw:style-name="gr2" draw:layer="layout" svg:width="12.699cm" svg:height="9.524cm" svg:x="3.176cm" svg:y="1.905cm" draw:page-number="10" presentation:class="page"/>
          <draw:frame draw:name="Google Shape;171;g1e15b4dcdba_0_5:notes" presentation:style-name="pr13" draw:text-style-name="P9" draw:layer="layout" svg:width="15.239cm" svg:height="11.429cm" svg:x="1.905cm" svg:y="12.065cm" presentation:class="notes" presentation:placeholder="true" presentation:user-transformed="true">
            <draw:text-box/>
          </draw:frame>
        </presentation:notes>
      </draw:page>
      <draw:page draw:name="BeautifulSoup: instalação" draw:style-name="dp1" draw:master-page-name="OBJECT" presentation:presentation-page-layout-name="AL1T11">
        <draw:frame draw:name="Google Shape;180;p23" presentation:style-name="pr1" draw:text-style-name="P2" draw:layer="layout" svg:width="22.859cm" svg:height="3.175cm" svg:x="1.27cm" svg:y="0.763cm" presentation:class="title" presentation:user-transformed="true">
          <draw:text-box>
            <text:p text:style-name="P1"><text:span text:style-name="T1">BeautifulSoup: instalação</text:span></text:p>
          </draw:text-box>
        </draw:frame>
        <draw:g draw:name="Google Shape;181;p23">
          <draw:frame draw:name="Google Shape;182;p23" draw:style-name="gr4" draw:text-style-name="P13" draw:layer="layout" svg:width="22.009cm" svg:height="14.181cm" svg:x="0.423cm" svg:y="4.445cm">
            <draw:image xlink:href="Pictures/1000020100000308000001F4E3E118CBF43BA298.png" xlink:type="simple" xlink:show="embed" xlink:actuate="onLoad">
              <text:p/>
            </draw:image>
          </draw:frame>
          <draw:custom-shape draw:name="Google Shape;183;p23" draw:style-name="gr9" draw:text-style-name="P13" draw:layer="layout" svg:width="7.064cm" svg:height="1.008cm" draw:transform="rotate (-1.5707963267949) translate (9.168cm 10.934cm)">
            <text:p/>
            <draw:enhanced-geometry draw:mirror-horizontal="true" draw:mirror-vertical="false" draw:text-areas="0 0 ?f5 ?f6" svg:viewBox="0 0 0 0" draw:type="ooxml-curvedConnector3" draw:modifiers="9127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84;p23" draw:style-name="gr9" draw:text-style-name="P13" draw:layer="layout" svg:width="8.101cm" svg:height="0.84cm" draw:transform="rotate (1.5707963267949) translate (14.69cm 18.139cm)">
            <text:p/>
            <draw:enhanced-geometry draw:mirror-horizontal="false" draw:mirror-vertical="false" draw:text-areas="0 0 ?f2 ?f3" svg:viewBox="0 0 0 0" draw:type="ooxml-bentConnector3" draw:modifiers="9999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85;p23" draw:style-name="gr9" draw:text-style-name="P13" draw:layer="layout" svg:width="1.597cm" svg:height="0.42cm" draw:transform="rotate (1.5707963267949) translate (18.615cm 9.981cm)">
            <text:p/>
            <draw:enhanced-geometry draw:mirror-horizontal="false" draw:mirror-vertical="false" draw:text-areas="0 0 ?f2 ?f3" svg:viewBox="0 0 0 0" draw:type="ooxml-bentConnector3" draw:modifiers="9997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86;p23" draw:style-name="gr10" draw:text-style-name="P13" draw:layer="layout" svg:width="0.027cm" svg:height="4.372cm" svg:x="20.157cm" svg:y="13.205cm">
            <text:p/>
            <draw:enhanced-geometry draw:mirror-horizontal="false" draw:mirror-vertical="false" svg:viewBox="0 0 21600 21600" draw:type="mso-spt32" draw:enhanced-path="M 0 0 L 21600 21600 N"/>
          </draw:custom-shape>
        </draw:g>
        <draw:frame draw:name="Google Shape;187;p23"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77;g1e1c5045b18_0_0:notes" draw:style-name="gr2" draw:layer="layout" svg:width="12.699cm" svg:height="9.524cm" svg:x="3.176cm" svg:y="1.905cm" draw:page-number="11" presentation:class="page"/>
          <draw:frame draw:name="Google Shape;178;g1e1c5045b18_0_0:notes" presentation:style-name="pr14" draw:text-style-name="P9" draw:layer="layout" svg:width="15.239cm" svg:height="11.429cm" svg:x="1.905cm" svg:y="12.065cm" presentation:class="notes" presentation:placeholder="true" presentation:user-transformed="true">
            <draw:text-box/>
          </draw:frame>
        </presentation:notes>
      </draw:page>
      <draw:page draw:name="Utilizando o BeautifulSoup" draw:style-name="dp1" draw:master-page-name="OBJECT" presentation:presentation-page-layout-name="AL1T11">
        <draw:frame draw:name="Google Shape;192;p24" presentation:style-name="pr1" draw:text-style-name="P2" draw:layer="layout" svg:width="22.859cm" svg:height="3.175cm" svg:x="1.27cm" svg:y="0.763cm" presentation:class="title" presentation:user-transformed="true">
          <draw:text-box>
            <text:p text:style-name="P1"><text:span text:style-name="T1">Utilizando o BeautifulSoup</text:span></text:p>
          </draw:text-box>
        </draw:frame>
        <draw:frame draw:name="Google Shape;193;p24" presentation:style-name="pr2" draw:text-style-name="P5" draw:layer="layout" svg:width="23.494cm" svg:height="3.447cm" svg:x="1.629cm" svg:y="4.657cm" presentation:class="outline" presentation:user-transformed="true">
          <draw:text-box>
            <text:list text:style-name="L5">
              <text:list-item>
                <text:p text:style-name="P14"><text:span text:style-name="T4">Objeto BeautifulSoup é o objeto mais usado da biblioteca BS4;</text:span></text:p>
              </text:list-item>
              <text:list-item>
                <text:p text:style-name="P10"><text:span text:style-name="T4">Análise do código:</text:span></text:p>
              </text:list-item>
            </text:list>
          </draw:text-box>
        </draw:frame>
        <draw:custom-shape draw:name="Google Shape;194;p24" draw:style-name="gr6" draw:text-style-name="P6" draw:layer="layout" svg:width="21.327cm" svg:height="2.541cm" svg:x="1.629cm" svg:y="13.735cm">
          <text:list text:style-name="L24">
            <text:list-item>
              <text:p text:style-name="P14"><text:span text:style-name="T4">Apresenta a PRIMEIRA instância da tag passada por parâmetro na função pri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4" draw:style-name="gr6" draw:text-style-name="P6" draw:layer="layout" svg:width="21.548cm" svg:height="5.917cm" svg:x="3.152cm" svg:y="6.979cm">
          <text:p text:style-name="P12"><text:span text:style-name="T21">from urllib.request import urlopen</text:span></text:p>
          <text:p text:style-name="P12"><text:span text:style-name="T21">from bs4 import BeautifulSoup</text:span></text:p>
          <text:p text:style-name="P12"><text:span text:style-name="T21"/></text:p>
          <text:p text:style-name="P12"><text:span text:style-name="T21">html = urlopen('http://www.pythonscraping.com/pages/page1.html')</text:span></text:p>
          <text:p text:style-name="P12"><text:span text:style-name="T21">bs = BeautifulSoup(html.read(), 'html.parser')</text:span></text:p>
          <text:p text:style-name="P12"><text:span text:style-name="T21"/></text:p>
          <text:p text:style-name="P12"><text:span text:style-name="T21">print(bs.h1) # Saída: &lt;h1&gt;An Interesting Title&lt;/h1&gt;</text:span></text:p>
          <text:p text:style-name="P12"><text:span text:style-name="T22">#print(bs.html.body.h1) ou bs.body.h1 ou bs.hmtl.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4"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89;g1e15b4dcdba_0_10:notes" draw:style-name="gr2" draw:layer="layout" svg:width="12.699cm" svg:height="9.524cm" svg:x="3.176cm" svg:y="1.905cm" draw:page-number="12" presentation:class="page"/>
          <draw:frame draw:name="Google Shape;190;g1e15b4dcdba_0_10:notes" presentation:style-name="pr15" draw:text-style-name="P9" draw:layer="layout" svg:width="15.239cm" svg:height="11.429cm" svg:x="1.905cm" svg:y="12.065cm" presentation:class="notes" presentation:placeholder="true" presentation:user-transformed="true">
            <draw:text-box/>
          </draw:frame>
        </presentation:notes>
      </draw:page>
      <draw:page draw:name="BeautifulSoup" draw:style-name="dp1" draw:master-page-name="OBJECT" presentation:presentation-page-layout-name="AL1T11">
        <draw:frame draw:name="Google Shape;201;p25" presentation:style-name="pr1" draw:text-style-name="P2" draw:layer="layout" svg:width="22.859cm" svg:height="3.175cm" svg:x="1.27cm" svg:y="0.763cm" presentation:class="title" presentation:user-transformed="true">
          <draw:text-box>
            <text:p text:style-name="P1"><text:span text:style-name="T1">BeautifulSoup</text:span></text:p>
          </draw:text-box>
        </draw:frame>
        <draw:frame draw:name="Google Shape;202;p25" presentation:style-name="pr2" draw:text-style-name="P5" draw:layer="layout" svg:width="23.511cm" svg:height="7.267cm" svg:x="1.629cm" svg:y="11.615cm" presentation:class="outline" presentation:user-transformed="true">
          <draw:text-box>
            <text:list text:style-name="L5">
              <text:list-item>
                <text:p text:style-name="P14"><text:span text:style-name="T4">Conteúdo HTML é transformado em objeto BeautifulSoup com a estrutura:</text:span></text:p>
              </text:list-item>
            </text:list>
            <text:list text:style-name="L26">
              <text:list-item>
                <text:list>
                  <text:list-item>
                    <text:p text:style-name="P10"><text:span text:style-name="T2">html: &lt;html&gt;&lt;head&gt;...&lt;/head&gt;&lt;body&gt;...&lt;/body&gt;&lt;/html&gt;</text:span></text:p>
                  </text:list-item>
                </text:list>
              </text:list-item>
            </text:list>
            <text:list text:style-name="L27">
              <text:list-item>
                <text:list>
                  <text:list-item>
                    <text:list>
                      <text:list-item>
                        <text:p text:style-name="P10"><text:span text:style-name="T2">head: &lt;head&gt;&lt;title&gt;A Useful Page&lt;title&gt;&lt;/head&gt;</text:span></text:p>
                      </text:list-item>
                    </text:list>
                  </text:list-item>
                </text:list>
              </text:list-item>
            </text:list>
            <text:list text:style-name="L28">
              <text:list-item>
                <text:list>
                  <text:list-item>
                    <text:list>
                      <text:list-item>
                        <text:list>
                          <text:list-item>
                            <text:p text:style-name="P10"><text:span text:style-name="T2">title: &lt;title&gt;A Useful Page&lt;/title&gt;</text:span></text:p>
                          </text:list-item>
                        </text:list>
                      </text:list-item>
                      <text:list-item>
                        <text:p text:style-name="P10"><text:span text:style-name="T2">body: &lt;body&gt;&lt;h1&gt;An Int...&lt;/h1&gt;&lt;div&gt;Lorem ip...&lt;/div&gt;&lt;/body&gt;</text:span></text:p>
                        <text:list>
                          <text:list-item>
                            <text:p text:style-name="P10"><text:span text:style-name="T2">h1: &lt;h1&gt;An Interesting Title&lt;/h1&gt;</text:span></text:p>
                          </text:list-item>
                          <text:list-item>
                            <text:p text:style-name="P10"><text:span text:style-name="T2">div: &lt;div&gt;Lorem Ipsum dolor...&lt;/div&gt;</text:span></text:p>
                          </text:list-item>
                        </text:list>
                      </text:list-item>
                    </text:list>
                  </text:list-item>
                </text:list>
              </text:list-item>
            </text:list>
          </draw:text-box>
        </draw:frame>
        <draw:frame draw:name="Google Shape;203;p25" presentation:style-name="pr2" draw:text-style-name="P5" draw:layer="layout" svg:width="22.859cm" svg:height="1.796cm" svg:x="1.629cm" svg:y="4.445cm" presentation:class="outline" presentation:user-transformed="true">
          <draw:text-box>
            <text:list text:style-name="L5">
              <text:list-item>
                <text:p text:style-name="P14"><text:span text:style-name="T4">Análise do código:</text:span></text:p>
              </text:list-item>
            </text:list>
          </draw:text-box>
        </draw:frame>
        <draw:custom-shape draw:name="Google Shape;204;p25" draw:style-name="gr6" draw:text-style-name="P6" draw:layer="layout" svg:width="21.548cm" svg:height="5.241cm" svg:x="2.94cm" svg:y="6.004cm">
          <text:p text:style-name="P12"><text:span text:style-name="T21">from urllib.request import urlopen</text:span></text:p>
          <text:p text:style-name="P12"><text:span text:style-name="T21">from bs4 import BeautifulSoup</text:span></text:p>
          <text:p text:style-name="P12"><text:span text:style-name="T21"/></text:p>
          <text:p text:style-name="P12"><text:span text:style-name="T21">html = urlopen('http://www.pythonscraping.com/pages/page1.html')</text:span></text:p>
          <text:p text:style-name="P12"><text:span text:style-name="T21">bs = BeautifulSoup(html.read(), 'html.parser')</text:span></text:p>
          <text:p text:style-name="P12"><text:span text:style-name="T21"/></text:p>
          <text:p text:style-name="P12"><text:span text:style-name="T22">print(bs)</text:span><text:span text:style-name="T21"> # retorna todo o HTML da pág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25"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198;g1e0ebf60e75_0_0:notes" draw:style-name="gr2" draw:layer="layout" svg:width="12.699cm" svg:height="9.524cm" svg:x="3.176cm" svg:y="1.905cm" draw:page-number="13" presentation:class="page"/>
          <draw:frame draw:name="Google Shape;199;g1e0ebf60e75_0_0:notes" presentation:style-name="pr16" draw:text-style-name="P9" draw:layer="layout" svg:width="15.239cm" svg:height="11.429cm" svg:x="1.905cm" svg:y="12.065cm" presentation:class="notes" presentation:placeholder="true" presentation:user-transformed="true">
            <draw:text-box/>
          </draw:frame>
        </presentation:notes>
      </draw:page>
      <draw:page draw:name="BeautifulSoup" draw:style-name="dp1" draw:master-page-name="OBJECT" presentation:presentation-page-layout-name="AL1T11">
        <draw:frame draw:name="Google Shape;210;p26" presentation:style-name="pr1" draw:text-style-name="P2" draw:layer="layout" svg:width="22.859cm" svg:height="3.175cm" svg:x="1.27cm" svg:y="0.763cm" presentation:class="title" presentation:user-transformed="true">
          <draw:text-box>
            <text:p text:style-name="P1"><text:span text:style-name="T1">BeautifulSoup</text:span></text:p>
          </draw:text-box>
        </draw:frame>
        <draw:frame draw:name="Google Shape;211;p26" presentation:style-name="pr2" draw:text-style-name="P5" draw:layer="layout" svg:width="22.859cm" svg:height="1.796cm" svg:x="1.629cm" svg:y="4.445cm" presentation:class="outline" presentation:user-transformed="true">
          <draw:text-box>
            <text:list text:style-name="L5">
              <text:list-item>
                <text:p text:style-name="P14"><text:span text:style-name="T4">Análise do código:</text:span></text:p>
              </text:list-item>
            </text:list>
          </draw:text-box>
        </draw:frame>
        <draw:custom-shape draw:name="Google Shape;212;p26" draw:style-name="gr6" draw:text-style-name="P6" draw:layer="layout" svg:width="21.548cm" svg:height="1.861cm" svg:x="2.94cm" svg:y="6.004cm">
          <text:p text:style-name="P12"><text:span text:style-name="T21">bs = BeautifulSoup(html.read(), 'html.parser')</text:span></text:p>
          <text:p text:style-name="P1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6" draw:style-name="gr6" draw:text-style-name="P6" draw:layer="layout" svg:width="7.516cm" svg:height="2.795cm" svg:x="1.977cm" svg:y="8.054cm">
          <text:p text:style-name="P12"><text:span text:style-name="T2">Texto HTML no qual o objeto se baseia, ou seja, estrutura da pág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4;p26" presentation:style-name="pr2" draw:text-style-name="P5" draw:layer="layout" svg:width="22.859cm" svg:height="7.887cm" svg:x="1.629cm" svg:y="10.782cm" presentation:class="outline" presentation:user-transformed="true">
          <draw:text-box>
            <text:list text:style-name="L29">
              <text:list-item>
                <text:p text:style-name="P14"><text:span text:style-name="T4">Outros parsers lxml e html5lib:</text:span></text:p>
              </text:list-item>
            </text:list>
            <text:list text:style-name="L30">
              <text:list-item>
                <text:list>
                  <text:list-item>
                    <text:p text:style-name="P10"><text:span text:style-name="T5">Mais tolerantes que o ‘html.parser’, ou seja, melhor para interpretar HTML mal formatado (fechamento de tags, etc);</text:span></text:p>
                  </text:list-item>
                  <text:list-item>
                    <text:p text:style-name="P10"><text:span text:style-name="T5">Dependem de bibliotecas de 3ºs, logo podem apresentar problemas de portabilidade;</text:span></text:p>
                  </text:list-item>
                </text:list>
              </text:list-item>
            </text:list>
            <text:p text:style-name="P19"><text:span text:style-name="T23">bs = BeautifulSoup(html.read(), 'lxml')</text:span></text:p>
            <text:p text:style-name="P16"><text:span text:style-name="T4"/></text:p>
            <text:list text:continue-numbering="true" text:style-name="L30">
              <text:list-item>
                <text:p text:style-name="P18"><text:span text:style-name="T4">Resumo BS4: qualquer informação pode ser extraída de qualquer arquivo HTML ou XML, desde que possua tag de identificação.</text:span></text:p>
              </text:list-item>
            </text:list>
          </draw:text-box>
        </draw:frame>
        <draw:custom-shape draw:name="Google Shape;215;p26" draw:style-name="gr6" draw:text-style-name="P6" draw:layer="layout" svg:width="8.552cm" svg:height="2.795cm" svg:x="15.936cm" svg:y="8.054cm">
          <text:p text:style-name="P12"><text:span text:style-name="T2">Define o parser a ser utilizado para criar o objeto. Este é padrão da biblioteca BS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6" draw:style-name="gr11" draw:text-style-name="P13" draw:layer="layout" svg:width="0.687cm" svg:height="2.502cm" draw:transform="rotate (-3.14159265358979) translate (10.18cm 9.46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17;p26" draw:style-name="gr11" draw:text-style-name="P13" draw:layer="layout" svg:width="0.717cm" svg:height="2.132cm" draw:transform="rotate (-3.14159265358979) translate (15.936cm 9.46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frame draw:name="Google Shape;218;p26"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07;g1e1c5045b18_0_21:notes" draw:style-name="gr2" draw:layer="layout" svg:width="12.699cm" svg:height="9.524cm" svg:x="3.176cm" svg:y="1.905cm" draw:page-number="14" presentation:class="page"/>
          <draw:frame draw:name="Google Shape;208;g1e1c5045b18_0_21:notes" presentation:style-name="pr17" draw:text-style-name="P9" draw:layer="layout" svg:width="15.239cm" svg:height="11.429cm" svg:x="1.905cm" svg:y="12.065cm" presentation:class="notes" presentation:placeholder="true" presentation:user-transformed="true">
            <draw:text-box/>
          </draw:frame>
        </presentation:notes>
      </draw:page>
      <draw:page draw:name="Exercício 1" draw:style-name="dp1" draw:master-page-name="OBJECT" presentation:presentation-page-layout-name="AL1T11">
        <draw:frame draw:name="Google Shape;223;p27" presentation:style-name="pr1" draw:text-style-name="P2" draw:layer="layout" svg:width="22.859cm" svg:height="3.175cm" svg:x="1.27cm" svg:y="0.763cm" presentation:class="title" presentation:user-transformed="true">
          <draw:text-box>
            <text:p text:style-name="P1"><text:span text:style-name="T1">Exercício 1</text:span></text:p>
          </draw:text-box>
        </draw:frame>
        <draw:frame draw:name="Google Shape;224;p27" presentation:style-name="pr2" draw:text-style-name="P5" draw:layer="layout" svg:width="22.859cm" svg:height="12.572cm" svg:x="1.27cm" svg:y="4.445cm" presentation:class="outline" presentation:user-transformed="true">
          <draw:text-box>
            <text:list text:style-name="L5">
              <text:list-item>
                <text:p text:style-name="P14"><text:span text:style-name="T4">Criar um scraper para buscar o conteúdo da tag h1 do site </text:span><text:span text:style-name="T24"><text:a xlink:href="http://www.example.com/" xlink:type="simple">http://www.example.com/</text:a></text:span><text:span text:style-name="T4">;</text:span></text:p>
              </text:list-item>
              <text:list-item>
                <text:p text:style-name="P10"><text:span text:style-name="T4">Analise o HTML da página e faça e busque por outras tags.</text:span></text:p>
              </text:list-item>
            </text:list>
          </draw:text-box>
        </draw:frame>
        <draw:frame draw:name="Google Shape;225;p27"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20;g1e22245eb12_1_0:notes" draw:style-name="gr2" draw:layer="layout" svg:width="12.699cm" svg:height="9.524cm" svg:x="3.176cm" svg:y="1.905cm" draw:page-number="15" presentation:class="page"/>
          <draw:frame draw:name="Google Shape;221;g1e22245eb12_1_0:notes" presentation:style-name="pr18" draw:text-style-name="P9" draw:layer="layout" svg:width="15.239cm" svg:height="11.429cm" svg:x="1.905cm" svg:y="12.065cm" presentation:class="notes" presentation:placeholder="true" presentation:user-transformed="true">
            <draw:text-box/>
          </draw:frame>
        </presentation:notes>
      </draw:page>
      <draw:page draw:name="Técnicas de busca em arquivos HTML" draw:style-name="dp1" draw:master-page-name="OBJECT" presentation:presentation-page-layout-name="AL1T11">
        <draw:frame draw:name="Google Shape;230;p28" presentation:style-name="pr1" draw:text-style-name="P2" draw:layer="layout" svg:width="22.859cm" svg:height="3.175cm" svg:x="0.972cm" svg:y="7.937cm" presentation:class="title" presentation:user-transformed="true">
          <draw:text-box>
            <text:p text:style-name="P1"><text:span text:style-name="T1">Técnicas de busca em arquivos HTML</text:span></text:p>
          </draw:text-box>
        </draw:frame>
        <draw:frame draw:name="Google Shape;231;p28" presentation:style-name="pr2" draw:text-style-name="P5" draw:layer="layout" svg:width="14.857cm" svg:height="2.757cm" svg:x="1.27cm" svg:y="14.26cm" presentation:class="outline" presentation:user-transformed="true">
          <draw:text-box>
            <text:p text:style-name="P3"><text:span text:style-name="T2">Professor Leandro O. Freitas</text:span></text:p>
            <text:p text:style-name="P4"><text:span text:style-name="T2">leandro@politecnico.ufsm.br</text:span></text:p>
          </draw:text-box>
        </draw:frame>
        <draw:custom-shape draw:name="Google Shape;232;p28" draw:style-name="gr1" draw:text-style-name="P6" draw:layer="layout" svg:width="18.463cm" svg:height="3.399cm" svg:x="1.407cm" svg:y="0.289cm">
          <text:p text:style-name="P1"><text:span text:style-name="T1">Análise de dados e extração de conhec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28"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frame draw:name="Google Shape;227;g1e1c5045b18_0_48:notes" presentation:style-name="pr19" draw:text-style-name="P9" draw:layer="layout" svg:width="15.239cm" svg:height="11.429cm" svg:x="1.905cm" svg:y="12.065cm" presentation:class="notes" presentation:placeholder="true" presentation:user-transformed="true">
            <draw:text-box/>
          </draw:frame>
          <draw:page-thumbnail draw:name="Google Shape;228;g1e1c5045b18_0_48:notes" draw:style-name="gr2" draw:layer="layout" svg:width="12.7cm" svg:height="9.524cm" svg:x="3.176cm" svg:y="1.905cm" draw:page-number="16" presentation:class="page"/>
        </presentation:notes>
      </draw:page>
      <draw:page draw:name="Problemas comuns em web scraping" draw:style-name="dp1" draw:master-page-name="OBJECT" presentation:presentation-page-layout-name="AL1T11">
        <draw:frame draw:name="Google Shape;238;p29" presentation:style-name="pr1" draw:text-style-name="P2" draw:layer="layout" svg:width="22.859cm" svg:height="3.175cm" svg:x="1.27cm" svg:y="0.763cm" presentation:class="title" presentation:user-transformed="true">
          <draw:text-box>
            <text:p text:style-name="P12"><text:span text:style-name="T1">Problemas comuns em web scraping</text:span></text:p>
          </draw:text-box>
        </draw:frame>
        <draw:frame draw:name="Google Shape;239;p29" presentation:style-name="pr2" draw:text-style-name="P5" draw:layer="layout" svg:width="22.859cm" svg:height="13.919cm" svg:x="0.9cm" svg:y="4.334cm" presentation:class="outline" presentation:user-transformed="true">
          <draw:text-box>
            <text:list text:style-name="L32">
              <text:list-item>
                <text:p text:style-name="P10"><text:span text:style-name="T4">Captura de dados indesejados:</text:span></text:p>
              </text:list-item>
            </text:list>
            <text:list text:style-name="L33">
              <text:list-item>
                <text:list>
                  <text:list-item>
                    <text:p text:style-name="P10"><text:span text:style-name="T5">Lixo (ou ruído) no meio de informações valiosas fazem com que o </text:span><text:span text:style-name="T7">tempo preparação e análise torne-se maior;</text:span></text:p>
                  </text:list-item>
                </text:list>
              </text:list-item>
            </text:list>
            <text:p text:style-name="P11"><text:span text:style-name="T4"/></text:p>
            <text:list text:continue-numbering="true" text:style-name="L33">
              <text:list-item>
                <text:p text:style-name="P12"><text:span text:style-name="T4">Informações de busca podem estar “escondidos” em tags com </text:span><text:span text:style-name="T14">diferentes níveis de profundidade</text:span><text:span text:style-name="T4"> em uma estrutura HTML confusa ou sem atributos que a identifiquem;</text:span></text:p>
              </text:list-item>
            </text:list>
            <text:p text:style-name="P11"><text:span text:style-name="T4"/></text:p>
            <text:list text:continue-numbering="true" text:style-name="L33">
              <text:list-item>
                <text:p text:style-name="P12"><text:span text:style-name="T4">O desenvolvedor deve estar ciente que a estrutura dos </text:span><text:span text:style-name="T14">arquivos HTML podem mudar ao longo</text:span><text:span text:style-name="T4"> do tempo;</text:span></text:p>
              </text:list-item>
            </text:list>
            <text:p text:style-name="P11"><text:span text:style-name="T4"/></text:p>
            <text:list text:continue-numbering="true" text:style-name="L33">
              <text:list-item>
                <text:p text:style-name="P12"><text:span text:style-name="T4">Portanto, antes de começar a escrever um scraper, é necessário </text:span><text:span text:style-name="T14">analisar o site </text:span><text:span text:style-name="T4">que está sendo usado com fonte de informações.</text:span></text:p>
              </text:list-item>
            </text:list>
          </draw:text-box>
        </draw:frame>
        <draw:frame draw:name="Google Shape;240;p29"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frame draw:name="Google Shape;235;g1e1c5045b18_0_54:notes" presentation:style-name="pr20" draw:text-style-name="P9" draw:layer="layout" svg:width="15.239cm" svg:height="11.429cm" svg:x="1.905cm" svg:y="12.065cm" presentation:class="notes" presentation:placeholder="true" presentation:user-transformed="true">
            <draw:text-box/>
          </draw:frame>
          <draw:page-thumbnail draw:name="Google Shape;236;g1e1c5045b18_0_54:notes" draw:style-name="gr2" draw:layer="layout" svg:width="12.7cm" svg:height="9.524cm" svg:x="3.176cm" svg:y="1.905cm" draw:page-number="17" presentation:class="page"/>
        </presentation:notes>
      </draw:page>
      <draw:page draw:name="Mais sobre BS4" draw:style-name="dp1" draw:master-page-name="OBJECT" presentation:presentation-page-layout-name="AL1T11">
        <draw:frame draw:name="Google Shape;245;p30" presentation:style-name="pr1" draw:text-style-name="P2" draw:layer="layout" svg:width="22.859cm" svg:height="3.175cm" svg:x="1.27cm" svg:y="0.763cm" presentation:class="title" presentation:user-transformed="true">
          <draw:text-box>
            <text:p text:style-name="P1"><text:span text:style-name="T1">Mais sobre BS4</text:span></text:p>
          </draw:text-box>
        </draw:frame>
        <draw:frame draw:name="Google Shape;246;p30" presentation:style-name="pr2" draw:text-style-name="P5" draw:layer="layout" svg:width="23.537cm" svg:height="13.919cm" svg:x="1.27cm" svg:y="4.445cm" presentation:class="outline" presentation:user-transformed="true">
          <draw:text-box>
            <text:list text:style-name="L5">
              <text:list-item>
                <text:p text:style-name="P14"><text:span text:style-name="T4">CSS facilitou a criação de web scrapers pois se baseiam na diferenciação de elementos HTML. Analisar as seguintes tags:</text:span></text:p>
              </text:list-item>
            </text:list>
            <text:p text:style-name="P16"><text:span text:style-name="T25">&lt;span class="green"&gt;&lt;/span&gt;</text:span></text:p>
            <text:p text:style-name="P16"><text:span text:style-name="T25">&lt;span class="red"&gt;&lt;/span&gt;</text:span></text:p>
            <text:p text:style-name="P15"><text:span text:style-name="T4"/></text:p>
            <text:list text:style-name="L35">
              <text:list-item>
                <text:p text:style-name="P17"><text:span text:style-name="T4">Acessar a página </text:span><text:span text:style-name="T24"><text:a xlink:href="https://www.pythonscraping.com/pages/warandpeace.html" xlink:type="simple">warandpeace.html</text:a></text:span></text:p>
              </text:list-item>
            </text:list>
            <text:list text:style-name="L36">
              <text:list-item>
                <text:list>
                  <text:list-item>
                    <text:p text:style-name="P12"><text:span text:style-name="T5">BS4 permite, por exemplo, buscar somente textos em vermelho.</text:span></text:p>
                  </text:list-item>
                </text:list>
              </text:list-item>
            </text:list>
            <text:p text:style-name="P16"><text:span text:style-name="T4"/></text:p>
            <text:list text:style-name="L6">
              <text:list-item>
                <text:p text:style-name="P18"><text:span text:style-name="T4">Tags </text:span><text:span text:style-name="T13">span</text:span><text:span text:style-name="T4"> referem-se às classes CSS apropriadas. Exemplos:</text:span></text:p>
              </text:list-item>
            </text:list>
            <text:p text:style-name="P16"><text:span text:style-name="T26">&lt;span class="red"&gt;Heavens! what a virulent attack!&lt;/span&gt;...</text:span></text:p>
            <text:p text:style-name="P20"><text:span text:style-name="T26">&lt;span class="green"&gt;the prince&lt;/span&gt;...</text:span></text:p>
          </draw:text-box>
        </draw:frame>
        <draw:frame draw:name="Google Shape;247;p30"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42;g1e1c5045b18_0_59:notes" draw:style-name="gr2" draw:layer="layout" svg:width="12.699cm" svg:height="9.524cm" svg:x="3.176cm" svg:y="1.905cm" draw:page-number="18" presentation:class="page"/>
          <draw:frame draw:name="Google Shape;243;g1e1c5045b18_0_59:notes" presentation:style-name="pr21" draw:text-style-name="P9" draw:layer="layout" svg:width="15.239cm" svg:height="11.429cm" svg:x="1.905cm" svg:y="12.065cm" presentation:class="notes" presentation:placeholder="true" presentation:user-transformed="true">
            <draw:text-box/>
          </draw:frame>
        </presentation:notes>
      </draw:page>
      <draw:page draw:name="Web scraper: exemplo" draw:style-name="dp1" draw:master-page-name="OBJECT" presentation:presentation-page-layout-name="AL1T11">
        <draw:frame draw:name="Google Shape;252;p31" presentation:style-name="pr1" draw:text-style-name="P2" draw:layer="layout" svg:width="22.859cm" svg:height="3.175cm" svg:x="1.27cm" svg:y="0.763cm" presentation:class="title" presentation:user-transformed="true">
          <draw:text-box>
            <text:p text:style-name="P1"><text:span text:style-name="T1">Web scraper: exemplo</text:span></text:p>
          </draw:text-box>
        </draw:frame>
        <draw:frame draw:name="Google Shape;253;p31" presentation:style-name="pr2" draw:text-style-name="P5" draw:layer="layout" svg:width="22.859cm" svg:height="2.515cm" svg:x="1.27cm" svg:y="4.445cm" presentation:class="outline" presentation:user-transformed="true">
          <draw:text-box>
            <text:list text:style-name="L5">
              <text:list-item>
                <text:p text:style-name="P14"><text:span text:style-name="T4">Script para informações específicas de </text:span><text:span text:style-name="T13">War and Peace</text:span><text:span text:style-name="T4">:</text:span></text:p>
              </text:list-item>
            </text:list>
            <text:list text:style-name="L6">
              <text:list-item>
                <text:list>
                  <text:list-item>
                    <text:p text:style-name="P10"><text:span text:style-name="T5">Buscar todos os nomes de personagens:</text:span></text:p>
                  </text:list-item>
                </text:list>
              </text:list-item>
            </text:list>
          </draw:text-box>
        </draw:frame>
        <draw:custom-shape draw:name="Google Shape;254;p31" draw:style-name="gr6" draw:text-style-name="P6" draw:layer="layout" svg:width="24.029cm" svg:height="4.829cm" svg:x="0.629cm" svg:y="6.874cm">
          <text:p text:style-name="P12"><text:span text:style-name="T26">html = urlopen(</text:span><text:span text:style-name="T27">'https://www.pythonscraping.com/pages/warandpeace.html'</text:span><text:span text:style-name="T26">)</text:span></text:p>
          <text:p text:style-name="P12"><text:span text:style-name="T26">bs = BeautifulSoup(html.read(), </text:span><text:span text:style-name="T27">'html.parser'</text:span><text:span text:style-name="T26">)</text:span></text:p>
          <text:p text:style-name="P12"><text:span text:style-name="T26"/></text:p>
          <text:p text:style-name="P12"><text:span text:style-name="T26">nameList = bs.find_all(</text:span><text:span text:style-name="T27">'span'</text:span><text:span text:style-name="T26">, {</text:span><text:span text:style-name="T27">'class'</text:span><text:span text:style-name="T26">:</text:span><text:span text:style-name="T27">'green'</text:span><text:span text:style-name="T26">})</text:span></text:p>
          <text:p text:style-name="P12"><text:span text:style-name="T28">for </text:span><text:span text:style-name="T26">name </text:span><text:span text:style-name="T28">in </text:span><text:span text:style-name="T26">nameList:</text:span></text:p>
          <text:p text:style-name="P12"><text:span text:style-name="T26"><text:s text:c="3"/></text:span><text:span text:style-name="T29">print</text:span><text:span text:style-name="T26">(name.get_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p31" presentation:style-name="pr2" draw:text-style-name="P5" draw:layer="layout" svg:width="22.859cm" svg:height="6.262cm" svg:x="1.27cm" svg:y="12.065cm" presentation:class="outline" presentation:user-transformed="true">
          <draw:text-box>
            <text:list text:style-name="L5">
              <text:list-item>
                <text:p text:style-name="P14"><text:span text:style-name="T4">Análise do código:</text:span></text:p>
              </text:list-item>
            </text:list>
            <text:list text:style-name="L6">
              <text:list-item>
                <text:list>
                  <text:list-item>
                    <text:p text:style-name="P10"><text:span text:style-name="T30">Antes: bs.&lt;tag&gt;</text:span><text:span text:style-name="T5"> retornava a 1ª ocorrência de uma tag;</text:span></text:p>
                  </text:list-item>
                  <text:list-item>
                    <text:p text:style-name="P10"><text:span text:style-name="T30">Agora: bs.find_all(&lt;tag&gt;, &lt;atr. de tag&gt;)</text:span><text:span text:style-name="T5"> retorna todas as ocorrências;</text:span></text:p>
                  </text:list-item>
                  <text:list-item>
                    <text:p text:style-name="P10"><text:span text:style-name="T30">.get_text():</text:span><text:span text:style-name="T5"> remove todas as tags do documento e retorna uma string. Deve ser usado apenas para apresentação do conteúdo. Para demais casos, manter as tags facilitará a manipulação dos dados.</text:span></text:p>
                  </text:list-item>
                </text:list>
              </text:list-item>
            </text:list>
          </draw:text-box>
        </draw:frame>
        <draw:frame draw:name="Google Shape;256;p31"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49;g1e1c5045b18_0_67:notes" draw:style-name="gr2" draw:layer="layout" svg:width="12.699cm" svg:height="9.524cm" svg:x="3.176cm" svg:y="1.905cm" draw:page-number="19" presentation:class="page"/>
          <draw:frame draw:name="Google Shape;250;g1e1c5045b18_0_67:notes" presentation:style-name="pr22" draw:text-style-name="P9" draw:layer="layout" svg:width="15.239cm" svg:height="11.429cm" svg:x="1.905cm" svg:y="12.065cm" presentation:class="notes" presentation:placeholder="true" presentation:user-transformed="true">
            <draw:text-box/>
          </draw:frame>
        </presentation:notes>
      </draw:page>
      <draw:page draw:name="Funções de filtro: find() e find_all()" draw:style-name="dp1" draw:master-page-name="OBJECT" presentation:presentation-page-layout-name="AL1T11">
        <draw:frame draw:name="Google Shape;261;p32" presentation:style-name="pr1" draw:text-style-name="P2" draw:layer="layout" svg:width="22.859cm" svg:height="3.175cm" svg:x="1.27cm" svg:y="0.763cm" presentation:class="title" presentation:user-transformed="true">
          <draw:text-box>
            <text:p text:style-name="P12"><text:span text:style-name="T1">Funções de filtro: find() e find_all()</text:span></text:p>
          </draw:text-box>
        </draw:frame>
        <draw:frame draw:name="Google Shape;262;p32" presentation:style-name="pr2" draw:text-style-name="P5" draw:layer="layout" svg:width="23.807cm" svg:height="11.682cm" svg:x="1.074cm" svg:y="4.445cm" presentation:class="outline" presentation:user-transformed="true">
          <draw:text-box>
            <text:list text:style-name="L38">
              <text:list-item>
                <text:p text:style-name="P14"><text:span text:style-name="T4">Permitem buscar por uma tag (ou lista de tags) de acordo com atributos específicos. Sintaxe:</text:span></text:p>
              </text:list-item>
            </text:list>
            <text:p text:style-name="P16"><text:span text:style-name="T23">find_all(tag, attributes, </text:span><text:span text:style-name="T31">recursive, text, limit, keywords</text:span><text:span text:style-name="T23">)</text:span></text:p>
            <text:p text:style-name="P16"><text:span text:style-name="T23">find(tag, attributes, </text:span><text:span text:style-name="T31">recursive, text, keywords</text:span><text:span text:style-name="T23">)</text:span></text:p>
            <text:p text:style-name="P15"><text:span text:style-name="T4"/></text:p>
            <text:list text:continue-numbering="true" text:style-name="L38">
              <text:list-item>
                <text:p text:style-name="P18"><text:span text:style-name="T4">Argumentos:</text:span></text:p>
              </text:list-item>
            </text:list>
            <text:list text:style-name="L40">
              <text:list-item>
                <text:list>
                  <text:list-item>
                    <text:p text:style-name="P12"><text:span text:style-name="T18">tag</text:span><text:span text:style-name="T6">: </text:span><text:span text:style-name="T5">permite passar uma tag ou lista com tags;</text:span></text:p>
                  </text:list-item>
                  <text:list-item>
                    <text:p text:style-name="P21"><text:span text:style-name="T18">attributes</text:span><text:span text:style-name="T5">: aceita dicionário python de atributos e faz correspondência com tags que tenham esses valores:</text:span></text:p>
                  </text:list-item>
                </text:list>
              </text:list-item>
            </text:list>
            <text:p text:style-name="P19"><text:span text:style-name="T23">.find_all('span', {'class':{'green', 'red'}})</text:span></text:p>
            <text:p text:style-name="P19"><text:span text:style-name="T23"/></text:p>
            <text:list text:style-name="L41">
              <text:list-item>
                <text:list>
                  <text:list-item>
                    <text:p text:style-name="P17"><text:span text:style-name="T18">recursive</text:span><text:span text:style-name="T6">:</text:span><text:span text:style-name="T5"> valor booleano (</text:span><text:span text:style-name="T6">true</text:span><text:span text:style-name="T5"> ou </text:span><text:span text:style-name="T6">false</text:span><text:span text:style-name="T5">). Se </text:span><text:span text:style-name="T6">true</text:span><text:span text:style-name="T5">, analisa todos os níveis de profundidade de uma tag, ou seja, ela e seus descendentes. Se </text:span><text:span text:style-name="T6">false</text:span><text:span text:style-name="T5">, analisa apenas o primeiro nível;</text:span></text:p>
                  </text:list-item>
                  <text:list-item>
                    <text:p text:style-name="P21"><text:span text:style-name="T18">text</text:span><text:span text:style-name="T6">: </text:span><text:span text:style-name="T5">faz correspondência com o conteúdo textual de uma tag, ao invés de usar as propriedades;</text:span></text:p>
                  </text:list-item>
                </text:list>
              </text:list-item>
            </text:list>
          </draw:text-box>
        </draw:frame>
        <draw:frame draw:name="Google Shape;263;p32"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58;g1e1c5045b18_0_75:notes" draw:style-name="gr2" draw:layer="layout" svg:width="12.699cm" svg:height="9.524cm" svg:x="3.176cm" svg:y="1.905cm" draw:page-number="20" presentation:class="page"/>
          <draw:frame draw:name="Google Shape;259;g1e1c5045b18_0_75:notes" presentation:style-name="pr23" draw:text-style-name="P9" draw:layer="layout" svg:width="15.239cm" svg:height="11.429cm" svg:x="1.905cm" svg:y="12.065cm" presentation:class="notes" presentation:placeholder="true" presentation:user-transformed="true">
            <draw:text-box/>
          </draw:frame>
        </presentation:notes>
      </draw:page>
      <draw:page draw:name="Funções de filtro: find() e find_all()" draw:style-name="dp1" draw:master-page-name="OBJECT" presentation:presentation-page-layout-name="AL1T11">
        <draw:frame draw:name="Google Shape;268;p33" presentation:style-name="pr1" draw:text-style-name="P2" draw:layer="layout" svg:width="22.859cm" svg:height="3.175cm" svg:x="1.27cm" svg:y="0.763cm" presentation:class="title" presentation:user-transformed="true">
          <draw:text-box>
            <text:p text:style-name="P12"><text:span text:style-name="T1">Funções de filtro: find() e find_all()</text:span></text:p>
          </draw:text-box>
        </draw:frame>
        <draw:frame draw:name="Google Shape;269;p33" presentation:style-name="pr2" draw:text-style-name="P5" draw:layer="layout" svg:width="23.807cm" svg:height="14.104cm" svg:x="1.074cm" svg:y="4.445cm" presentation:class="outline" presentation:user-transformed="true">
          <draw:text-box>
            <text:list text:style-name="L5">
              <text:list-item>
                <text:p text:style-name="P14"><text:span text:style-name="T4">Permitem buscar por uma tag (ou lista de tags) de acordo com atributos específicos. Sintaxe:</text:span></text:p>
              </text:list-item>
            </text:list>
            <text:p text:style-name="P16"><text:span text:style-name="T23">find_all(tag, attributes, </text:span><text:span text:style-name="T31">recursive, text, limit, keywords</text:span><text:span text:style-name="T23">)</text:span></text:p>
            <text:p text:style-name="P16"><text:span text:style-name="T23">find(tag, attributes, </text:span><text:span text:style-name="T31">recursive, text, keywords</text:span><text:span text:style-name="T23">)</text:span></text:p>
            <text:p text:style-name="P15"><text:span text:style-name="T4"/></text:p>
            <text:list text:continue-numbering="true" text:style-name="L5">
              <text:list-item>
                <text:p text:style-name="P18"><text:span text:style-name="T4">Argumentos:</text:span></text:p>
              </text:list-item>
            </text:list>
            <text:list text:style-name="L6">
              <text:list-item>
                <text:list>
                  <text:list-item>
                    <text:p text:style-name="P12"><text:span text:style-name="T18">limit</text:span><text:span text:style-name="T6">:</text:span><text:span text:style-name="T5"> limita a quantidade de correspondências (só no find_all). Exemplo: se limit = 7 retorna apenas as 7 primeiras ocorrências de uma tag;</text:span></text:p>
                  </text:list-item>
                  <text:list-item>
                    <text:p text:style-name="P21"><text:span text:style-name="T18">keywords</text:span><text:span text:style-name="T6">: </text:span><text:span text:style-name="T5">retorna tags que contenham um atributo ou conjunto de atributos específicos. Exemplo:</text:span></text:p>
                  </text:list-item>
                </text:list>
              </text:list-item>
            </text:list>
            <text:p text:style-name="P19"><text:span text:style-name="T23">title = bs.find_all(id='title', class_='text')</text:span></text:p>
            <text:list text:style-name="L23">
              <text:list-item>
                <text:list>
                  <text:list-item>
                    <text:list>
                      <text:list-item>
                        <text:p text:style-name="P17"><text:span text:style-name="T5">Retorna a primeira tag com as características passadas por parâmetro.</text:span></text:p>
                      </text:list-item>
                    </text:list>
                  </text:list-item>
                </text:list>
              </text:list-item>
            </text:list>
            <text:p text:style-name="P15"><text:span text:style-name="T5"/></text:p>
            <text:list text:style-name="L42">
              <text:list-item>
                <text:p text:style-name="P18"><text:span text:style-name="T32">Pesquisar sobre os outros objetos da BS4 (NavigableString e Comment).</text:span></text:p>
              </text:list-item>
            </text:list>
          </draw:text-box>
        </draw:frame>
        <draw:frame draw:name="Google Shape;270;p33"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65;g1e1c5045b18_0_82:notes" draw:style-name="gr2" draw:layer="layout" svg:width="12.699cm" svg:height="9.524cm" svg:x="3.176cm" svg:y="1.905cm" draw:page-number="21" presentation:class="page"/>
          <draw:frame draw:name="Google Shape;266;g1e1c5045b18_0_82:notes" presentation:style-name="pr24" draw:text-style-name="P9" draw:layer="layout" svg:width="15.239cm" svg:height="11.429cm" svg:x="1.905cm" svg:y="12.065cm" presentation:class="notes" presentation:placeholder="true" presentation:user-transformed="true">
            <draw:text-box/>
          </draw:frame>
        </presentation:notes>
      </draw:page>
      <draw:page draw:name="Exercício 2" draw:style-name="dp1" draw:master-page-name="OBJECT" presentation:presentation-page-layout-name="AL1T11">
        <draw:frame draw:name="Google Shape;275;p34" presentation:style-name="pr1" draw:text-style-name="P2" draw:layer="layout" svg:width="22.859cm" svg:height="3.175cm" svg:x="1.27cm" svg:y="0.763cm" presentation:class="title" presentation:user-transformed="true">
          <draw:text-box>
            <text:p text:style-name="P1"><text:span text:style-name="T1">Exercício 2</text:span></text:p>
          </draw:text-box>
        </draw:frame>
        <draw:frame draw:name="Google Shape;276;p34" presentation:style-name="pr25" draw:text-style-name="P5" draw:layer="layout" svg:width="24.037cm" svg:height="13.752cm" svg:x="0.702cm" svg:y="4.445cm" presentation:class="outline" presentation:user-transformed="true">
          <draw:text-box>
            <text:p text:style-name="P22"><text:span text:style-name="T33">Página Alvo:</text:span><text:span text:style-name="T2"> https://disciplinas.politecnico.ufsm.br/~dpadp0291/Scraping/catalogo_cursos.html</text:span></text:p>
            <text:list text:style-name="L44">
              <text:list-item>
                <text:p text:style-name="P22"><text:span text:style-name="T33">Analise o código HTML da página através da ferramenta de inspeção de elemento;</text:span></text:p>
              </text:list-item>
              <text:list-item>
                <text:p text:style-name="P23"><text:span text:style-name="T33">Acesse a Página:</text:span><text:span text:style-name="T2"> Use urlopen() para buscar o conteúdo da URL e crie um objeto BeautifulSoup para analisá-lo;</text:span></text:p>
              </text:list-item>
              <text:list-item>
                <text:p text:style-name="P23"><text:span text:style-name="T33">Liste os Cursos: </text:span><text:span text:style-name="T2">Utilize o método find_all() para encontrar todas as divs que representam um curso. A classe que identifica cada curso é curso-card;</text:span></text:p>
              </text:list-item>
              <text:list-item>
                <text:p text:style-name="P23"><text:span text:style-name="T33">Extraia os Dados:</text:span></text:p>
              </text:list-item>
            </text:list>
            <text:list text:style-name="L45">
              <text:list-item>
                <text:list>
                  <text:list-item>
                    <text:p text:style-name="P23"><text:span text:style-name="T2">Crie um loop for para percorrer a lista de cursos que você encontrou.</text:span></text:p>
                  </text:list-item>
                  <text:list-item>
                    <text:p text:style-name="P23"><text:span text:style-name="T2">para cada curso, use o método find() para localizar e extrair o texto das seguintes tags:</text:span></text:p>
                  </text:list-item>
                </text:list>
              </text:list-item>
            </text:list>
            <text:list text:style-name="L46">
              <text:list-item>
                <text:list>
                  <text:list-item>
                    <text:list>
                      <text:list-item>
                        <text:p text:style-name="P23"><text:span text:style-name="T33">Título:</text:span><text:span text:style-name="T2"> A tag h2 com a classe curso-titulo.</text:span></text:p>
                      </text:list-item>
                      <text:list-item>
                        <text:p text:style-name="P23"><text:span text:style-name="T33">Professor:</text:span><text:span text:style-name="T2"> A tag span com a classe curso-professor.</text:span></text:p>
                      </text:list-item>
                      <text:list-item>
                        <text:p text:style-name="P23"><text:span text:style-name="T33">Preço:</text:span><text:span text:style-name="T2"> A tag span com a classe valor.</text:span></text:p>
                      </text:list-item>
                    </text:list>
                  </text:list-item>
                </text:list>
              </text:list-item>
              <text:list-item>
                <text:p text:style-name="P23"><text:span text:style-name="T33">Imprima o Resultado:</text:span><text:span text:style-name="T2"> imprima os dados de cada curso de forma clara no console.</text:span></text:p>
              </text:list-item>
            </text:list>
          </draw:text-box>
        </draw:frame>
        <draw:frame draw:name="Google Shape;277;p34" presentation:style-name="pr3" draw:text-style-name="P8" draw:layer="layout" svg:width="5.926cm" svg:height="1.013cm" svg:x="18.203cm" svg:y="17.657cm" presentation:class="page-number" presentation:user-transformed="true">
          <draw:text-box>
            <text:p text:style-name="P7"><text:span text:style-name="T19"><text:page-number>&lt;number&gt;</text:page-number></text:span></text:p>
          </draw:text-box>
        </draw:frame>
        <presentation:notes draw:style-name="dp2">
          <draw:page-thumbnail draw:name="Google Shape;272;g37fb4bc2be9_0_0:notes" draw:style-name="gr2" draw:layer="layout" svg:width="12.699cm" svg:height="9.524cm" svg:x="3.176cm" svg:y="1.905cm" draw:page-number="22" presentation:class="page"/>
          <draw:frame draw:name="Google Shape;273;g37fb4bc2be9_0_0:notes" presentation:style-name="pr26" draw:text-style-name="P9" draw:layer="layout" svg:width="15.239cm" svg:height="11.429cm" svg:x="1.905cm" svg:y="12.065cm" presentation:class="notes" presentation:placeholder="true" presentation:user-transformed="true">
            <draw:text-box/>
          </draw:frame>
        </presentation:notes>
      </draw:page>
      <draw:page draw:name="Exercício 3" draw:style-name="dp1" draw:master-page-name="OBJECT" presentation:presentation-page-layout-name="AL1T11">
        <draw:frame draw:name="Google Shape;282;p35" presentation:style-name="pr1" draw:text-style-name="P2" draw:layer="layout" svg:width="22.859cm" svg:height="3.175cm" svg:x="1.27cm" svg:y="0.763cm" presentation:class="title" presentation:user-transformed="true">
          <draw:text-box>
            <text:p text:style-name="P1"><text:span text:style-name="T1">Exercício 3</text:span></text:p>
          </draw:text-box>
        </draw:frame>
        <draw:frame draw:name="Google Shape;283;p35" presentation:style-name="pr2" draw:text-style-name="P5" draw:layer="layout" svg:width="22.859cm" svg:height="14.238cm" svg:x="1.27cm" svg:y="4.445cm" presentation:class="outline" presentation:user-transformed="true">
          <draw:text-box>
            <text:list text:style-name="L5">
              <text:list-item>
                <text:p text:style-name="P14"><text:span text:style-name="T4">Criar um scraper para buscar todas as tags </text:span><text:span text:style-name="T13">header</text:span><text:span text:style-name="T4"> da página principal;</text:span></text:p>
              </text:list-item>
            </text:list>
            <text:p text:style-name="P15"><text:span text:style-name="T4"/></text:p>
            <text:list text:continue-numbering="true" text:style-name="L5">
              <text:list-item>
                <text:p text:style-name="P18"><text:span text:style-name="T4">Pesquise como criar um scraper para buscar todos os links de uma página que fale sobre python (Regex?);</text:span></text:p>
              </text:list-item>
            </text:list>
            <text:p text:style-name="P15"><text:span text:style-name="T4"/></text:p>
            <text:p text:style-name="P18"><text:span text:style-name="T4"/></text:p>
          </draw:text-box>
        </draw:frame>
        <draw:frame draw:name="Google Shape;284;p35"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79;g1e22245eb12_1_6:notes" draw:style-name="gr2" draw:layer="layout" svg:width="12.699cm" svg:height="9.524cm" svg:x="3.176cm" svg:y="1.905cm" draw:page-number="23" presentation:class="page"/>
          <draw:frame draw:name="Google Shape;280;g1e22245eb12_1_6:notes" presentation:style-name="pr27" draw:text-style-name="P9" draw:layer="layout" svg:width="15.239cm" svg:height="11.429cm" svg:x="1.905cm" svg:y="12.065cm" presentation:class="notes" presentation:placeholder="true" presentation:user-transformed="true">
            <draw:text-box/>
          </draw:frame>
        </presentation:notes>
      </draw:page>
      <draw:page draw:name="Navegação em árvores" draw:style-name="dp1" draw:master-page-name="OBJECT" presentation:presentation-page-layout-name="AL1T11">
        <draw:frame draw:name="Google Shape;289;p36" presentation:style-name="pr1" draw:text-style-name="P2" draw:layer="layout" svg:width="22.859cm" svg:height="3.175cm" svg:x="1.27cm" svg:y="0.763cm" presentation:class="title" presentation:user-transformed="true">
          <draw:text-box>
            <text:p text:style-name="P1"><text:span text:style-name="T1">Navegação em árvores</text:span></text:p>
          </draw:text-box>
        </draw:frame>
        <draw:frame draw:name="Google Shape;290;p36" presentation:style-name="pr2" draw:text-style-name="P5" draw:layer="layout" svg:width="22.859cm" svg:height="12.572cm" svg:x="1.27cm" svg:y="4.445cm" presentation:class="outline" presentation:user-transformed="true">
          <draw:text-box>
            <text:list text:style-name="L5">
              <text:list-item>
                <text:p text:style-name="P14"><text:span text:style-name="T4">Função </text:span><text:span text:style-name="T13">find_all()</text:span><text:span text:style-name="T4"> para encontrar tags baseadas em seus nomes ou atributos;</text:span></text:p>
              </text:list-item>
            </text:list>
            <text:p text:style-name="P15"><text:span text:style-name="T4"/></text:p>
            <text:list text:continue-numbering="true" text:style-name="L5">
              <text:list-item>
                <text:p text:style-name="P18"><text:span text:style-name="T4">E se a busca por uma tag fosse baseada na sua posição dentro do documento HMTL?</text:span></text:p>
              </text:list-item>
            </text:list>
            <text:p text:style-name="P15"><text:span text:style-name="T4"/></text:p>
            <text:list text:continue-numbering="true" text:style-name="L5">
              <text:list-item>
                <text:p text:style-name="P18"><text:span text:style-name="T4">BS4 permite navegar em todas as direções de uma estrutura HTML (para cima, para baixo ou lateral);</text:span></text:p>
              </text:list-item>
            </text:list>
            <text:p text:style-name="P15"><text:span text:style-name="T4"/></text:p>
            <text:list text:continue-numbering="true" text:style-name="L5">
              <text:list-item>
                <text:p text:style-name="P18"><text:span text:style-name="T4">Analisar a seguinte página: </text:span><text:span text:style-name="T24"><text:a xlink:href="http://www.pythonscraping.com/pages/page3.html" xlink:type="simple">http://www.pythonscraping.com/pages/page3.html</text:a></text:span></text:p>
              </text:list-item>
            </text:list>
          </draw:text-box>
        </draw:frame>
        <draw:frame draw:name="Google Shape;291;p36"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86;g1e1c5045b18_0_88:notes" draw:style-name="gr2" draw:layer="layout" svg:width="12.699cm" svg:height="9.524cm" svg:x="3.176cm" svg:y="1.905cm" draw:page-number="24" presentation:class="page"/>
          <draw:frame draw:name="Google Shape;287;g1e1c5045b18_0_88:notes" presentation:style-name="pr28" draw:text-style-name="P9" draw:layer="layout" svg:width="15.239cm" svg:height="11.429cm" svg:x="1.905cm" svg:y="12.065cm" presentation:class="notes" presentation:placeholder="true" presentation:user-transformed="true">
            <draw:text-box/>
          </draw:frame>
        </presentation:notes>
      </draw:page>
      <draw:page draw:name="Navegação em árvores" draw:style-name="dp1" draw:master-page-name="OBJECT" presentation:presentation-page-layout-name="AL1T11">
        <draw:frame draw:name="Google Shape;296;p37" presentation:style-name="pr1" draw:text-style-name="P2" draw:layer="layout" svg:width="22.859cm" svg:height="3.175cm" svg:x="1.27cm" svg:y="0.763cm" presentation:class="title" presentation:user-transformed="true">
          <draw:text-box>
            <text:p text:style-name="P1"><text:span text:style-name="T1">Navegação em árvores</text:span></text:p>
          </draw:text-box>
        </draw:frame>
        <draw:frame draw:name="Google Shape;297;p37" presentation:style-name="pr2" draw:text-style-name="P5" draw:layer="layout" svg:width="22.859cm" svg:height="14.305cm" svg:x="1.27cm" svg:y="4.445cm" presentation:class="outline" presentation:user-transformed="true">
          <draw:text-box>
            <text:list text:style-name="L29">
              <text:list-item>
                <text:p text:style-name="P14"><text:span text:style-name="T4">Estrutura:</text:span></text:p>
              </text:list-item>
            </text:list>
            <text:list text:style-name="L30">
              <text:list-item>
                <text:list>
                  <text:list-item>
                    <text:p text:style-name="P10"><text:span text:style-name="T5">HTML</text:span></text:p>
                  </text:list-item>
                </text:list>
              </text:list-item>
            </text:list>
            <text:list text:style-name="L47">
              <text:list-item>
                <text:list>
                  <text:list-item>
                    <text:list>
                      <text:list-item>
                        <text:p text:style-name="P10"><text:span text:style-name="T5">body</text:span></text:p>
                      </text:list-item>
                    </text:list>
                  </text:list-item>
                </text:list>
              </text:list-item>
            </text:list>
            <text:list text:style-name="L48">
              <text:list-item>
                <text:list>
                  <text:list-item>
                    <text:list>
                      <text:list-item>
                        <text:list>
                          <text:list-item>
                            <text:p text:style-name="P10"><text:span text:style-name="T5">div.wrapper</text:span></text:p>
                          </text:list-item>
                        </text:list>
                      </text:list-item>
                    </text:list>
                  </text:list-item>
                </text:list>
              </text:list-item>
            </text:list>
            <text:list text:style-name="L49">
              <text:list-item>
                <text:list>
                  <text:list-item>
                    <text:list>
                      <text:list-item>
                        <text:list>
                          <text:list-item>
                            <text:list>
                              <text:list-item>
                                <text:p text:style-name="P10"><text:span text:style-name="T5">h1</text:span></text:p>
                              </text:list-item>
                              <text:list-item>
                                <text:p text:style-name="P10"><text:span text:style-name="T5">div.content</text:span></text:p>
                              </text:list-item>
                              <text:list-item>
                                <text:p text:style-name="P10"><text:span text:style-name="T5">table#giftList</text:span></text:p>
                              </text:list-item>
                            </text:list>
                          </text:list-item>
                        </text:list>
                      </text:list-item>
                    </text:list>
                  </text:list-item>
                </text:list>
              </text:list-item>
            </text:list>
            <text:list text:style-name="L50">
              <text:list-item>
                <text:list>
                  <text:list-item>
                    <text:list>
                      <text:list-item>
                        <text:list>
                          <text:list-item>
                            <text:list>
                              <text:list-item>
                                <text:list>
                                  <text:list-item>
                                    <text:p text:style-name="P10"><text:span text:style-name="T5">tr</text:span></text:p>
                                  </text:list-item>
                                </text:list>
                              </text:list-item>
                            </text:list>
                          </text:list-item>
                        </text:list>
                      </text:list-item>
                    </text:list>
                  </text:list-item>
                </text:list>
              </text:list-item>
            </text:list>
            <text:list text:style-name="L51">
              <text:list-item>
                <text:list>
                  <text:list-item>
                    <text:list>
                      <text:list-item>
                        <text:list>
                          <text:list-item>
                            <text:list>
                              <text:list-item>
                                <text:list>
                                  <text:list-item>
                                    <text:list>
                                      <text:list-item>
                                        <text:p text:style-name="P10"><text:span text:style-name="T5">th</text:span></text:p>
                                      </text:list-item>
                                      <text:list-item>
                                        <text:p text:style-name="P10"><text:span text:style-name="T5">th</text:span></text:p>
                                      </text:list-item>
                                      <text:list-item>
                                        <text:p text:style-name="P10"><text:span text:style-name="T5">th</text:span></text:p>
                                      </text:list-item>
                                      <text:list-item>
                                        <text:p text:style-name="P10"><text:span text:style-name="T5">th</text:span></text:p>
                                      </text:list-item>
                                    </text:list>
                                  </text:list-item>
                                  <text:list-item>
                                    <text:p text:style-name="P10"><text:span text:style-name="T5">tr.gift#gift1</text:span></text:p>
                                    <text:list>
                                      <text:list-item>
                                        <text:p text:style-name="P10"><text:span text:style-name="T5">td</text:span></text:p>
                                      </text:list-item>
                                      <text:list-item>
                                        <text:p text:style-name="P10"><text:span text:style-name="T5">td</text:span></text:p>
                                      </text:list-item>
                                      <text:list-item>
                                        <text:p text:style-name="P10"><text:span text:style-name="T5">span.excitingNote</text:span></text:p>
                                      </text:list-item>
                                      <text:list-item>
                                        <text:p text:style-name="P10"><text:span text:style-name="T5">td</text:span></text:p>
                                      </text:list-item>
                                      <text:list-item>
                                        <text:p text:style-name="P10"><text:span text:style-name="T5">td</text:span></text:p>
                                      </text:list-item>
                                    </text:list>
                                  </text:list-item>
                                </text:list>
                              </text:list-item>
                            </text:list>
                          </text:list-item>
                        </text:list>
                      </text:list-item>
                    </text:list>
                  </text:list-item>
                </text:list>
              </text:list-item>
            </text:list>
            <text:list text:style-name="L52">
              <text:list-item>
                <text:list>
                  <text:list-item>
                    <text:list>
                      <text:list-item>
                        <text:list>
                          <text:list-item>
                            <text:list>
                              <text:list-item>
                                <text:list>
                                  <text:list-item>
                                    <text:list>
                                      <text:list-item>
                                        <text:list>
                                          <text:list-item>
                                            <text:p text:style-name="P10"><text:span text:style-name="T5">img</text:span></text:p>
                                          </text:list-item>
                                        </text:list>
                                      </text:list-item>
                                    </text:list>
                                  </text:list-item>
                                  <text:list-item>
                                    <text:p text:style-name="P10"><text:span text:style-name="T5">... outras linhas da tabela...</text:span></text:p>
                                  </text:list-item>
                                  <text:list-item>
                                    <text:p text:style-name="P10"><text:span text:style-name="T5">div.footer</text:span></text:p>
                                  </text:list-item>
                                </text:list>
                              </text:list-item>
                            </text:list>
                          </text:list-item>
                        </text:list>
                      </text:list-item>
                    </text:list>
                  </text:list-item>
                </text:list>
              </text:list-item>
            </text:list>
          </draw:text-box>
        </draw:frame>
        <draw:frame draw:name="Google Shape;298;p37"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293;g1e209daad52_0_1:notes" draw:style-name="gr2" draw:layer="layout" svg:width="12.699cm" svg:height="9.524cm" svg:x="3.176cm" svg:y="1.905cm" draw:page-number="25" presentation:class="page"/>
          <draw:frame draw:name="Google Shape;294;g1e209daad52_0_1:notes" presentation:style-name="pr29" draw:text-style-name="P9" draw:layer="layout" svg:width="15.239cm" svg:height="11.429cm" svg:x="1.905cm" svg:y="12.065cm" presentation:class="notes" presentation:placeholder="true" presentation:user-transformed="true">
            <draw:text-box/>
          </draw:frame>
        </presentation:notes>
      </draw:page>
      <draw:page draw:name="Filhos e descendentes" draw:style-name="dp1" draw:master-page-name="OBJECT" presentation:presentation-page-layout-name="AL1T11">
        <draw:frame draw:name="Google Shape;303;p38" presentation:style-name="pr1" draw:text-style-name="P2" draw:layer="layout" svg:width="22.859cm" svg:height="3.175cm" svg:x="1.27cm" svg:y="0.763cm" presentation:class="title" presentation:user-transformed="true">
          <draw:text-box>
            <text:p text:style-name="P1"><text:span text:style-name="T1">Filhos e descendentes</text:span></text:p>
          </draw:text-box>
        </draw:frame>
        <draw:frame draw:name="Google Shape;304;p38" presentation:style-name="pr2" draw:text-style-name="P5" draw:layer="layout" svg:width="22.859cm" svg:height="12.572cm" svg:x="1.27cm" svg:y="4.445cm" presentation:class="outline" presentation:user-transformed="true">
          <draw:text-box>
            <text:list text:style-name="L5">
              <text:list-item>
                <text:p text:style-name="P14"><text:span text:style-name="T34">Filhos:</text:span><text:span text:style-name="T4"> elementos que estão a apenas um nível abaixo de uma tag específica;</text:span></text:p>
              </text:list-item>
              <text:list-item>
                <text:p text:style-name="P24"><text:span text:style-name="T34">Descendentes:</text:span><text:span text:style-name="T4"> elementos que estão em qualquer nível mais profundo de uma tag específica;</text:span></text:p>
              </text:list-item>
              <text:list-item>
                <text:p text:style-name="P24"><text:span text:style-name="T4">BS4 sempre lida com descendentes da tag selecionada. Exemplos:</text:span></text:p>
              </text:list-item>
            </text:list>
            <text:list text:style-name="L6">
              <text:list-item>
                <text:list>
                  <text:list-item>
                    <text:p text:style-name="P24"><text:span text:style-name="T30">bs.body.h1:</text:span><text:span text:style-name="T5"> retorna a primeira tag h1 dentro de body;</text:span></text:p>
                  </text:list-item>
                  <text:list-item>
                    <text:p text:style-name="P25"><text:span text:style-name="T30">bs.div.find_all(‘img’):</text:span><text:span text:style-name="T5"> retorna a primeira tag div do documento e então cria uma lista com todas as tags img que estão dentro dessa div.</text:span></text:p>
                  </text:list-item>
                </text:list>
              </text:list-item>
            </text:list>
          </draw:text-box>
        </draw:frame>
        <draw:frame draw:name="Google Shape;305;p38"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300;g1e209daad52_0_8:notes" draw:style-name="gr2" draw:layer="layout" svg:width="12.699cm" svg:height="9.524cm" svg:x="3.176cm" svg:y="1.905cm" draw:page-number="26" presentation:class="page"/>
          <draw:frame draw:name="Google Shape;301;g1e209daad52_0_8:notes" presentation:style-name="pr30" draw:text-style-name="P9" draw:layer="layout" svg:width="15.239cm" svg:height="11.429cm" svg:x="1.905cm" svg:y="12.065cm" presentation:class="notes" presentation:placeholder="true" presentation:user-transformed="true">
            <draw:text-box/>
          </draw:frame>
        </presentation:notes>
      </draw:page>
      <draw:page draw:name="Filhos e descendentes" draw:style-name="dp1" draw:master-page-name="OBJECT" presentation:presentation-page-layout-name="AL1T11">
        <draw:frame draw:name="Google Shape;310;p39" presentation:style-name="pr1" draw:text-style-name="P2" draw:layer="layout" svg:width="22.859cm" svg:height="3.175cm" svg:x="1.27cm" svg:y="0.763cm" presentation:class="title" presentation:user-transformed="true">
          <draw:text-box>
            <text:p text:style-name="P1"><text:span text:style-name="T1">Filhos e descendentes</text:span></text:p>
          </draw:text-box>
        </draw:frame>
        <draw:frame draw:name="Google Shape;311;p39" presentation:style-name="pr2" draw:text-style-name="P5" draw:layer="layout" svg:width="22.859cm" svg:height="7.39cm" svg:x="1.27cm" svg:y="4.445cm" presentation:class="outline" presentation:user-transformed="true">
          <draw:text-box>
            <text:p text:style-name="P18"><text:span text:style-name="T23">from urllib.request import urlopen</text:span></text:p>
            <text:p text:style-name="P18"><text:span text:style-name="T23">from bs4 import BeautifulSoup</text:span></text:p>
            <text:p text:style-name="P18"><text:span text:style-name="T23"/></text:p>
            <text:p text:style-name="P18"><text:span text:style-name="T23">html = urlopen('http://www.pythonscraping.com/pages/page3.html')</text:span></text:p>
            <text:p text:style-name="P18"><text:span text:style-name="T23">bs = BeautifulSoup(html, 'html.parser')</text:span></text:p>
            <text:p text:style-name="P18"><text:span text:style-name="T23">for child in bs.find('table',{'id':'giftList'}).</text:span><text:span text:style-name="T31">children</text:span><text:span text:style-name="T23">:</text:span></text:p>
            <text:p text:style-name="P26"><text:span text:style-name="T23">print(child)</text:span></text:p>
          </draw:text-box>
        </draw:frame>
        <draw:custom-shape draw:name="Google Shape;312;p39" draw:style-name="gr6" draw:text-style-name="P6" draw:layer="layout" svg:width="22.6cm" svg:height="3.897cm" svg:x="1.529cm" svg:y="12.866cm">
          <text:list text:style-name="L54">
            <text:list-item>
              <text:p text:style-name="P10"><text:span text:style-name="T5">Retorna a lista das linhas de produto da tabela giftlist, incluindo o cabeçalho;</text:span></text:p>
            </text:list-item>
            <text:list-item>
              <text:p text:style-name="P10"><text:span text:style-name="T7">.descendants()</text:span><text:span text:style-name="T5">: retornaria todas as tags descendentes de giftlist, ao invés de só os filhos. Isso inclui img, span e td individua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39"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307;g1e209daad52_0_13:notes" draw:style-name="gr2" draw:layer="layout" svg:width="12.699cm" svg:height="9.524cm" svg:x="3.176cm" svg:y="1.905cm" draw:page-number="27" presentation:class="page"/>
          <draw:frame draw:name="Google Shape;308;g1e209daad52_0_13:notes" presentation:style-name="pr31" draw:text-style-name="P9" draw:layer="layout" svg:width="15.239cm" svg:height="11.429cm" svg:x="1.905cm" svg:y="12.065cm" presentation:class="notes" presentation:placeholder="true" presentation:user-transformed="true">
            <draw:text-box/>
          </draw:frame>
        </presentation:notes>
      </draw:page>
      <draw:page draw:name="Irmãos" draw:style-name="dp1" draw:master-page-name="OBJECT" presentation:presentation-page-layout-name="AL1T11">
        <draw:frame draw:name="Google Shape;318;p40" presentation:style-name="pr1" draw:text-style-name="P2" draw:layer="layout" svg:width="22.859cm" svg:height="3.175cm" svg:x="1.27cm" svg:y="0.763cm" presentation:class="title" presentation:user-transformed="true">
          <draw:text-box>
            <text:p text:style-name="P1"><text:span text:style-name="T1">Irmãos</text:span></text:p>
          </draw:text-box>
        </draw:frame>
        <draw:frame draw:name="Google Shape;319;p40" presentation:style-name="pr2" draw:text-style-name="P5" draw:layer="layout" svg:width="22.859cm" svg:height="8.607cm" svg:x="1.482cm" svg:y="9.68cm" presentation:class="outline" presentation:user-transformed="true">
          <draw:text-box>
            <text:list text:style-name="L55">
              <text:list-item>
                <text:p text:style-name="P27"><text:span text:style-name="T5">Retorna todas as linhas da tabela que estão após a tag selecionada, excluindo ela própria (ninguém é irmão de si mesmo!);</text:span></text:p>
              </text:list-item>
            </text:list>
            <text:p text:style-name="P28"><text:span text:style-name="T5"/></text:p>
            <text:list text:continue-numbering="true" text:style-name="L55">
              <text:list-item>
                <text:p text:style-name="P29"><text:span text:style-name="T7">.next_sibling()</text:span><text:span text:style-name="T5">: devolve apenas o irmão mais próximo a partir da tag selecionada;</text:span></text:p>
              </text:list-item>
            </text:list>
            <text:p text:style-name="P28"><text:span text:style-name="T5"/></text:p>
            <text:list text:continue-numbering="true" text:style-name="L55">
              <text:list-item>
                <text:p text:style-name="P29"><text:span text:style-name="T7">.previous_siblings()</text:span><text:span text:style-name="T5">: devolve todas as tags de mesmo nível que aparecem antes da tag selecionada na estrutura HTML;</text:span></text:p>
              </text:list-item>
            </text:list>
            <text:p text:style-name="P28"><text:span text:style-name="T5"/></text:p>
            <text:list text:continue-numbering="true" text:style-name="L55">
              <text:list-item>
                <text:p text:style-name="P29"><text:span text:style-name="T7">.previous_sibling()</text:span><text:span text:style-name="T5">: devolve apenas o irmão mais próximo que está antes da tag selecionada.</text:span></text:p>
              </text:list-item>
            </text:list>
          </draw:text-box>
        </draw:frame>
        <draw:custom-shape draw:name="Google Shape;320;p40" draw:style-name="gr6" draw:text-style-name="P6" draw:layer="layout" svg:width="22.859cm" svg:height="3.213cm" svg:x="1.27cm" svg:y="4.685cm">
          <text:p text:style-name="P12"><text:span text:style-name="T21">html = urlopen('http://www.pythonscraping.com/pages/page3.html')</text:span></text:p>
          <text:p text:style-name="P12"><text:span text:style-name="T21">bs = BeautifulSoup(html, 'html.parser')</text:span></text:p>
          <text:p text:style-name="P12"><text:span text:style-name="T21">for sibling in bs.find('table', {'id':'giftList'}).tr.</text:span><text:span text:style-name="T22">next_siblings</text:span><text:span text:style-name="T21">:</text:span></text:p>
          <text:p text:style-name="P30"><text:span text:style-name="T21">print(sib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1;p40"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315;g1e209daad52_0_20:notes" draw:style-name="gr2" draw:layer="layout" svg:width="12.699cm" svg:height="9.524cm" svg:x="3.176cm" svg:y="1.905cm" draw:page-number="28" presentation:class="page"/>
          <draw:frame draw:name="Google Shape;316;g1e209daad52_0_20:notes" presentation:style-name="pr32" draw:text-style-name="P9" draw:layer="layout" svg:width="15.239cm" svg:height="11.429cm" svg:x="1.905cm" svg:y="12.065cm" presentation:class="notes" presentation:placeholder="true" presentation:user-transformed="true">
            <draw:text-box/>
          </draw:frame>
        </presentation:notes>
      </draw:page>
      <draw:page draw:name="Pais" draw:style-name="dp1" draw:master-page-name="OBJECT" presentation:presentation-page-layout-name="AL1T11">
        <draw:frame draw:name="Google Shape;326;p41" presentation:style-name="pr1" draw:text-style-name="P2" draw:layer="layout" svg:width="22.859cm" svg:height="3.175cm" svg:x="1.27cm" svg:y="0.763cm" presentation:class="title" presentation:user-transformed="true">
          <draw:text-box>
            <text:p text:style-name="P1"><text:span text:style-name="T1">Pais</text:span></text:p>
          </draw:text-box>
        </draw:frame>
        <draw:frame draw:name="Google Shape;327;p41" presentation:style-name="pr2" draw:text-style-name="P5" draw:layer="layout" svg:width="22.859cm" svg:height="8.221cm" svg:x="1.27cm" svg:y="4.445cm" presentation:class="outline" presentation:user-transformed="true">
          <draw:text-box>
            <text:list text:style-name="L55">
              <text:list-item>
                <text:p text:style-name="P14"><text:span text:style-name="T5">Menos comum que as anteriores, pois normalmente, ao analisar HTML, usa-se uma tag específica como sendo de mais alto nível e observa-se as seguintes (mais profundas);</text:span></text:p>
              </text:list-item>
            </text:list>
            <text:p text:style-name="P15"><text:span text:style-name="T5"/></text:p>
            <text:list text:continue-numbering="true" text:style-name="L55">
              <text:list-item>
                <text:p text:style-name="P18"><text:span text:style-name="T5">Mas, para casos específicos, onde deve-se buscar pelos pais de tags, pode-se utilizar as funções parent() e parents():</text:span></text:p>
              </text:list-item>
            </text:list>
            <text:p text:style-name="P15"><text:span text:style-name="T25">print(bs.find('img',{'src':'</text:span><text:span text:style-name="T35">../img/gifts/img1.jpg'</text:span><text:span text:style-name="T25">})</text:span></text:p>
            <text:p text:style-name="P31"><text:span text:style-name="T25">.</text:span><text:span text:style-name="T36">parent</text:span><text:span text:style-name="T25">.</text:span><text:span text:style-name="T37">previous_sibling</text:span><text:span text:style-name="T25">.</text:span><text:span text:style-name="T38">get_text()</text:span><text:span text:style-name="T25">)</text:span></text:p>
          </draw:text-box>
        </draw:frame>
        <draw:custom-shape draw:name="Google Shape;328;p41" draw:style-name="gr6" draw:text-style-name="P6" draw:layer="layout" svg:width="16.755cm" svg:height="6.438cm" svg:x="1.729cm" svg:y="12.201cm">
          <text:p text:style-name="P12"><text:span text:style-name="T5">• </text:span><text:span text:style-name="T5">&lt;tr&gt;</text:span></text:p>
          <text:p text:style-name="P12"><text:span text:style-name="T5"><text:s text:c="3"/>– </text:span><text:span text:style-name="T5">td</text:span></text:p>
          <text:p text:style-name="P12"><text:span text:style-name="T5"><text:s text:c="3"/>– </text:span><text:span text:style-name="T5">td</text:span></text:p>
          <text:p text:style-name="P12"><text:span text:style-name="T5"><text:s text:c="3"/>– </text:span><text:span text:style-name="T5">td </text:span></text:p>
          <text:p text:style-name="P12"><text:span text:style-name="T5"><text:s text:c="7"/>– </text:span><text:span text:style-name="T5">"$15.00" </text:span></text:p>
          <text:p text:style-name="P12"><text:span text:style-name="T5"><text:s text:c="3"/>– </text:span><text:span text:style-name="T5">td </text:span></text:p>
          <text:p text:style-name="P12"><text:span text:style-name="T5"><text:s text:c="6"/>– </text:span><text:span text:style-name="T5">&lt;img src="../img/gifts/img1.jpg"&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9;p41" xml:id="id1" draw:id="id1">
          <draw:custom-shape draw:name="Google Shape;330;p41" draw:style-name="gr6" draw:text-style-name="P6" draw:layer="layout" svg:width="11.037cm" svg:height="1.101cm" svg:x="15.227cm" svg:y="17.5cm">
            <text:p text:style-name="P12"><text:span text:style-name="T39">1. encontra tag de ima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41" draw:style-name="gr5" draw:text-style-name="P13" draw:layer="layout" svg:width="1.894cm" svg:height="0.002cm" svg:x="13.332cm" svg:y="18.052cm">
            <text:p/>
            <draw:enhanced-geometry draw:mirror-horizontal="false" draw:mirror-vertical="false" svg:viewBox="0 0 21600 21600" draw:type="mso-spt32" draw:enhanced-path="M 0 0 L 21600 21600 N"/>
          </draw:custom-shape>
        </draw:g>
        <draw:g draw:name="Google Shape;332;p41" xml:id="id2" draw:id="id2">
          <draw:custom-shape draw:name="Google Shape;333;p41" draw:style-name="gr6" draw:text-style-name="P6" draw:layer="layout" svg:width="11.037cm" svg:height="1.101cm" svg:x="6.762cm" svg:y="16.495cm">
            <text:p text:style-name="P12"><text:span text:style-name="T40">2. Busca o pai da tag de ima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41" draw:style-name="gr5" draw:text-style-name="P13" draw:layer="layout" svg:width="2.539cm" svg:height="0.027cm" svg:x="4.222cm" svg:y="17.022cm">
            <text:p/>
            <draw:enhanced-geometry draw:mirror-horizontal="false" draw:mirror-vertical="false" svg:viewBox="0 0 21600 21600" draw:type="mso-spt32" draw:enhanced-path="M 0 0 L 21600 21600 N"/>
          </draw:custom-shape>
        </draw:g>
        <draw:g draw:name="Google Shape;335;p41" xml:id="id4" draw:id="id4">
          <draw:custom-shape draw:name="Google Shape;336;p41" draw:style-name="gr6" draw:text-style-name="P6" draw:layer="layout" svg:width="11.037cm" svg:height="1.101cm" svg:x="8.714cm" svg:y="15.704cm">
            <text:p text:style-name="P12"><text:span text:style-name="T41">4. Recupera o texto da t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41" draw:style-name="gr5" draw:text-style-name="P13" draw:layer="layout" svg:width="2.197cm" svg:height="0.002cm" svg:x="6.516cm" svg:y="16.258cm">
            <text:p/>
            <draw:enhanced-geometry draw:mirror-horizontal="false" draw:mirror-vertical="false" svg:viewBox="0 0 21600 21600" draw:type="mso-spt32" draw:enhanced-path="M 0 0 L 21600 21600 N"/>
          </draw:custom-shape>
        </draw:g>
        <draw:g draw:name="Google Shape;338;p41" xml:id="id3" draw:id="id3">
          <draw:custom-shape draw:name="Google Shape;339;p41" draw:style-name="gr6" draw:text-style-name="P6" draw:layer="layout" svg:width="11.037cm" svg:height="1.101cm" svg:x="6.809cm" svg:y="14.935cm">
            <text:p text:style-name="P12"><text:span text:style-name="T42">3. Navega até o irmão anterior d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1" draw:style-name="gr5" draw:text-style-name="P13" draw:layer="layout" svg:width="2.852cm" svg:height="0.001cm" draw:transform="rotate (-3.14159265358979) translate (6.809cm 15.493cm)">
            <text:p/>
            <draw:enhanced-geometry draw:mirror-horizontal="true" draw:mirror-vertical="false" svg:viewBox="0 0 21600 21600" draw:type="mso-spt32" draw:enhanced-path="M 0 0 L 21600 21600 N"/>
          </draw:custom-shape>
        </draw:g>
        <draw:frame draw:name="Google Shape;341;p41"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323;g1e209daad52_0_34:notes" draw:style-name="gr2" draw:layer="layout" svg:width="12.699cm" svg:height="9.524cm" svg:x="3.176cm" svg:y="1.905cm" draw:page-number="29" presentation:class="page"/>
          <draw:frame draw:name="Google Shape;324;g1e209daad52_0_34:notes" presentation:style-name="pr33" draw:text-style-name="P9" draw:layer="layout" svg:width="15.239cm" svg:height="11.429cm" svg:x="1.905cm" svg:y="12.065cm" presentation:class="notes" presentation:placeholder="true" presentation:user-transformed="true">
            <draw:text-box/>
          </draw:frame>
        </presentation:notes>
      </draw:page>
      <draw:page draw:name="Exercício 4" draw:style-name="dp1" draw:master-page-name="OBJECT" presentation:presentation-page-layout-name="AL1T11">
        <draw:frame draw:name="Google Shape;346;p42" presentation:style-name="pr1" draw:text-style-name="P2" draw:layer="layout" svg:width="22.859cm" svg:height="3.175cm" svg:x="1.27cm" svg:y="0.763cm" presentation:class="title" presentation:user-transformed="true">
          <draw:text-box>
            <text:p text:style-name="P1"><text:span text:style-name="T1">Exercício 4</text:span></text:p>
          </draw:text-box>
        </draw:frame>
        <draw:frame draw:name="Google Shape;347;p42" presentation:style-name="pr25" draw:text-style-name="P5" draw:layer="layout" svg:width="22.859cm" svg:height="12.572cm" svg:x="1.27cm" svg:y="4.445cm" presentation:class="outline" presentation:user-transformed="true">
          <draw:text-box>
            <text:p text:style-name="P22"><text:span text:style-name="T43">Página Alvo:</text:span><text:span text:style-name="T44"> </text:span><text:span text:style-name="T45"><text:a xlink:href="https://disciplinas.politecnico.ufsm.br/~dpadp0291/Scraping/catalogo_cursos.html" xlink:type="simple">https://disciplinas.politecnico.ufsm.br/~dpadp0291/Scraping/catalogo_cursos.html</text:a></text:span></text:p>
            <text:p text:style-name="P22"><text:span text:style-name="T43">Setup:</text:span><text:span text:style-name="T44"> Acesse a URL, faça o parsing do conteúdo e selecione a primeira &lt;div class="curso-card"&gt; com o método find().</text:span></text:p>
            <text:p text:style-name="P22"><text:span text:style-name="T43">Tarefas:</text:span><text:span text:style-name="T44"> A partir do elemento do primeiro curso encontrado, execute e imprima o resultado das seguintes ações:</text:span></text:p>
            <text:list text:style-name="L57">
              <text:list-item>
                <text:p text:style-name="P22"><text:span text:style-name="T43">Filhos:</text:span><text:span text:style-name="T44"> Itere sobre os </text:span><text:span text:style-name="T46">.children</text:span><text:span text:style-name="T44"> do elemento e imprima o nome (</text:span><text:span text:style-name="T46">.name</text:span><text:span text:style-name="T44">) de cada tag filha.</text:span></text:p>
              </text:list-item>
              <text:list-item>
                <text:p text:style-name="P23"><text:span text:style-name="T43">Irmão:</text:span><text:span text:style-name="T44"> Encontre o</text:span><text:span text:style-name="T46"> &lt;span&gt; </text:span><text:span text:style-name="T44">com a classe curso-professor. A partir dele, use </text:span><text:span text:style-name="T46">.find_next_sibling('span')</text:span><text:span text:style-name="T44"> para encontrar e imprimir o texto da tag de duração.</text:span></text:p>
              </text:list-item>
              <text:list-item>
                <text:p text:style-name="P23"><text:span text:style-name="T43">Pai:</text:span><text:span text:style-name="T44"> Encontre o </text:span><text:span text:style-name="T46">&lt;span&gt;</text:span><text:span text:style-name="T44"> com a classe valor. Use .parent para imprimir o texto completo do seu elemento pai.</text:span></text:p>
              </text:list-item>
            </text:list>
          </draw:text-box>
        </draw:frame>
        <draw:frame draw:name="Google Shape;348;p42" presentation:style-name="pr3" draw:text-style-name="P8" draw:layer="layout" svg:width="5.926cm" svg:height="1.013cm" svg:x="18.203cm" svg:y="17.657cm" presentation:class="page-number" presentation:user-transformed="true">
          <draw:text-box>
            <text:p text:style-name="P7"><text:span text:style-name="T3"><text:page-number>&lt;number&gt;</text:page-number></text:span></text:p>
          </draw:text-box>
        </draw:frame>
        <presentation:notes draw:style-name="dp2">
          <draw:page-thumbnail draw:name="Google Shape;343;g1e22245eb12_1_12:notes" draw:style-name="gr2" draw:layer="layout" svg:width="12.699cm" svg:height="9.524cm" svg:x="3.176cm" svg:y="1.905cm" draw:page-number="30" presentation:class="page"/>
          <draw:frame draw:name="Google Shape;344;g1e22245eb12_1_12:notes" presentation:style-name="pr34"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f81b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12;p2" presentation:style-name="OBJECT-title" draw:layer="backgroundobjects" svg:width="22.859cm" svg:height="3.175cm" svg:x="1.27cm" svg:y="0.763cm" presentation:class="title" presentation:placeholder="true" presentation:user-transformed="true">
        <draw:text-box/>
      </draw:frame>
      <draw:frame draw:name="Google Shape;13;p2" presentation:style-name="OBJECT-outline1" draw:layer="backgroundobjects" svg:width="22.859cm" svg:height="12.572cm" svg:x="1.27cm" svg:y="4.445cm" presentation:class="outline" presentation:placeholder="true" presentation:user-transformed="true">
        <draw:text-box/>
      </draw:frame>
      <draw:frame draw:name="Google Shape;14;p2" presentation:style-name="Mpr1" draw:text-style-name="MP5" draw:layer="backgroundobjects" svg:width="5.926cm" svg:height="1.013cm" svg:x="1.27cm" svg:y="17.657cm" presentation:class="date-time" presentation:user-transformed="true">
        <draw:text-box>
          <text:p/>
        </draw:text-box>
      </draw:frame>
      <draw:frame draw:name="Google Shape;15;p2" presentation:style-name="Mpr1" draw:text-style-name="MP5" draw:layer="backgroundobjects" svg:width="8.042cm" svg:height="1.013cm" svg:x="8.678cm" svg:y="17.657cm" presentation:class="footer" presentation:user-transformed="true">
        <draw:text-box>
          <text:p/>
        </draw:text-box>
      </draw:frame>
      <draw:frame draw:name="Google Shape;16;p2" presentation:style-name="Mpr1" draw:text-style-name="MP5" draw:layer="backgroundobjects" svg:width="5.926cm" svg:height="1.013cm" svg:x="18.203cm" svg:y="17.657cm" presentation:class="page-number" presentation:user-transformed="true">
        <draw:text-box>
          <text:p text:style-name="MP6"><text:span text:style-name="MT1"><text:page-number>&lt;number&gt;</text:page-number></text:span></text:p>
        </draw:text-box>
      </draw:frame>
      <draw:custom-shape draw:name="Google Shape;17;p2" draw:style-name="Mgr3" draw:text-style-name="MP7" draw:layer="backgroundobjects" svg:width="22.528cm" svg:height="0.01cm" draw:transform="rotate (-3.14159265358979) translate (22.529cm 4.324cm)">
        <text:p/>
        <draw:enhanced-geometry draw:mirror-horizontal="true" draw:mirror-vertical="false" svg:viewBox="0 0 21600 21600" draw:type="mso-spt32" draw:enhanced-path="M 0 0 L 21600 21600 N"/>
      </draw:custom-shape>
      <draw:frame draw:name="Google Shape;18;p2" draw:style-name="Mgr4" draw:text-style-name="MP7" draw:layer="backgroundobjects" svg:width="5.013cm" svg:height="3.671cm" svg:x="19.302cm" svg:y="0.733cm">
        <draw:image xlink:href="Pictures/10000201000001DA0000015B5D9DBE45C88A5E6E.png" xlink:type="simple" xlink:show="embed" xlink:actuate="onLoad">
          <text:p/>
        </draw:image>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8"/>
    <meta:generator>LibreOfficeDev/6.0.5.2$Linux_X86_64 LibreOffice_project/</meta:generator>
  </office:meta>
</office:document-meta>
</file>